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(W1)" svg:font-family="'Courier (W1)', 'Courier New'" style:font-family-generic="modern"/>
    <style:font-face style:name="Liberation Mono" svg:font-family="'Liberation Mono'" style:font-family-generic="syste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">
      <style:table-properties style:width="4.7875in" style:page-number="auto" table:align="margins" style:writing-mode="lr-tb"/>
    </style:style>
    <style:style style:name="Table1.A" style:family="table-column">
      <style:table-column-properties style:column-width="1.1257in" style:rel-column-width="1621*"/>
    </style:style>
    <style:style style:name="Table1.B" style:family="table-column">
      <style:table-column-properties style:column-width="0.5014in" style:rel-column-width="722*"/>
    </style:style>
    <style:style style:name="Table1.C" style:family="table-column">
      <style:table-column-properties style:column-width="0.4958in" style:rel-column-width="714*"/>
    </style:style>
    <style:style style:name="Table1.D" style:family="table-column">
      <style:table-column-properties style:column-width="0.7542in" style:rel-column-width="1086*"/>
    </style:style>
    <style:style style:name="Table1.E" style:family="table-column">
      <style:table-column-properties style:column-width="0.3535in" style:rel-column-width="509*"/>
    </style:style>
    <style:style style:name="Table1.F" style:family="table-column">
      <style:table-column-properties style:column-width="0.3313in" style:rel-column-width="477*"/>
    </style:style>
    <style:style style:name="Table1.G" style:family="table-column">
      <style:table-column-properties style:column-width="0.0222in" style:rel-column-width="32*"/>
    </style:style>
    <style:style style:name="Table1.H" style:family="table-column">
      <style:table-column-properties style:column-width="0.3542in" style:rel-column-width="510*"/>
    </style:style>
    <style:style style:name="Table1.I" style:family="table-column">
      <style:table-column-properties style:column-width="0.4965in" style:rel-column-width="715*"/>
    </style:style>
    <style:style style:name="Table1.J" style:family="table-column">
      <style:table-column-properties style:column-width="0.3528in" style:rel-column-width="508*"/>
    </style:style>
    <style:style style:name="Table1.A1" style:family="table-cell">
      <style:table-cell-properties style:writing-mode="page"/>
    </style:style>
    <style:style style:name="Table1.A2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J2" style:family="table-cell">
      <style:table-cell-properties fo:padding="0.0201in" fo:border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J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7.1in" table:align="margins" style:writing-mode="lr-tb"/>
    </style:style>
    <style:style style:name="Table2.A" style:family="table-column">
      <style:table-column-properties style:column-width="7.1in" style:rel-column-width="65535*"/>
    </style:style>
    <style:style style:name="Table2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>
        <style:tab-stops>
          <style:tab-stop style:position="1.3752in"/>
        </style:tab-stops>
      </style:paragraph-properties>
    </style:style>
    <style:style style:name="P2" style:family="paragraph" style:parent-style-name="Standard">
      <style:paragraph-properties fo:text-align="justify" style:justify-single-word="false">
        <style:tab-stops>
          <style:tab-stop style:position="1.3752in"/>
          <style:tab-stop style:position="1.8752in"/>
        </style:tab-stops>
      </style:paragraph-properties>
    </style:style>
    <style:style style:name="P3" style:family="paragraph" style:parent-style-name="Standard">
      <style:paragraph-properties fo:text-align="justify" style:justify-single-word="false">
        <style:tab-stops>
          <style:tab-stop style:position="1.3752in"/>
        </style:tab-stops>
      </style:paragraph-properties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justify" style:justify-single-word="false" fo:break-before="column">
        <style:tab-stops>
          <style:tab-stop style:position="1.3752in"/>
        </style:tab-stops>
      </style:paragraph-properties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3752in"/>
          <style:tab-stop style:position="1.75in"/>
          <style:tab-stop style:position="2.1874in"/>
          <style:tab-stop style:position="2.5626in"/>
          <style:tab-stop style:position="3in"/>
          <style:tab-stop style:position="3.3752in"/>
          <style:tab-stop style:position="3.6874in"/>
          <style:tab-stop style:position="4.0626in"/>
          <style:tab-stop style:position="4.5in"/>
        </style:tab-stops>
      </style:paragraph-properties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4374in"/>
          <style:tab-stop style:position="1.8752in"/>
        </style:tab-stops>
      </style:paragraph-properties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3752in"/>
          <style:tab-stop style:position="1.8752in"/>
        </style:tab-stops>
      </style:paragraph-properties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text-align="justify" style:justify-single-word="false" fo:break-before="column">
        <style:tab-stops>
          <style:tab-stop style:position="1.3752in"/>
          <style:tab-stop style:position="1.8752in"/>
        </style:tab-stops>
      </style:paragraph-properties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text-align="center" style:justify-single-word="false">
        <style:tab-stops>
          <style:tab-stop style:position="1.3752in"/>
          <style:tab-stop style:position="1.75in"/>
          <style:tab-stop style:position="2.1874in"/>
          <style:tab-stop style:position="2.5626in"/>
          <style:tab-stop style:position="3in"/>
          <style:tab-stop style:position="3.3752in"/>
          <style:tab-stop style:position="3.6874in"/>
          <style:tab-stop style:position="4.0626in"/>
          <style:tab-stop style:position="4.5in"/>
        </style:tab-stops>
      </style:paragraph-properties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>
        <style:tab-stops>
          <style:tab-stop style:position="1.3752in"/>
          <style:tab-stop style:position="1.75in"/>
          <style:tab-stop style:position="2.1874in"/>
          <style:tab-stop style:position="2.5626in"/>
          <style:tab-stop style:position="3in"/>
          <style:tab-stop style:position="3.3752in"/>
          <style:tab-stop style:position="3.6874in"/>
          <style:tab-stop style:position="4.0626in"/>
          <style:tab-stop style:position="4.5in"/>
        </style:tab-stops>
      </style:paragraph-properties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line-height="120%" fo:text-align="justify" style:justify-single-word="false">
        <style:tab-stops>
          <style:tab-stop style:position="1.4374in"/>
          <style:tab-stop style:position="1.8752in"/>
        </style:tab-stops>
      </style:paragraph-properties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line-height="120%" fo:text-align="justify" style:justify-single-word="false" fo:break-before="column">
        <style:tab-stops>
          <style:tab-stop style:position="1.4374in"/>
          <style:tab-stop style:position="1.8752in"/>
        </style:tab-stops>
      </style:paragraph-properties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line-height="120%" fo:text-align="center" style:justify-single-word="false">
        <style:tab-stops>
          <style:tab-stop style:position="1.4374in"/>
          <style:tab-stop style:position="1.8752in"/>
        </style:tab-stops>
      </style:paragraph-properties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line-height="120%" fo:text-align="center" style:justify-single-word="false" fo:break-before="column">
        <style:tab-stops>
          <style:tab-stop style:position="1.4374in"/>
          <style:tab-stop style:position="1.8752in"/>
        </style:tab-stops>
      </style:paragraph-properties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3752in"/>
        </style:tab-stops>
      </style:paragraph-properties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1.4374in"/>
          <style:tab-stop style:position="1.8752in"/>
        </style:tab-stops>
      </style:paragraph-properties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7" style:family="paragraph" style:parent-style-name="Standard">
      <style:paragraph-properties fo:text-align="center" style:justify-single-word="false">
        <style:tab-stops>
          <style:tab-stop style:position="1in"/>
          <style:tab-stop style:position="1.8752in"/>
        </style:tab-stops>
      </style:paragraph-properties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3752in"/>
          <style:tab-stop style:position="1.75in"/>
          <style:tab-stop style:position="2.1874in"/>
          <style:tab-stop style:position="2.5626in"/>
          <style:tab-stop style:position="3in"/>
          <style:tab-stop style:position="3.3752in"/>
          <style:tab-stop style:position="3.6874in"/>
          <style:tab-stop style:position="4.0626in"/>
          <style:tab-stop style:position="4.5in"/>
        </style:tab-stops>
      </style:paragraph-properties>
      <style:text-properties style:font-name="Times New Roman" fo:font-size="8pt" style:font-name-asian="Times New Roman" style:font-size-asian="8pt" style:font-name-complex="Times New Roman" style:font-size-complex="8pt"/>
    </style:style>
    <style:style style:name="P19" style:family="paragraph" style:parent-style-name="Standard">
      <style:paragraph-properties fo:text-align="center" style:justify-single-word="false" fo:break-before="column">
        <style:tab-stops>
          <style:tab-stop style:position="1.3752in"/>
          <style:tab-stop style:position="1.75in"/>
          <style:tab-stop style:position="2.1874in"/>
          <style:tab-stop style:position="2.5626in"/>
          <style:tab-stop style:position="3in"/>
          <style:tab-stop style:position="3.3752in"/>
          <style:tab-stop style:position="3.6874in"/>
          <style:tab-stop style:position="4.0626in"/>
          <style:tab-stop style:position="4.5in"/>
        </style:tab-stops>
      </style:paragraph-properties>
      <style:text-properties style:font-name="Times New Roman" fo:font-size="8pt" style:font-name-asian="Times New Roman" style:font-size-asian="8pt" style:font-name-complex="Times New Roman" style:font-size-complex="8pt"/>
    </style:style>
    <style:style style:name="P20" style:family="paragraph" style:parent-style-name="Standard">
      <style:paragraph-properties fo:line-height="150%" fo:text-align="justify" style:justify-single-word="false">
        <style:tab-stops>
          <style:tab-stop style:position="1in"/>
          <style:tab-stop style:position="1.6874in"/>
        </style:tab-stops>
      </style:paragraph-properties>
      <style:text-properties style:font-name="Times New Roman" fo:font-size="8pt" style:font-name-asian="Times New Roman" style:font-size-asian="8pt" style:font-name-complex="Times New Roman" style:font-size-complex="8pt"/>
    </style:style>
    <style:style style:name="P21" style:family="paragraph" style:parent-style-name="Standard">
      <style:paragraph-properties fo:margin-top="0.0835in" fo:margin-bottom="0in" style:contextual-spacing="false" fo:line-height="120%" fo:text-align="end" style:justify-single-word="false">
        <style:tab-stops>
          <style:tab-stop style:position="1.4374in"/>
          <style:tab-stop style:position="1.8752in"/>
        </style:tab-stops>
      </style:paragraph-properties>
      <style:text-properties style:font-name="Times New Roman" fo:font-size="8pt" style:font-name-asian="Times New Roman" style:font-size-asian="8pt" style:font-name-complex="Times New Roman" style:font-size-complex="8pt"/>
    </style:style>
    <style:style style:name="P22" style:family="paragraph" style:parent-style-name="Standard">
      <style:paragraph-properties fo:line-height="150%" fo:text-align="justify" style:justify-single-word="false">
        <style:tab-stops>
          <style:tab-stop style:position="1in"/>
          <style:tab-stop style:position="1.6874in"/>
        </style:tab-stops>
      </style:paragraph-properties>
    </style:style>
    <style:style style:name="P23" style:family="paragraph" style:parent-style-name="Standard">
      <style:paragraph-properties fo:text-align="center" style:justify-single-word="false">
        <style:tab-stops>
          <style:tab-stop style:position="1.4374in"/>
          <style:tab-stop style:position="1.8752in"/>
        </style:tab-stops>
      </style:paragraph-properties>
      <style:text-properties fo:font-weight="bold" style:font-weight-asian="bold" style:font-weight-complex="bold"/>
    </style:style>
    <style:style style:name="P24" style:family="paragraph" style:parent-style-name="Standard">
      <style:paragraph-properties>
        <style:tab-stops>
          <style:tab-stop style:position="1.3752in"/>
          <style:tab-stop style:position="1.75in"/>
          <style:tab-stop style:position="2.1874in"/>
          <style:tab-stop style:position="2.5626in"/>
          <style:tab-stop style:position="3in"/>
          <style:tab-stop style:position="3.3752in"/>
          <style:tab-stop style:position="3.6874in"/>
          <style:tab-stop style:position="4.0626in"/>
          <style:tab-stop style:position="4.5in"/>
        </style:tab-stops>
      </style:paragraph-properties>
    </style:style>
    <style:style style:name="P25" style:family="paragraph" style:parent-style-name="Standard">
      <style:paragraph-properties fo:break-before="column">
        <style:tab-stops>
          <style:tab-stop style:position="1.6252in"/>
          <style:tab-stop style:position="2in"/>
          <style:tab-stop style:position="2.3752in"/>
          <style:tab-stop style:position="2.8752in"/>
          <style:tab-stop style:position="3.3752in"/>
          <style:tab-stop style:position="3.8126in"/>
          <style:tab-stop style:position="4.25in"/>
        </style:tab-stops>
      </style:paragraph-properties>
    </style:style>
    <style:style style:name="P26" style:family="paragraph" style:parent-style-name="Standard">
      <style:paragraph-properties fo:text-align="justify" style:justify-single-word="false">
        <style:tab-stops>
          <style:tab-stop style:position="1.4374in"/>
          <style:tab-stop style:position="1.8752in"/>
        </style:tab-stops>
      </style:paragraph-properties>
      <style:text-properties style:font-name="Times New Roman" officeooo:paragraph-rsid="0007ca97" style:font-name-asian="Times New Roman" style:font-name-complex="Times New Roman"/>
    </style:style>
    <style:style style:name="P27" style:family="paragraph" style:parent-style-name="Standard">
      <style:paragraph-properties fo:text-align="justify" style:justify-single-word="false" fo:break-before="column">
        <style:tab-stops>
          <style:tab-stop style:position="1.4374in"/>
          <style:tab-stop style:position="1.8752in"/>
        </style:tab-stops>
      </style:paragraph-properties>
      <style:text-properties style:font-name="Times New Roman" officeooo:paragraph-rsid="0007ca97" style:font-name-asian="Times New Roman" style:font-name-complex="Times New Roman"/>
    </style:style>
    <style:style style:name="P28" style:family="paragraph" style:parent-style-name="Standard">
      <loext:graphic-properties draw:fill-gradient-name="gradient" draw:fill-hatch-name="hatch"/>
      <style:paragraph-properties fo:text-align="justify" style:justify-single-word="false">
        <style:tab-stops>
          <style:tab-stop style:position="4.8118in" style:type="right"/>
        </style:tab-stops>
      </style:paragraph-properties>
      <style:text-properties style:font-name="Times New Roman" officeooo:paragraph-rsid="00011726" style:font-name-asian="Times New Roman" style:font-name-complex="Times New Roman"/>
    </style:style>
    <style:style style:name="P29" style:family="paragraph" style:parent-style-name="Standard" style:master-page-name="Standard">
      <loext:graphic-properties draw:fill-gradient-name="gradient" draw:fill-hatch-name="hatch"/>
      <style:paragraph-properties fo:margin-top="0in" fo:margin-bottom="0.1402in" style:contextual-spacing="false" fo:text-align="justify" style:justify-single-word="false" style:page-number="auto">
        <style:tab-stops/>
      </style:paragraph-properties>
      <style:text-properties style:font-name="Times New Roman" style:font-name-asian="Times New Roman" style:font-name-complex="Times New Roman"/>
    </style:style>
    <style:style style:name="P30" style:family="paragraph" style:parent-style-name="Standard">
      <loext:graphic-properties draw:fill-gradient-name="gradient" draw:fill-hatch-name="hatch"/>
      <style:paragraph-properties fo:text-align="justify" style:justify-single-word="false">
        <style:tab-stops>
          <style:tab-stop style:position="1.6866in" style:type="right"/>
          <style:tab-stop style:position="1.7508in"/>
        </style:tab-stops>
      </style:paragraph-properties>
      <style:text-properties style:font-name="Times New Roman" style:font-name-asian="Times New Roman" style:font-name-complex="Times New Roman"/>
    </style:style>
    <style:style style:name="P31" style:family="paragraph" style:parent-style-name="Standard">
      <style:paragraph-properties fo:text-align="justify" style:justify-single-word="false">
        <style:tab-stops>
          <style:tab-stop style:position="1.75in"/>
          <style:tab-stop style:position="2.1874in"/>
          <style:tab-stop style:position="2.5626in"/>
          <style:tab-stop style:position="3in"/>
          <style:tab-stop style:position="3.3752in"/>
          <style:tab-stop style:position="3.6874in"/>
          <style:tab-stop style:position="4.0626in"/>
          <style:tab-stop style:position="4.5in"/>
        </style:tab-stops>
      </style:paragraph-properties>
      <style:text-properties style:font-name="Times New Roman" officeooo:paragraph-rsid="00029216" style:font-name-asian="Times New Roman" style:font-name-complex="Times New Roman"/>
    </style:style>
    <style:style style:name="P32" style:family="paragraph" style:parent-style-name="Standard">
      <style:paragraph-properties fo:text-align="justify" style:justify-single-word="false">
        <style:tab-stops>
          <style:tab-stop style:position="1.3752in"/>
          <style:tab-stop style:position="1.75in"/>
          <style:tab-stop style:position="2.1874in"/>
          <style:tab-stop style:position="2.5626in"/>
          <style:tab-stop style:position="3in"/>
          <style:tab-stop style:position="3.3752in"/>
          <style:tab-stop style:position="3.6874in"/>
          <style:tab-stop style:position="4.0626in"/>
          <style:tab-stop style:position="4.5in"/>
        </style:tab-stops>
      </style:paragraph-properties>
      <style:text-properties style:font-name="Times New Roman" style:font-name-asian="Times New Roman" style:font-name-complex="Times New Roman"/>
    </style:style>
    <style:style style:name="P33" style:family="paragraph" style:parent-style-name="Standard">
      <style:paragraph-properties fo:text-align="justify" style:justify-single-word="false">
        <style:tab-stops>
          <style:tab-stop style:position="1.3752in"/>
          <style:tab-stop style:position="1.75in"/>
          <style:tab-stop style:position="2.1874in"/>
          <style:tab-stop style:position="2.5626in"/>
          <style:tab-stop style:position="3in"/>
          <style:tab-stop style:position="3.3752in"/>
          <style:tab-stop style:position="3.6874in"/>
          <style:tab-stop style:position="4.0626in"/>
          <style:tab-stop style:position="4.5in"/>
        </style:tab-stops>
      </style:paragraph-properties>
      <style:text-properties style:font-name="Times New Roman" officeooo:paragraph-rsid="00029216" style:font-name-asian="Times New Roman" style:font-name-complex="Times New Roman"/>
    </style:style>
    <style:style style:name="P34" style:family="paragraph" style:parent-style-name="Standard">
      <style:paragraph-properties fo:text-align="justify" style:justify-single-word="false">
        <style:tab-stops>
          <style:tab-stop style:position="2.0339in" style:type="right"/>
          <style:tab-stop style:position="2.1874in"/>
          <style:tab-stop style:position="2.5626in"/>
          <style:tab-stop style:position="3in"/>
          <style:tab-stop style:position="3.3752in"/>
          <style:tab-stop style:position="3.6874in"/>
          <style:tab-stop style:position="4.0626in"/>
          <style:tab-stop style:position="4.5in"/>
        </style:tab-stops>
      </style:paragraph-properties>
      <style:text-properties style:font-name="Times New Roman" officeooo:paragraph-rsid="00029216" style:font-name-asian="Times New Roman" style:font-name-complex="Times New Roman"/>
    </style:style>
    <style:style style:name="P35" style:family="paragraph" style:parent-style-name="Standard">
      <style:paragraph-properties fo:text-align="justify" style:justify-single-word="false">
        <style:tab-stops>
          <style:tab-stop style:position="1.9992in" style:type="right"/>
          <style:tab-stop style:position="2.1874in"/>
          <style:tab-stop style:position="2.5626in"/>
          <style:tab-stop style:position="3in"/>
          <style:tab-stop style:position="3.3752in"/>
          <style:tab-stop style:position="3.6874in"/>
          <style:tab-stop style:position="4.0626in"/>
          <style:tab-stop style:position="4.5in"/>
        </style:tab-stops>
      </style:paragraph-properties>
      <style:text-properties style:font-name="Times New Roman" officeooo:paragraph-rsid="00029216" style:font-name-asian="Times New Roman" style:font-name-complex="Times New Roman"/>
    </style:style>
    <style:style style:name="P36" style:family="paragraph" style:parent-style-name="Standard">
      <style:paragraph-properties fo:text-align="justify" style:justify-single-word="false">
        <style:tab-stops>
          <style:tab-stop style:position="1.8102in"/>
          <style:tab-stop style:position="2.5626in"/>
          <style:tab-stop style:position="3in"/>
          <style:tab-stop style:position="3.3752in"/>
          <style:tab-stop style:position="3.6874in"/>
          <style:tab-stop style:position="4.0626in"/>
          <style:tab-stop style:position="4.5in"/>
        </style:tab-stops>
      </style:paragraph-properties>
      <style:text-properties style:font-name="Times New Roman" officeooo:paragraph-rsid="00029216" style:font-name-asian="Times New Roman" style:font-name-complex="Times New Roman"/>
    </style:style>
    <style:style style:name="P37" style:family="paragraph" style:parent-style-name="Standard">
      <style:paragraph-properties fo:text-align="justify" style:justify-single-word="false">
        <style:tab-stops>
          <style:tab-stop style:position="1.3752in"/>
        </style:tab-stops>
      </style:paragraph-properties>
      <style:text-properties style:font-name="Times New Roman" officeooo:paragraph-rsid="00029216" style:font-name-asian="Times New Roman" style:font-name-complex="Times New Roman"/>
    </style:style>
    <style:style style:name="P38" style:family="paragraph" style:parent-style-name="Standard">
      <style:paragraph-properties fo:text-align="justify" style:justify-single-word="false">
        <style:tab-stops>
          <style:tab-stop style:position="1.3752in"/>
        </style:tab-stops>
      </style:paragraph-properties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text-align="justify" style:justify-single-word="false">
        <style:tab-stops>
          <style:tab-stop style:position="1.3752in"/>
          <style:tab-stop style:position="3.472in" style:type="right"/>
        </style:tab-stops>
      </style:paragraph-properties>
      <style:text-properties style:font-name="Times New Roman" officeooo:paragraph-rsid="00029216" style:font-name-asian="Times New Roman" style:font-name-complex="Times New Roman"/>
    </style:style>
    <style:style style:name="P40" style:family="paragraph" style:parent-style-name="Standard">
      <loext:graphic-properties draw:fill-gradient-name="gradient" draw:fill-hatch-name="hatch"/>
      <style:paragraph-properties fo:text-align="justify" style:justify-single-word="false">
        <style:tab-stops>
          <style:tab-stop style:position="7.098in" style:type="right"/>
        </style:tab-stops>
      </style:paragraph-properties>
      <style:text-properties style:font-name="Times New Roman" officeooo:paragraph-rsid="00060f90" style:font-name-asian="Times New Roman" style:font-name-complex="Times New Roman"/>
    </style:style>
    <style:style style:name="P41" style:family="paragraph" style:parent-style-name="Standard">
      <style:paragraph-properties fo:text-align="justify" style:justify-single-word="false">
        <style:tab-stops>
          <style:tab-stop style:position="7.098in" style:type="right"/>
        </style:tab-stops>
      </style:paragraph-properties>
      <style:text-properties style:font-name="Times New Roman" officeooo:paragraph-rsid="00081be6" style:font-name-asian="Times New Roman" style:font-name-complex="Times New Roman"/>
    </style:style>
    <style:style style:name="P42" style:family="paragraph" style:parent-style-name="Standard">
      <loext:graphic-properties draw:fill-gradient-name="gradient" draw:fill-hatch-name="hatch"/>
      <style:paragraph-properties fo:text-align="justify" style:justify-single-word="false">
        <style:tab-stops>
          <style:tab-stop style:position="7.098in" style:type="right"/>
        </style:tab-stops>
      </style:paragraph-properties>
      <style:text-properties style:font-name="Times New Roman" officeooo:paragraph-rsid="00081be6" style:font-name-asian="Times New Roman" style:font-name-complex="Times New Roman"/>
    </style:style>
    <style:style style:name="P43" style:family="paragraph" style:parent-style-name="Standard">
      <style:paragraph-properties fo:text-align="justify" style:justify-single-word="false">
        <style:tab-stops>
          <style:tab-stop style:position="7.098in" style:type="right"/>
        </style:tab-stops>
      </style:paragraph-properties>
      <style:text-properties style:font-name="Times New Roman" officeooo:paragraph-rsid="00060f90" style:font-name-asian="Times New Roman" style:font-name-complex="Times New Roman"/>
    </style:style>
    <style:style style:name="P44" style:family="paragraph" style:parent-style-name="Standard">
      <loext:graphic-properties draw:fill-gradient-name="gradient" draw:fill-hatch-name="hatch"/>
      <style:paragraph-properties fo:text-align="justify" style:justify-single-word="false">
        <style:tab-stops>
          <style:tab-stop style:position="7.098in" style:type="right"/>
        </style:tab-stops>
      </style:paragraph-properties>
      <style:text-properties style:font-name="Times New Roman" officeooo:paragraph-rsid="00060f90" style:font-name-asian="Times New Roman" style:font-name-complex="Times New Roman"/>
    </style:style>
    <style:style style:name="P45" style:family="paragraph" style:parent-style-name="Standard">
      <loext:graphic-properties draw:fill-gradient-name="gradient" draw:fill-hatch-name="hatch"/>
      <style:paragraph-properties fo:text-align="justify" style:justify-single-word="false">
        <style:tab-stops>
          <style:tab-stop style:position="0.5in"/>
          <style:tab-stop style:position="3.1846in"/>
          <style:tab-stop style:position="7.098in" style:type="right"/>
        </style:tab-stops>
      </style:paragraph-properties>
      <style:text-properties style:font-name="Times New Roman" officeooo:paragraph-rsid="0007ca97" style:font-name-asian="Times New Roman" style:font-name-complex="Times New Roman"/>
    </style:style>
    <style:style style:name="P46" style:family="paragraph" style:parent-style-name="Standard">
      <style:paragraph-properties fo:text-align="justify" style:justify-single-word="false">
        <style:tab-stops>
          <style:tab-stop style:position="1in"/>
          <style:tab-stop style:position="1.8752in"/>
          <style:tab-stop style:position="7.098in" style:type="right"/>
        </style:tab-stops>
      </style:paragraph-properties>
      <style:text-properties style:font-name="Times New Roman" officeooo:paragraph-rsid="00081be6" style:font-name-asian="Times New Roman" style:font-name-complex="Times New Roman"/>
    </style:style>
    <style:style style:name="P47" style:family="paragraph" style:parent-style-name="Standard">
      <style:paragraph-properties fo:line-height="120%" fo:text-align="justify" style:justify-single-word="false">
        <style:tab-stops>
          <style:tab-stop style:position="1.4374in"/>
          <style:tab-stop style:position="1.8752in"/>
        </style:tab-stops>
      </style:paragraph-properties>
      <style:text-properties style:font-name="Times New Roman" style:font-name-asian="Times New Roman" style:font-name-complex="Times New Roman"/>
    </style:style>
    <style:style style:name="P48" style:family="paragraph" style:parent-style-name="Standard">
      <style:paragraph-properties fo:margin-top="0.0835in" fo:margin-bottom="0in" style:contextual-spacing="false" fo:line-height="120%" fo:text-align="end" style:justify-single-word="false">
        <style:tab-stops>
          <style:tab-stop style:position="1.4374in"/>
          <style:tab-stop style:position="1.8752in"/>
        </style:tab-stops>
      </style:paragraph-properties>
      <style:text-properties style:font-name="Times New Roman" officeooo:paragraph-rsid="0007ca97" style:font-name-asian="Times New Roman" style:font-name-complex="Times New Roman"/>
    </style:style>
    <style:style style:name="P49" style:family="paragraph" style:parent-style-name="Standard">
      <style:paragraph-properties fo:text-align="center" style:justify-single-word="false">
        <style:tab-stops>
          <style:tab-stop style:position="1in"/>
          <style:tab-stop style:position="1.8752in"/>
        </style:tab-stops>
      </style:paragraph-properties>
      <style:text-properties style:font-name="Times New Roman" style:font-name-asian="Times New Roman" style:font-name-complex="Times New Roman"/>
    </style:style>
    <style:style style:name="P50" style:family="paragraph" style:parent-style-name="Standard">
      <style:paragraph-properties fo:margin-top="0in" fo:margin-bottom="0.2028in" style:contextual-spacing="false" fo:text-align="center" style:justify-single-word="false">
        <style:tab-stops>
          <style:tab-stop style:position="1.6252in"/>
          <style:tab-stop style:position="2in"/>
          <style:tab-stop style:position="2.3752in"/>
          <style:tab-stop style:position="2.8752in"/>
          <style:tab-stop style:position="3.3752in"/>
          <style:tab-stop style:position="3.8126in"/>
          <style:tab-stop style:position="4.25in"/>
        </style:tab-stops>
      </style:paragraph-properties>
      <style:text-properties style:font-name="Times New Roman" fo:font-size="8pt" style:font-name-asian="Times New Roman" style:font-size-asian="8pt" style:font-name-complex="Times New Roman" style:font-size-complex="8pt"/>
    </style:style>
    <style:style style:name="P51" style:family="paragraph" style:parent-style-name="Standard">
      <style:paragraph-properties fo:line-height="150%" fo:text-align="justify" style:justify-single-word="false">
        <style:tab-stops>
          <style:tab-stop style:position="1in"/>
          <style:tab-stop style:position="1.6874in"/>
        </style:tab-stops>
      </style:paragraph-properties>
      <style:text-properties style:font-name="Times New Roman" fo:font-size="8pt" style:font-name-asian="Times New Roman" style:font-size-asian="8pt" style:font-name-complex="Times New Roman" style:font-size-complex="8pt"/>
    </style:style>
    <style:style style:name="P52" style:family="paragraph" style:parent-style-name="Standard">
      <style:paragraph-properties fo:margin-top="0.0835in" fo:margin-bottom="0in" style:contextual-spacing="false" fo:line-height="120%" fo:text-align="end" style:justify-single-word="false">
        <style:tab-stops>
          <style:tab-stop style:position="1.4374in"/>
          <style:tab-stop style:position="1.8752in"/>
        </style:tab-stops>
      </style:paragraph-properties>
      <style:text-properties style:font-name="Times New Roman" fo:font-size="8pt" style:font-name-asian="Times New Roman" style:font-size-asian="8pt" style:font-name-complex="Times New Roman" style:font-size-complex="8pt"/>
    </style:style>
    <style:style style:name="P53" style:family="paragraph" style:parent-style-name="Standard" style:master-page-name="Convert_20_3">
      <style:paragraph-properties fo:text-align="center" style:justify-single-word="false" style:page-number="auto">
        <style:tab-stops>
          <style:tab-stop style:position="1.3752in"/>
          <style:tab-stop style:position="1.75in"/>
          <style:tab-stop style:position="2.1874in"/>
          <style:tab-stop style:position="2.5626in"/>
          <style:tab-stop style:position="3in"/>
          <style:tab-stop style:position="3.3752in"/>
          <style:tab-stop style:position="3.6874in"/>
          <style:tab-stop style:position="4.0626in"/>
          <style:tab-stop style:position="4.5in"/>
        </style:tab-stops>
      </style:paragraph-properties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54" style:family="paragraph" style:parent-style-name="Standard">
      <style:paragraph-properties fo:text-align="center" style:justify-single-word="false">
        <style:tab-stops>
          <style:tab-stop style:position="1in"/>
          <style:tab-stop style:position="1.8752in"/>
        </style:tab-stops>
      </style:paragraph-properties>
      <style:text-properties style:font-name="Times New Roman" fo:font-weight="bold" officeooo:rsid="00081be6" officeooo:paragraph-rsid="00081be6" style:font-name-asian="Times New Roman" style:font-weight-asian="bold" style:font-name-complex="Times New Roman" style:font-weight-complex="bold"/>
    </style:style>
    <style:style style:name="P55" style:family="paragraph" style:parent-style-name="Standard">
      <style:paragraph-properties fo:text-align="justify" style:justify-single-word="false">
        <style:tab-stops>
          <style:tab-stop style:position="1.3752in"/>
        </style:tab-stops>
      </style:paragraph-properties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P56" style:family="paragraph" style:parent-style-name="Standard">
      <style:paragraph-properties fo:text-align="justify" style:justify-single-word="false">
        <style:tab-stops>
          <style:tab-stop style:position="1.3752in"/>
        </style:tab-stops>
      </style:paragraph-properties>
      <style:text-properties officeooo:paragraph-rsid="0001652b"/>
    </style:style>
    <style:style style:name="P57" style:family="paragraph" style:parent-style-name="Standard">
      <loext:graphic-properties draw:fill-gradient-name="gradient" draw:fill-hatch-name="hatch"/>
      <style:paragraph-properties fo:text-align="justify" style:justify-single-word="false">
        <style:tab-stops>
          <style:tab-stop style:position="4.8118in" style:type="right"/>
        </style:tab-stops>
      </style:paragraph-properties>
      <style:text-properties officeooo:paragraph-rsid="00011726"/>
    </style:style>
    <style:style style:name="P58" style:family="paragraph" style:parent-style-name="Standard">
      <loext:graphic-properties draw:fill-gradient-name="gradient" draw:fill-hatch-name="hatch"/>
      <style:paragraph-properties fo:text-align="justify" style:justify-single-word="false">
        <style:tab-stops>
          <style:tab-stop style:position="3.1846in" style:type="right"/>
        </style:tab-stops>
      </style:paragraph-properties>
      <style:text-properties officeooo:paragraph-rsid="0001652b"/>
    </style:style>
    <style:style style:name="P59" style:family="paragraph" style:parent-style-name="Standard">
      <loext:graphic-properties draw:fill-gradient-name="gradient" draw:fill-hatch-name="hatch"/>
      <style:paragraph-properties fo:text-align="justify" style:justify-single-word="false" fo:break-before="column">
        <style:tab-stops>
          <style:tab-stop style:position="3.3134in" style:type="right"/>
        </style:tab-stops>
      </style:paragraph-properties>
    </style:style>
    <style:style style:name="P60" style:family="paragraph" style:parent-style-name="Standard">
      <style:paragraph-properties fo:text-align="justify" style:justify-single-word="false"/>
      <style:text-properties officeooo:paragraph-rsid="00029216"/>
    </style:style>
    <style:style style:name="P61" style:family="paragraph" style:parent-style-name="Standard">
      <style:paragraph-properties fo:text-align="justify" style:justify-single-word="false">
        <style:tab-stops>
          <style:tab-stop style:position="4.7866in" style:type="right"/>
        </style:tab-stops>
      </style:paragraph-properties>
      <style:text-properties officeooo:paragraph-rsid="00029216"/>
    </style:style>
    <style:style style:name="P62" style:family="paragraph" style:parent-style-name="Standard">
      <loext:graphic-properties draw:fill-gradient-name="gradient" draw:fill-hatch-name="hatch"/>
      <style:paragraph-properties fo:text-align="justify" style:justify-single-word="false">
        <style:tab-stops>
          <style:tab-stop style:position="7.098in" style:type="right"/>
        </style:tab-stops>
      </style:paragraph-properties>
      <style:text-properties officeooo:paragraph-rsid="00060f90"/>
    </style:style>
    <style:style style:name="P63" style:family="paragraph" style:parent-style-name="Standard">
      <style:paragraph-properties fo:text-align="justify" style:justify-single-word="false">
        <style:tab-stops>
          <style:tab-stop style:position="1.8752in"/>
          <style:tab-stop style:position="7.098in" style:type="right"/>
        </style:tab-stops>
      </style:paragraph-properties>
      <style:text-properties officeooo:paragraph-rsid="00060f90"/>
    </style:style>
    <style:style style:name="P64" style:family="paragraph" style:parent-style-name="Standard">
      <style:paragraph-properties fo:text-align="justify" style:justify-single-word="false">
        <style:tab-stops>
          <style:tab-stop style:position="7.098in" style:type="right"/>
        </style:tab-stops>
      </style:paragraph-properties>
      <style:text-properties officeooo:paragraph-rsid="00060f90"/>
    </style:style>
    <style:style style:name="P65" style:family="paragraph" style:parent-style-name="Standard">
      <style:paragraph-properties fo:text-align="justify" style:justify-single-word="false">
        <style:tab-stops>
          <style:tab-stop style:position="1.1252in"/>
          <style:tab-stop style:position="1.8752in"/>
        </style:tab-stops>
      </style:paragraph-properties>
      <style:text-properties officeooo:paragraph-rsid="00081be6"/>
    </style:style>
    <style:style style:name="P66" style:family="paragraph" style:parent-style-name="Standard">
      <style:paragraph-properties fo:text-align="justify" style:justify-single-word="false">
        <style:tab-stops>
          <style:tab-stop style:position="1.1252in"/>
          <style:tab-stop style:position="1.8752in"/>
          <style:tab-stop style:position="3.6256in" style:type="right"/>
        </style:tab-stops>
      </style:paragraph-properties>
      <style:text-properties officeooo:paragraph-rsid="0007ca97"/>
    </style:style>
    <style:style style:name="P67" style:family="paragraph" style:parent-style-name="Standard">
      <style:paragraph-properties fo:text-align="justify" style:justify-single-word="false">
        <style:tab-stops>
          <style:tab-stop style:position="1.1252in"/>
          <style:tab-stop style:position="1.8752in"/>
          <style:tab-stop style:position="3.6256in" style:type="right"/>
        </style:tab-stops>
      </style:paragraph-properties>
      <style:text-properties officeooo:paragraph-rsid="00081be6"/>
    </style:style>
    <style:style style:name="P68" style:family="paragraph" style:parent-style-name="Standard">
      <style:paragraph-properties fo:text-align="justify" style:justify-single-word="false">
        <style:tab-stops>
          <style:tab-stop style:position="1.1252in"/>
          <style:tab-stop style:position="3.6256in" style:type="right"/>
        </style:tab-stops>
      </style:paragraph-properties>
      <style:text-properties officeooo:paragraph-rsid="0007ca97"/>
    </style:style>
    <style:style style:name="P69" style:family="paragraph" style:parent-style-name="Standard" style:master-page-name="Convert_20_10">
      <style:paragraph-properties fo:text-align="justify" style:justify-single-word="false" style:page-number="auto">
        <style:tab-stops>
          <style:tab-stop style:position="1.3752in"/>
          <style:tab-stop style:position="1.8752in"/>
        </style:tab-stops>
      </style:paragraph-properties>
    </style:style>
    <style:style style:name="P70" style:family="paragraph" style:parent-style-name="Standard">
      <style:paragraph-properties fo:text-align="justify" style:justify-single-word="false">
        <style:tab-stops>
          <style:tab-stop style:position="1.3752in"/>
          <style:tab-stop style:position="1.8752in"/>
        </style:tab-stops>
      </style:paragraph-properties>
    </style:style>
    <style:style style:name="P71" style:family="paragraph" style:parent-style-name="Standard">
      <loext:graphic-properties draw:fill-gradient-name="gradient" draw:fill-hatch-name="hatch"/>
      <style:paragraph-properties fo:line-height="150%" fo:text-align="justify" style:justify-single-word="false">
        <style:tab-stops>
          <style:tab-stop style:position="4.8118in" style:type="right"/>
        </style:tab-stops>
      </style:paragraph-properties>
      <style:text-properties officeooo:paragraph-rsid="00013be2"/>
    </style:style>
    <style:style style:name="P72" style:family="paragraph" style:parent-style-name="Standard">
      <style:paragraph-properties fo:line-height="150%" fo:text-align="center" style:justify-single-word="false">
        <style:tab-stops>
          <style:tab-stop style:position="1.3752in"/>
        </style:tab-stops>
      </style:paragraph-properties>
      <style:text-properties officeooo:paragraph-rsid="00011726"/>
    </style:style>
    <style:style style:name="P73" style:family="paragraph" style:parent-style-name="Standard">
      <style:paragraph-properties fo:line-height="150%" fo:text-align="center" style:justify-single-word="false" fo:break-before="column">
        <style:tab-stops>
          <style:tab-stop style:position="1.3752in"/>
        </style:tab-stops>
      </style:paragraph-properties>
      <style:text-properties officeooo:paragraph-rsid="00013be2"/>
    </style:style>
    <style:style style:name="P74" style:family="paragraph" style:parent-style-name="Standard">
      <loext:graphic-properties draw:fill-gradient-name="gradient" draw:fill-hatch-name="hatch"/>
      <style:paragraph-properties fo:line-height="150%" fo:text-align="center" style:justify-single-word="false">
        <style:tab-stops>
          <style:tab-stop style:position="1.6866in" style:type="right"/>
        </style:tab-stops>
      </style:paragraph-properties>
      <style:text-properties officeooo:paragraph-rsid="00013be2"/>
    </style:style>
    <style:style style:name="P75" style:family="paragraph" style:parent-style-name="Standard">
      <loext:graphic-properties draw:fill-gradient-name="gradient" draw:fill-hatch-name="hatch"/>
      <style:paragraph-properties fo:line-height="150%" fo:text-align="center" style:justify-single-word="false">
        <style:tab-stops>
          <style:tab-stop style:position="1.6866in" style:type="right"/>
        </style:tab-stops>
      </style:paragraph-properties>
      <style:text-properties officeooo:paragraph-rsid="00011726"/>
    </style:style>
    <style:style style:name="P76" style:family="paragraph" style:parent-style-name="Standard">
      <loext:graphic-properties draw:fill-gradient-name="gradient" draw:fill-hatch-name="hatch"/>
      <style:paragraph-properties fo:text-align="center" style:justify-single-word="false">
        <style:tab-stops>
          <style:tab-stop style:position="4.8118in" style:type="right"/>
        </style:tab-stops>
      </style:paragraph-properties>
      <style:text-properties officeooo:paragraph-rsid="00011726"/>
    </style:style>
    <style:style style:name="P77" style:family="paragraph" style:parent-style-name="Standard">
      <style:paragraph-properties fo:text-align="center" style:justify-single-word="false">
        <style:tab-stops>
          <style:tab-stop style:position="1in"/>
          <style:tab-stop style:position="1.8752in"/>
        </style:tab-stops>
      </style:paragraph-properties>
      <style:text-properties officeooo:paragraph-rsid="00081be6"/>
    </style:style>
    <style:style style:name="P78" style:family="paragraph" style:parent-style-name="Standard">
      <loext:graphic-properties draw:fill-gradient-name="gradient" draw:fill-hatch-name="hatch"/>
      <style:paragraph-properties fo:text-align="start" style:justify-single-word="false">
        <style:tab-stops>
          <style:tab-stop style:position="7.098in" style:type="right"/>
        </style:tab-stops>
      </style:paragraph-properties>
      <style:text-properties officeooo:paragraph-rsid="00060f90"/>
    </style:style>
    <style:style style:name="P79" style:family="paragraph" style:parent-style-name="Standard">
      <style:paragraph-properties fo:line-height="120%" fo:text-align="justify" style:justify-single-word="false">
        <style:tab-stops>
          <style:tab-stop style:position="1.4374in"/>
          <style:tab-stop style:position="1.8752in"/>
        </style:tab-stops>
      </style:paragraph-properties>
    </style:style>
    <style:style style:name="P80" style:family="paragraph" style:parent-style-name="Table_20_Contents">
      <loext:graphic-properties draw:fill="none"/>
      <style:paragraph-properties fo:margin-left="0in" fo:margin-right="0.1252in" fo:text-align="start" style:justify-single-word="false" fo:orphans="2" fo:widows="2" fo:hyphenation-ladder-count="no-limit" fo:text-indent="0in" style:auto-text-indent="false" fo:background-color="transparent" text:number-lines="false" text:line-number="0" style:writing-mode="lr-tb">
        <style:tab-stops/>
      </style:paragraph-properties>
      <style:text-properties officeooo:rsid="00043884" officeooo:paragraph-rsid="00043884" fo:hyphenate="false" fo:hyphenation-remain-char-count="2" fo:hyphenation-push-char-count="2" loext:hyphenation-no-caps="false"/>
    </style:style>
    <style:style style:name="P81" style:family="paragraph" style:parent-style-name="Table_20_Contents">
      <style:paragraph-properties fo:text-align="center" style:justify-single-word="false"/>
      <style:text-properties officeooo:rsid="00043884" officeooo:paragraph-rsid="00043884"/>
    </style:style>
    <style:style style:name="P82" style:family="paragraph" style:parent-style-name="Table_20_Contents">
      <style:paragraph-properties fo:text-align="center" style:justify-single-word="false"/>
      <style:text-properties officeooo:rsid="00060f90" officeooo:paragraph-rsid="00060f90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text-properties fo:font-size="6pt" officeooo:rsid="0009fd1a" officeooo:paragraph-rsid="0009fd1a" style:font-size-asian="5.25pt" style:font-size-complex="6pt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11726" style:font-name-asian="Times New Roman" style:font-name-complex="Times New Roman"/>
    </style:style>
    <style:style style:name="T3" style:family="text">
      <style:text-properties style:font-name="Times New Roman" officeooo:rsid="00013be2" style:font-name-asian="Times New Roman" style:font-name-complex="Times New Roman"/>
    </style:style>
    <style:style style:name="T4" style:family="text">
      <style:text-properties style:font-name="Times New Roman" officeooo:rsid="0001652b" style:font-name-asian="Times New Roman" style:font-name-complex="Times New Roman"/>
    </style:style>
    <style:style style:name="T5" style:family="text">
      <style:text-properties style:font-name="Times New Roman" officeooo:rsid="00029216" style:font-name-asian="Times New Roman" style:font-name-complex="Times New Roman"/>
    </style:style>
    <style:style style:name="T6" style:family="text">
      <style:text-properties style:font-name="Times New Roman" officeooo:rsid="00060f90" style:font-name-asian="Times New Roman" style:font-name-complex="Times New Roman"/>
    </style:style>
    <style:style style:name="T7" style:family="text">
      <style:text-properties style:font-name="Times New Roman" officeooo:rsid="00081be6" style:font-name-asian="Times New Roman" style:font-name-complex="Times New Roman"/>
    </style:style>
    <style:style style:name="T8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9" style:family="text">
      <style:text-properties style:font-name="Times New Roman" fo:font-weight="bold" officeooo:rsid="0001652b" style:font-name-asian="Times New Roman" style:font-weight-asian="bold" style:font-name-complex="Times New Roman" style:font-weight-complex="bold"/>
    </style:style>
    <style:style style:name="T10" style:family="text"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1" style:family="text">
      <style:text-properties style:font-name="Times New Roman" fo:font-size="10pt" fo:font-weight="bold" officeooo:rsid="00060f90" style:font-name-asian="Times New Roman" style:font-size-asian="10pt" style:font-weight-asian="bold" style:font-name-complex="Times New Roman" style:font-size-complex="10pt" style:font-weight-complex="bold"/>
    </style:style>
    <style:style style:name="T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14" style:family="text">
      <style:text-properties style:font-name="Times New Roman" fo:font-size="8pt" officeooo:rsid="00060f90" style:font-name-asian="Times New Roman" style:font-size-asian="8pt" style:font-name-complex="Times New Roman" style:font-size-complex="8pt"/>
    </style:style>
    <style:style style:name="T15" style:family="text">
      <style:text-properties style:font-name="Times New Roman" fo:font-size="8pt" officeooo:rsid="0007ca97" style:font-name-asian="Times New Roman" style:font-size-asian="8pt" style:font-name-complex="Times New Roman" style:font-size-complex="8pt"/>
    </style:style>
    <style:style style:name="T16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Courier (W1)" fo:font-weight="bold" style:font-name-asian="Courier (W1)" style:font-weight-asian="bold" style:font-name-complex="Courier (W1)" style:font-weight-complex="bold"/>
    </style:style>
    <style:style style:name="T19" style:family="text">
      <style:text-properties style:text-position="super 58%" style:font-name="Times New Roman" fo:font-size="8pt" style:font-name-asian="Times New Roman" style:font-size-asian="8pt" style:font-name-complex="Times New Roman" style:font-size-complex="8pt"/>
    </style:style>
    <style:style style:name="T20" style:family="text">
      <style:text-properties style:text-position="super 58%"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T21" style:family="text">
      <style:text-properties style:text-position="super 58%" style:font-name="Times New Roman" fo:font-size="8pt" fo:font-weight="bold" officeooo:rsid="0007ca97" style:font-name-asian="Times New Roman" style:font-size-asian="8pt" style:font-weight-asian="bold" style:font-name-complex="Times New Roman" style:font-size-complex="8pt" style:font-weight-complex="bold"/>
    </style:style>
    <style:style style:name="T22" style:family="text">
      <style:text-properties officeooo:rsid="00013be2"/>
    </style:style>
    <style:style style:name="T23" style:family="text">
      <style:text-properties officeooo:rsid="0001652b"/>
    </style:style>
    <style:style style:name="T24" style:family="text">
      <style:text-properties officeooo:rsid="00029216"/>
    </style:style>
    <style:style style:name="T25" style:family="text">
      <style:text-properties officeooo:rsid="00060f90"/>
    </style:style>
    <style:style style:name="T26" style:family="text">
      <style:text-properties officeooo:rsid="0007ca97"/>
    </style:style>
    <style:style style:name="T27" style:family="text">
      <style:text-properties officeooo:rsid="00081be6"/>
    </style:style>
    <style:style style:name="T28" style:family="text">
      <style:text-properties officeooo:rsid="00096e63"/>
    </style:style>
    <style:style style:name="T29" style:family="text">
      <style:text-properties officeooo:rsid="0009fd1a"/>
    </style:style>
    <style:style style:name="Sect1" style:family="section">
      <style:section-properties style:writing-mode="lr-tb" style:editable="false">
        <style:columns fo:column-count="2">
          <style:column style:rel-width="7438*" fo:start-indent="0in" fo:end-indent="0.2189in"/>
          <style:column style:rel-width="2785*" fo:start-indent="0.2189in" fo:end-indent="0in"/>
        </style:columns>
        <text:notes-configuration text:note-class="footnote"/>
      </style:section-properties>
    </style:style>
    <style:style style:name="Sect2" style:family="section">
      <style:section-properties style:writing-mode="lr-tb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  <text:notes-configuration text:note-class="footnote"/>
      </style:section-properties>
    </style:style>
    <style:style style:name="Sect3" style:family="section">
      <style:section-properties style:writing-mode="lr-tb" style:editable="false">
        <style:columns fo:column-count="3" fo:column-gap="0.4in">
          <style:column style:rel-width="21845*" fo:start-indent="0in" fo:end-indent="0.2in"/>
          <style:column style:rel-width="21845*" fo:start-indent="0.2in" fo:end-indent="0.2in"/>
          <style:column style:rel-width="21845*" fo:start-indent="0.2in" fo:end-indent="0in"/>
        </style:columns>
        <text:notes-configuration text:note-class="footnote"/>
      </style:section-properties>
    </style:style>
    <style:style style:name="Sect4" style:family="section">
      <style:section-properties style:writing-mode="lr-tb" style:editable="false">
        <style:columns fo:column-count="2" fo:column-gap="0.15in">
          <style:column style:rel-width="32767*" fo:start-indent="0in" fo:end-indent="0.0748in"/>
          <style:column style:rel-width="32768*" fo:start-indent="0.0748in" fo:end-indent="0in"/>
        </style:columns>
        <text:notes-configuration text:note-class="footnote"/>
      </style:section-properties>
    </style:style>
    <style:style style:name="Sect5" style:family="section">
      <style:section-properties style:writing-mode="lr-tb" style:editable="false">
        <style:columns fo:column-count="2">
          <style:column style:rel-width="7095*" fo:start-indent="0in" fo:end-indent="0.1398in"/>
          <style:column style:rel-width="3129*" fo:start-indent="0.1398in" fo:end-indent="0in"/>
        </style:columns>
        <text:notes-configuration text:note-class="footnote"/>
      </style:section-properties>
    </style:style>
    <style:style style:name="Sect6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7" style:family="section">
      <style:section-properties style:writing-mode="lr-tb" style:editable="false">
        <style:columns fo:column-count="11" fo:column-gap="0.1598in">
          <style:column style:rel-width="5957*" fo:start-indent="0in" fo:end-indent="0.0799in"/>
          <style:column style:rel-width="5957*" fo:start-indent="0.0799in" fo:end-indent="0.0799in"/>
          <style:column style:rel-width="5957*" fo:start-indent="0.0799in" fo:end-indent="0.0799in"/>
          <style:column style:rel-width="5957*" fo:start-indent="0.0799in" fo:end-indent="0.0799in"/>
          <style:column style:rel-width="5957*" fo:start-indent="0.0799in" fo:end-indent="0.0799in"/>
          <style:column style:rel-width="5957*" fo:start-indent="0.0799in" fo:end-indent="0.0799in"/>
          <style:column style:rel-width="5957*" fo:start-indent="0.0799in" fo:end-indent="0.0799in"/>
          <style:column style:rel-width="5957*" fo:start-indent="0.0799in" fo:end-indent="0.0799in"/>
          <style:column style:rel-width="5957*" fo:start-indent="0.0799in" fo:end-indent="0.0799in"/>
          <style:column style:rel-width="5957*" fo:start-indent="0.0799in" fo:end-indent="0.0799in"/>
          <style:column style:rel-width="5965*" fo:start-indent="0.0799in" fo:end-indent="0in"/>
        </style:columns>
        <text:notes-configuration text:note-class="footnote"/>
      </style:section-properties>
    </style:style>
    <style:style style:name="Sect8" style:family="section">
      <style:section-properties style:writing-mode="lr-tb" style:editable="false">
        <style:columns fo:column-count="3" fo:column-gap="0.1138in">
          <style:column style:rel-width="21845*" fo:start-indent="0in" fo:end-indent="0.0567in"/>
          <style:column style:rel-width="21845*" fo:start-indent="0.0567in" fo:end-indent="0.0567in"/>
          <style:column style:rel-width="21845*" fo:start-indent="0.0567in" fo:end-indent="0in"/>
        </style:columns>
        <text:notes-configuration text:note-class="footnote"/>
      </style:section-properties>
    </style:style>
    <style:style style:name="Sect9" style:family="section">
      <style:section-properties style:writing-mode="lr-tb" style:editable="false">
        <style:columns fo:column-count="2" fo:column-gap="0.2752in">
          <style:column style:rel-width="32767*" fo:start-indent="0in" fo:end-indent="0.1374in"/>
          <style:column style:rel-width="32768*" fo:start-indent="0.1374in" fo:end-indent="0in"/>
        </style:columns>
        <text:notes-configuration text:note-class="footnote"/>
      </style:section-properties>
    </style:style>
    <style:style style:name="Sect10" style:family="section">
      <style:section-properties style:writing-mode="lr-tb" style:editable="false">
        <style:columns fo:column-count="3">
          <style:column-sep style:width="0.0008in" style:color="#000000" style:height="100%" style:style="none"/>
          <style:column style:rel-width="2726*" fo:start-indent="0in" fo:end-indent="0.1252in"/>
          <style:column style:rel-width="3834*" fo:start-indent="0.1252in" fo:end-indent="0.1252in"/>
          <style:column style:rel-width="3663*" fo:start-indent="0.1252in" fo:end-indent="0in"/>
        </style:columns>
        <text:notes-configuration text:note-class="footnote"/>
      </style:section-properties>
    </style:style>
    <style:style style:name="Sect11" style:family="section">
      <style:section-properties style:writing-mode="lr-tb" style:editable="false">
        <style:columns fo:column-count="2">
          <style:column style:rel-width="5921*" fo:start-indent="0in" fo:end-indent="0.3437in"/>
          <style:column style:rel-width="4302*" fo:start-indent="0.3437in" fo:end-indent="0in"/>
        </style:columns>
        <text:notes-configuration text:note-class="footnote"/>
      </style:section-properties>
    </style:style>
    <style:style style:name="Sect1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v: XXVII<text:span text:style-name="T22">I</text:span> <text:s text:c="11"/>Name:____________________________ <text:s/>Date____-____-____</text:p>
      <text:section text:style-name="Sect1" text:name="Section1">
        <text:p text:style-name="P28">Guise_______________________________ <text:s/><text:span text:style-name="T22"><text:s text:c="2"/></text:span><text:s text:c="2"/>Mv___" <text:span text:style-name="T22"><text:s/></text:span><text:s text:c="2"/><text:span text:style-name="T22"><text:s/></text:span><text:s/>Sight_______ <text:s/><text:span text:style-name="T22"><text:s text:c="2"/></text:span><text:s/><text:span text:style-name="T22"><text:s/><text:tab/></text:span>Handed_______</text:p>
        <text:p text:style-name="P28">Ht_____'_____" <text:s/>Wt____ lbs. <text:s/>Age _____ -____ (max_____) <text:s/>Hair________ <text:s/><text:span text:style-name="T22"><text:tab/></text:span>Eyes_________</text:p>
        <text:p text:style-name="P28">Race_______________ <text:s text:c="4"/>Class &amp; Level _________________________________ <text:span text:style-name="T22"><text:tab/></text:span>_________</text:p>
        <text:p text:style-name="P28">Alignment___________ Luck____ Will_____ Surprise___/10 Surprised___/10</text:p>
        <text:p text:style-name="P28"/>
        <text:p text:style-name="P57"><text:span text:style-name="T18">STR</text:span><text:span text:style-name="T8">____</text:span><text:span text:style-name="T1"> ____% <text:s text:c="2"/>hit___ <text:s/>dmg___ </text:span><text:span text:style-name="T3"><text:s text:c="5"/></text:span><text:span text:style-name="T1"><text:s/>open doors___ (___)/20</text:span><text:span text:style-name="T3"> <text:s text:c="5"/></text:span><text:span text:style-name="T1"><text:s text:c="2"/></text:span><text:span text:style-name="T3">b</text:span><text:span text:style-name="T1">end </text:span><text:span text:style-name="T3">b</text:span><text:span text:style-name="T1">ars, </text:span><text:span text:style-name="T3">l</text:span><text:span text:style-name="T1">ift </text:span><text:span text:style-name="T3"><text:tab/>g</text:span><text:span text:style-name="T1">ates%____</text:span></text:p>
        <text:p text:style-name="P57"><text:span text:style-name="T18">DEX</text:span><text:span text:style-name="T8">____ </text:span><text:span text:style-name="T1">reaction adjustment___ <text:s/></text:span><text:span text:style-name="T3"><text:s text:c="6"/></text:span><text:span text:style-name="T1"><text:s text:c="2"/>missile attack adjustment___ </text:span><text:span text:style-name="T3"><text:s/></text:span><text:span text:style-name="T1"><text:s/></text:span><text:span text:style-name="T3"><text:s text:c="5"/></text:span><text:span text:style-name="T1"><text:s text:c="2"/>AC </text:span><text:span text:style-name="T3"><text:tab/></text:span><text:span text:style-name="T1">adjustment____</text:span></text:p>
        <text:p text:style-name="P57"><text:span text:style-name="T18">CON</text:span><text:span text:style-name="T8">____ </text:span><text:span text:style-name="T1">hit point bonus___ </text:span><text:span text:style-name="T3"><text:s/></text:span><text:span text:style-name="T1"><text:s text:c="2"/>system shock%____ <text:s/></text:span><text:span text:style-name="T3"><text:s/></text:span><text:span text:style-name="T1"><text:s/>resurrection survival%____ </text:span><text:span text:style-name="T3"><text:s text:c="2"/></text:span><text:span text:style-name="T1"><text:s text:c="2"/></text:span><text:span text:style-name="T3"><text:tab/>p</text:span><text:span text:style-name="T1">oison___</text:span></text:p>
        <text:p text:style-name="P57"><text:span text:style-name="T18">INT</text:span><text:span text:style-name="T8">____ </text:span><text:span text:style-name="T1">number of</text:span><text:span text:style-name="T8"> </text:span><text:span text:style-name="T1">language</text:span><text:span text:style-name="T3">s</text:span><text:span text:style-name="T1">___ <text:s/></text:span><text:span text:style-name="T3"><text:s text:c="2"/></text:span><text:span text:style-name="T1"><text:s/>spell level___</text:span><text:span text:style-name="T3"> </text:span><text:span text:style-name="T1"><text:s/></text:span><text:span text:style-name="T3"><text:s/></text:span><text:span text:style-name="T1"><text:s text:c="2"/>learn spell%____ </text:span><text:span text:style-name="T3"><text:s/></text:span><text:span text:style-name="T1"><text:s/></text:span><text:span text:style-name="T3"><text:s text:c="2"/></text:span><text:span text:style-name="T1"><text:s/></text:span><text:span text:style-name="T3"><text:tab/></text:span><text:span text:style-name="T1">max</text:span><text:span text:style-name="T3">#</text:span><text:span text:style-name="T1"> per level___</text:span></text:p>
        <text:p text:style-name="P57"><text:span text:style-name="T18">WIS</text:span><text:span text:style-name="T8">____</text:span><text:span text:style-name="T1"> magical defense adjustment___</text:span><text:span text:style-name="T3"> </text:span><text:span text:style-name="T1"><text:s text:c="2"/></text:span><text:span text:style-name="T3"><text:s text:c="3"/></text:span><text:span text:style-name="T1"><text:s text:c="2"/>bonus spells __ __ __ __ </text:span><text:span text:style-name="T3"><text:s/></text:span><text:span text:style-name="T1"><text:s/></text:span><text:span text:style-name="T3"><text:s text:c="3"/></text:span><text:span text:style-name="T1"><text:s text:c="2"/></text:span><text:span text:style-name="T3"><text:tab/></text:span><text:span text:style-name="T1">spell failure%____</text:span></text:p>
        <text:p text:style-name="P57"><text:span text:style-name="T18">CHR</text:span><text:span text:style-name="T8">____</text:span><text:span text:style-name="T1"> maximum number of henchmen____ <text:s text:c="4"/>loyalty base____ <text:s text:c="3"/></text:span><text:span text:style-name="T3"><text:tab/></text:span><text:span text:style-name="T1">reaction adjustment____</text:span></text:p>
        <text:p text:style-name="P76"><text:span text:style-name="T1"/></text:p>
        <text:p text:style-name="P71"><text:span text:style-name="T8">(_____)Normal Armor Class <text:s text:c="3"/></text:span><text:span text:style-name="T1"><text:s text:c="3"/>(____)Rear AC <text:s text:c="4"/></text:span><text:span text:style-name="T3"><text:tab/></text:span><text:span text:style-name="T1">(_____) __________________________</text:span></text:p>
        <text:p text:style-name="P71"><text:span text:style-name="T1">(_____) ________________________ <text:s text:c="2"/>(_____) _________________________ <text:s/></text:span><text:span text:style-name="T3"><text:tab/></text:span><text:span text:style-name="T1">Weight ____</text:span></text:p>
        <text:p text:style-name="P71"><text:span text:style-name="T1">(___)Slash <text:s/>(___)Pierce <text:s/>(___)Blunt <text:s text:c="3"/></text:span><text:span text:style-name="T3"><text:tab/></text:span><text:span text:style-name="T1">Armor Worn __________________________________</text:span></text:p>
        <text:p text:style-name="P73"><text:span text:style-name="T1">** </text:span><text:span text:style-name="T8">SAVING THROWS </text:span><text:span text:style-name="T1">**</text:span></text:p>
        <text:p text:style-name="P74"><text:span text:style-name="T1">___</text:span><text:span text:style-name="T3"><text:tab/></text:span><text:span text:style-name="T1">______________________</text:span></text:p>
        <text:p text:style-name="P75"><text:span text:style-name="T1">___</text:span><text:span text:style-name="T3"><text:tab/></text:span><text:span text:style-name="T1">______________________</text:span></text:p>
        <text:p text:style-name="P75"><text:span text:style-name="T1">___</text:span><text:span text:style-name="T3"><text:tab/></text:span><text:span text:style-name="T1">______________________</text:span></text:p>
        <text:p text:style-name="P75"><text:span text:style-name="T1">___</text:span><text:span text:style-name="T3"><text:tab/></text:span><text:span text:style-name="T1">______________________</text:span></text:p>
        <text:p text:style-name="P75"><text:span text:style-name="T1">___</text:span><text:span text:style-name="T3"><text:tab/></text:span><text:span text:style-name="T1">______________________</text:span></text:p>
        <text:p text:style-name="P75"><text:span text:style-name="T1">Paralyzation, Poison<text:tab/>_____</text:span></text:p>
        <text:p text:style-name="P75"><text:span text:style-name="T1">Petrification, Polymorph<text:tab/>_____</text:span></text:p>
        <text:p text:style-name="P75"><text:span text:style-name="T1">Rod, Staff or Wand<text:tab/>_____</text:span></text:p>
        <text:p text:style-name="P75"><text:span text:style-name="T1">Breath Weapon<text:tab/>_____</text:span></text:p>
        <text:p text:style-name="P75"><text:span text:style-name="T1">Spells<text:tab/>_____</text:span></text:p>
        <text:p text:style-name="P72"><text:span text:style-name="T1"/></text:p>
      </text:section>
      <text:section text:style-name="Sect2" text:name="Section2">
        <text:p text:style-name="P58"><text:span text:style-name="T8">(_____)Hit Points</text:span><text:span text:style-name="T9"><text:tab/></text:span><text:span text:style-name="T1">Hit Die Type d____ d____ d____</text:span></text:p>
        <text:p text:style-name="P58"><text:span text:style-name="T1">Hit points gained:</text:span><text:span text:style-name="T4"><text:tab/></text:span><text:span text:style-name="T1">__ __ __ __ __ __ __ __ __ __ __ __ __ __</text:span></text:p>
        <text:p text:style-name="P58"><text:span text:style-name="T1">Scars</text:span><text:span text:style-name="T4"><text:tab/>__</text:span><text:span text:style-name="T1">____________________________________________</text:span></text:p>
        <text:p text:style-name="P56"><text:span text:style-name="T1"/></text:p>
        <text:p text:style-name="P59"><text:span text:style-name="T8">Psionics </text:span><text:span text:style-name="T1">(____) <text:s/>attack (____) <text:s/>defense (____)</text:span><text:span text:style-name="T3"><text:tab/></text:span><text:span text:style-name="T1">modes:_____</text:span><text:span text:style-name="T2">_</text:span><text:span text:style-name="T1">__<text:line-break/>major</text:span><text:span text:style-name="T3"><text:tab/></text:span><text:span text:style-name="T1">____________________________________________</text:span><text:span text:style-name="T2">___</text:span><text:span text:style-name="T1"><text:line-break/>minor</text:span><text:span text:style-name="T3"><text:tab/></text:span><text:span text:style-name="T1">____________________________________________</text:span><text:span text:style-name="T2">___</text:span><text:span text:style-name="T1"><text:line-break/></text:span></text:p>
      </text:section>
      <text:section text:style-name="Sect3" text:name="Section3">
        <text:p text:style-name="P55"/>
        <text:p text:style-name="P15">Non-Weapon Proficiencies:</text:p>
        <text:p text:style-name="P3">______________________ ____ -___<text:line-break/>______________________ ____ -___<text:line-break/>______________________ ____ -___<text:line-break/>______________________ ____ -___<text:line-break/>______________________ ____ -___<text:line-break/></text:p>
        <text:p text:style-name="P4"/>
        <text:p text:style-name="P3">Number ____ <text:s/><text:span text:style-name="T29"><text:s text:c="2"/></text:span><text:s/>gained 1/____<text:line-break/>______________________ ____ -___<text:line-break/>______________________ ____ -___<text:line-break/>______________________ ____ -___<text:line-break/>______________________ ____ -___<text:line-break/>______________________ ____ -___<text:line-break/></text:p>
        <text:p text:style-name="P4"/>
        <text:p text:style-name="P30">Skill<text:tab/>Ability<text:span text:style-name="T23"><text:tab/></text:span>Mod</text:p>
        <text:p text:style-name="P1"><text:span text:style-name="T1">______________________ ____ -___<text:line-break/>______________________ ____ -___<text:line-break/>______________________ ____ -___<text:line-break/>______________________ ____ -___<text:line-break/>______________________ ____ -___</text:span><text:span text:style-name="T8"><text:line-break/></text:span></text:p>
      </text:section>
      <text:section text:style-name="Sect4" text:name="Section4">
        <text:p text:style-name="P55"/>
        <text:p text:style-name="P15">Skills and Detections:</text:p>
        <text:p text:style-name="P37">______________________________________________________</text:p>
        <text:p text:style-name="P37">______________________________________________________</text:p>
        <text:p text:style-name="P37">______________________________________________________</text:p>
        <text:p text:style-name="P37"/>
        <text:p text:style-name="P3"/>
        <text:p text:style-name="P39"><text:span text:style-name="T24"><text:s/></text:span>______________________________________________________<text:span text:style-name="T24">_</text:span></text:p>
        <text:p text:style-name="P39"><text:span text:style-name="T24"><text:s/></text:span>______________________________________________________<text:span text:style-name="T24">_</text:span></text:p>
        <text:p text:style-name="P39"><text:span text:style-name="T24"><text:s/></text:span>______________________________________________________<text:span text:style-name="T24">_</text:span></text:p>
        <text:p text:style-name="P39"><text:span text:style-name="T24"><text:s/></text:span>______________________________________________________<text:span text:style-name="T24">_</text:span></text:p>
      </text:section>
      <text:section text:style-name="Sect5" text:name="Section5">
        <text:p text:style-name="P3"/>
        <text:p text:style-name="P61"><text:span text:style-name="T10">Weapons</text:span><text:span text:style-name="T12"> </text:span><text:span text:style-name="T1"><text:s text:c="2"/></text:span><text:span text:style-name="T5"><text:s/></text:span><text:span text:style-name="T1"><text:s text:c="2"/>proficient #____ <text:s/></text:span><text:span text:style-name="T5"><text:s text:c="6"/></text:span><text:span text:style-name="T1"><text:s/></text:span><text:span text:style-name="T5"><text:s/></text:span><text:span text:style-name="T1"><text:s/>gain 1/____ <text:s/></text:span><text:span text:style-name="T5"><text:s text:c="6"/></text:span><text:span text:style-name="T1"><text:s/></text:span><text:span text:style-name="T5"><text:s/></text:span><text:span text:style-name="T1"><text:s/>penalty-___</text:span><text:span text:style-name="T5"> <text:s text:c="9"/><text:tab/></text:span><text:span text:style-name="T1">#of attacks___/___</text:span></text:p>
        <text:p text:style-name="P61"><text:span text:style-name="T1">specialized in ______________________________</text:span><text:span text:style-name="T5"> <text:s text:c="2"/></text:span><text:span text:style-name="T1"><text:s/>hit+___ </text:span><text:span text:style-name="T5"><text:s text:c="2"/></text:span><text:span text:style-name="T1"><text:s/>dmg+___ </text:span><text:span text:style-name="T5"><text:s/></text:span><text:span text:style-name="T1"><text:s/></text:span><text:span text:style-name="T5"><text:tab/></text:span><text:span text:style-name="T1">#of attacks___/___</text:span></text:p>
        <text:p text:style-name="P61"><text:span text:style-name="T1">weapons used</text:span><text:span text:style-name="T5"> <text:tab/></text:span><text:span text:style-name="T1">________________________________________________________________</text:span></text:p>
        <text:p text:style-name="P60"><text:span text:style-name="T1"/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row>
            <table:table-cell table:style-name="Table1.A1" office:value-type="string">
              <text:p text:style-name="P80">weapon description</text:p>
            </table:table-cell>
            <table:table-cell table:style-name="Table1.A1" office:value-type="string">
              <text:p text:style-name="P81">+hit</text:p>
            </table:table-cell>
            <table:table-cell table:style-name="Table1.A1" office:value-type="string">
              <text:p text:style-name="P82">+dmg</text:p>
            </table:table-cell>
            <table:table-cell table:style-name="Table1.A1" office:value-type="string">
              <text:p text:style-name="P82">speed</text:p>
            </table:table-cell>
            <table:table-cell table:style-name="Table1.A1" table:number-columns-spanned="2" office:value-type="string">
              <text:p text:style-name="P82">length</text:p>
            </table:table-cell>
            <table:covered-table-cell/>
            <table:table-cell table:style-name="Table1.A1" table:number-columns-spanned="2" office:value-type="string">
              <text:p text:style-name="P82">type</text:p>
            </table:table-cell>
            <table:covered-table-cell/>
            <table:table-cell table:style-name="Table1.A1" office:value-type="string">
              <text:p text:style-name="P82">S &amp; M</text:p>
            </table:table-cell>
            <table:table-cell table:style-name="Table1.A1" office:value-type="string">
              <text:p text:style-name="P82">Large</text:p>
            </table:table-cell>
          </table:table-row>
          <table:table-row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table:number-columns-spanned="2" office:value-type="string">
              <text:p text:style-name="Table_20_Contents"/>
            </table:table-cell>
            <table:covered-table-cell/>
            <table:table-cell table:style-name="Table1.A2" table:number-columns-spanned="2" office:value-type="string">
              <text:p text:style-name="Table_20_Contents"/>
            </table:table-cell>
            <table:covered-table-cell/>
            <table:table-cell table:style-name="Table1.A2" office:value-type="string">
              <text:p text:style-name="Table_20_Contents"/>
            </table:table-cell>
            <table:table-cell table:style-name="Table1.J2" office:value-type="string">
              <text:p text:style-name="Table_20_Contents"/>
            </table:table-cell>
          </table:table-row>
          <table:table-row>
            <table:table-cell table:style-name="Table1.A3" office:value-type="string">
              <text:p text:style-name="Table_20_Contents"/>
            </table:table-cell>
            <table:table-cell table:style-name="Table1.A3" office:value-type="string">
              <text:p text:style-name="Table_20_Contents"/>
            </table:table-cell>
            <table:table-cell table:style-name="Table1.A3" office:value-type="string">
              <text:p text:style-name="Table_20_Contents"/>
            </table:table-cell>
            <table:table-cell table:style-name="Table1.A3" office:value-type="string">
              <text:p text:style-name="Table_20_Contents"/>
            </table:table-cell>
            <table:table-cell table:style-name="Table1.A3" table:number-columns-spanned="2" office:value-type="string">
              <text:p text:style-name="Table_20_Contents"/>
            </table:table-cell>
            <table:covered-table-cell/>
            <table:table-cell table:style-name="Table1.A3" table:number-columns-spanned="2" office:value-type="string">
              <text:p text:style-name="Table_20_Contents"/>
            </table:table-cell>
            <table:covered-table-cell/>
            <table:table-cell table:style-name="Table1.A3" office:value-type="string">
              <text:p text:style-name="Table_20_Contents"/>
            </table:table-cell>
            <table:table-cell table:style-name="Table1.J3" office:value-type="string">
              <text:p text:style-name="Table_20_Contents"/>
            </table:table-cell>
          </table:table-row>
          <table:table-row>
            <table:table-cell table:style-name="Table1.A3" office:value-type="string">
              <text:p text:style-name="Table_20_Contents"/>
            </table:table-cell>
            <table:table-cell table:style-name="Table1.A3" office:value-type="string">
              <text:p text:style-name="Table_20_Contents"/>
            </table:table-cell>
            <table:table-cell table:style-name="Table1.A3" office:value-type="string">
              <text:p text:style-name="Table_20_Contents"/>
            </table:table-cell>
            <table:table-cell table:style-name="Table1.A3" office:value-type="string">
              <text:p text:style-name="Table_20_Contents"/>
            </table:table-cell>
            <table:table-cell table:style-name="Table1.A3" table:number-columns-spanned="2" office:value-type="string">
              <text:p text:style-name="Table_20_Contents"/>
            </table:table-cell>
            <table:covered-table-cell/>
            <table:table-cell table:style-name="Table1.A3" table:number-columns-spanned="2" office:value-type="string">
              <text:p text:style-name="Table_20_Contents"/>
            </table:table-cell>
            <table:covered-table-cell/>
            <table:table-cell table:style-name="Table1.A3" office:value-type="string">
              <text:p text:style-name="Table_20_Contents"/>
            </table:table-cell>
            <table:table-cell table:style-name="Table1.J3" office:value-type="string">
              <text:p text:style-name="Table_20_Contents"/>
            </table:table-cell>
          </table:table-row>
          <table:table-row>
            <table:table-cell table:style-name="Table1.A3" office:value-type="string">
              <text:p text:style-name="Table_20_Contents"/>
            </table:table-cell>
            <table:table-cell table:style-name="Table1.A3" office:value-type="string">
              <text:p text:style-name="Table_20_Contents"/>
            </table:table-cell>
            <table:table-cell table:style-name="Table1.A3" office:value-type="string">
              <text:p text:style-name="Table_20_Contents"/>
            </table:table-cell>
            <table:table-cell table:style-name="Table1.A3" office:value-type="string">
              <text:p text:style-name="Table_20_Contents"/>
            </table:table-cell>
            <table:table-cell table:style-name="Table1.A3" table:number-columns-spanned="2" office:value-type="string">
              <text:p text:style-name="Table_20_Contents"/>
            </table:table-cell>
            <table:covered-table-cell/>
            <table:table-cell table:style-name="Table1.A3" table:number-columns-spanned="2" office:value-type="string">
              <text:p text:style-name="Table_20_Contents"/>
            </table:table-cell>
            <table:covered-table-cell/>
            <table:table-cell table:style-name="Table1.A3" office:value-type="string">
              <text:p text:style-name="Table_20_Contents"/>
            </table:table-cell>
            <table:table-cell table:style-name="Table1.J3" office:value-type="string">
              <text:p text:style-name="Table_20_Contents"/>
            </table:table-cell>
          </table:table-row>
          <table:table-row>
            <table:table-cell table:style-name="Table1.A3" office:value-type="string">
              <text:p text:style-name="Table_20_Contents"/>
            </table:table-cell>
            <table:table-cell table:style-name="Table1.A3" office:value-type="string">
              <text:p text:style-name="Table_20_Contents"/>
            </table:table-cell>
            <table:table-cell table:style-name="Table1.A3" office:value-type="string">
              <text:p text:style-name="Table_20_Contents"/>
            </table:table-cell>
            <table:table-cell table:style-name="Table1.A3" office:value-type="string">
              <text:p text:style-name="Table_20_Contents"/>
            </table:table-cell>
            <table:table-cell table:style-name="Table1.A3" table:number-columns-spanned="2" office:value-type="string">
              <text:p text:style-name="Table_20_Contents"/>
            </table:table-cell>
            <table:covered-table-cell/>
            <table:table-cell table:style-name="Table1.A3" table:number-columns-spanned="2" office:value-type="string">
              <text:p text:style-name="Table_20_Contents"/>
            </table:table-cell>
            <table:covered-table-cell/>
            <table:table-cell table:style-name="Table1.A3" office:value-type="string">
              <text:p text:style-name="Table_20_Contents"/>
            </table:table-cell>
            <table:table-cell table:style-name="Table1.J3" office:value-type="string">
              <text:p text:style-name="Table_20_Contents"/>
            </table:table-cell>
          </table:table-row>
          <table:table-row>
            <table:table-cell table:style-name="Table1.A3" office:value-type="string">
              <text:p text:style-name="Table_20_Contents"/>
            </table:table-cell>
            <table:table-cell table:style-name="Table1.A3" office:value-type="string">
              <text:p text:style-name="Table_20_Contents"/>
            </table:table-cell>
            <table:table-cell table:style-name="Table1.A3" office:value-type="string">
              <text:p text:style-name="Table_20_Contents"/>
            </table:table-cell>
            <table:table-cell table:style-name="Table1.A3" office:value-type="string">
              <text:p text:style-name="Table_20_Contents"/>
            </table:table-cell>
            <table:table-cell table:style-name="Table1.A3" table:number-columns-spanned="2" office:value-type="string">
              <text:p text:style-name="Table_20_Contents"/>
            </table:table-cell>
            <table:covered-table-cell/>
            <table:table-cell table:style-name="Table1.A3" table:number-columns-spanned="2" office:value-type="string">
              <text:p text:style-name="Table_20_Contents"/>
            </table:table-cell>
            <table:covered-table-cell/>
            <table:table-cell table:style-name="Table1.A3" office:value-type="string">
              <text:p text:style-name="Table_20_Contents"/>
            </table:table-cell>
            <table:table-cell table:style-name="Table1.J3" office:value-type="string">
              <text:p text:style-name="Table_20_Contents"/>
            </table:table-cell>
          </table:table-row>
          <table:table-row>
            <table:table-cell table:style-name="Table1.A3" office:value-type="string">
              <text:p text:style-name="Table_20_Contents"/>
            </table:table-cell>
            <table:table-cell table:style-name="Table1.A3" office:value-type="string">
              <text:p text:style-name="Table_20_Contents"/>
            </table:table-cell>
            <table:table-cell table:style-name="Table1.A3" office:value-type="string">
              <text:p text:style-name="Table_20_Contents"/>
            </table:table-cell>
            <table:table-cell table:style-name="Table1.A3" office:value-type="string">
              <text:p text:style-name="Table_20_Contents"/>
            </table:table-cell>
            <table:table-cell table:style-name="Table1.A3" table:number-columns-spanned="2" office:value-type="string">
              <text:p text:style-name="Table_20_Contents"/>
            </table:table-cell>
            <table:covered-table-cell/>
            <table:table-cell table:style-name="Table1.A3" table:number-columns-spanned="2" office:value-type="string">
              <text:p text:style-name="Table_20_Contents"/>
            </table:table-cell>
            <table:covered-table-cell/>
            <table:table-cell table:style-name="Table1.A3" office:value-type="string">
              <text:p text:style-name="Table_20_Contents"/>
            </table:table-cell>
            <table:table-cell table:style-name="Table1.J3" office:value-type="string">
              <text:p text:style-name="Table_20_Contents"/>
            </table:table-cell>
          </table:table-row>
          <table:table-row>
            <table:table-cell table:style-name="Table1.A3" office:value-type="string">
              <text:p text:style-name="Table_20_Contents"/>
            </table:table-cell>
            <table:table-cell table:style-name="Table1.A3" office:value-type="string">
              <text:p text:style-name="Table_20_Contents"/>
            </table:table-cell>
            <table:table-cell table:style-name="Table1.A3" office:value-type="string">
              <text:p text:style-name="Table_20_Contents"/>
            </table:table-cell>
            <table:table-cell table:style-name="Table1.A3" office:value-type="string">
              <text:p text:style-name="Table_20_Contents"/>
            </table:table-cell>
            <table:table-cell table:style-name="Table1.A3" office:value-type="string">
              <text:p text:style-name="P84">s</text:p>
            </table:table-cell>
            <table:table-cell table:style-name="Table1.A3" table:number-columns-spanned="2" office:value-type="string">
              <text:p text:style-name="P84">m</text:p>
            </table:table-cell>
            <table:covered-table-cell/>
            <table:table-cell table:style-name="Table1.A3" office:value-type="string">
              <text:p text:style-name="P84">l</text:p>
            </table:table-cell>
            <table:table-cell table:style-name="Table1.A3" office:value-type="string">
              <text:p text:style-name="Table_20_Contents"/>
            </table:table-cell>
            <table:table-cell table:style-name="Table1.J3" office:value-type="string">
              <text:p text:style-name="Table_20_Contents"/>
            </table:table-cell>
          </table:table-row>
        </table:table>
        <text:p text:style-name="P50"/>
        <text:p text:style-name="P25"/>
        <text:p text:style-name="P9">Familiar</text:p>
        <text:p text:style-name="P34">"______________________________"</text:p>
        <text:p text:style-name="P35">____hp<text:span text:style-name="T24"><text:tab/></text:span>_________________________</text:p>
        <text:p text:style-name="P34">________________________________</text:p>
        <text:p text:style-name="P34">________________________________</text:p>
        <text:p text:style-name="P34">________________________________</text:p>
        <text:p text:style-name="P33"/>
        <text:p text:style-name="P5"/>
        <text:p text:style-name="P5"/>
        <text:p text:style-name="P31">missiles<text:span text:style-name="T23"><text:tab/></text:span>#of</text:p>
        <text:p text:style-name="P36">___________________________ ___</text:p>
        <text:p text:style-name="P31">___________________________ ___</text:p>
        <text:p text:style-name="P31">___________________________ ___</text:p>
        <text:p text:style-name="P31">___________________________ ___</text:p>
        <text:p text:style-name="P31">___________________________ ___</text:p>
        <text:p text:style-name="P31"/>
      </text:section>
      <text:section text:style-name="Sect6" text:name="Section6">
        <text:p text:style-name="P40">**Special Weapon<text:span text:style-name="T25">**</text:span> "________________________"<text:span text:style-name="T25"><text:tab/></text:span>_____________<text:span text:style-name="T24">______</text:span>________________________________________________</text:p>
        <text:p text:style-name="P40">_____________________________________________________<text:span text:style-name="T28"><text:tab/></text:span>_<text:span text:style-name="T25">_</text:span>______________________________________________<text:span text:style-name="T25">_</text:span>___________</text:p>
        <text:p text:style-name="P40"/>
        <text:p text:style-name="P62"><text:span text:style-name="T10">Clerical Turning</text:span><text:span text:style-name="T11"> <text:s text:c="63"/></text:span><text:span text:style-name="T1">Spells Castable per level: <text:tab/>1____ 2____ 3____ 4____ 5____ 6____ 7____</text:span></text:p>
        <text:p text:style-name="P78"><text:span text:style-name="T13">skeleton___</text:span><text:span text:style-name="T14"> <text:s text:c="2"/></text:span><text:span text:style-name="T13"><text:s/>zombie___</text:span><text:span text:style-name="T14"> <text:s text:c="2"/></text:span><text:span text:style-name="T13"><text:s/>g</text:span><text:span text:style-name="T14">h</text:span><text:span text:style-name="T13">oul___</text:span><text:span text:style-name="T14"> <text:s text:c="2"/></text:span><text:span text:style-name="T13"><text:s/>shadow___ </text:span><text:span text:style-name="T14"><text:s text:c="2"/></text:span><text:span text:style-name="T13">wight___ </text:span><text:span text:style-name="T14"><text:s text:c="2"/></text:span><text:span text:style-name="T13">g</text:span><text:span text:style-name="T14">h</text:span><text:span text:style-name="T13">ast___ </text:span><text:span text:style-name="T14"><text:s text:c="2"/></text:span><text:span text:style-name="T13">wraith___ </text:span><text:span text:style-name="T14"><text:s text:c="2"/></text:span><text:span text:style-name="T13">mummy___ </text:span><text:span text:style-name="T14"><text:s text:c="2"/></text:span><text:span text:style-name="T13">spectre___</text:span><text:span text:style-name="T14"> <text:s/></text:span><text:span text:style-name="T13"><text:s/>vampire___</text:span><text:span text:style-name="T14"> <text:s/></text:span><text:span text:style-name="T13"><text:s/>ghost___ </text:span><text:span text:style-name="T14"><text:s text:c="2"/></text:span><text:span text:style-name="T13">lich___ </text:span><text:span text:style-name="T14"><text:s text:c="2"/><text:tab/></text:span><text:span text:style-name="T13">special___</text:span></text:p>
        <text:p text:style-name="P63"><text:span text:style-name="T13"/></text:p>
        <text:p text:style-name="P24"><text:span text:style-name="T10">Percentage Ability</text:span><text:span text:style-name="T8"><text:tab/></text:span><text:span text:style-name="T13">Base Ability Score % <text:s text:c="2"/>Armor Modifier</text:span></text:p>
      </text:section>
      <text:section text:style-name="Sect7" text:name="Section7">
        <text:p text:style-name="P18">___% ___</text:p>
        <text:p text:style-name="P18">pick pockets</text:p>
        <text:p text:style-name="P19">___% ___</text:p>
        <text:p text:style-name="P18">open locks</text:p>
        <text:p text:style-name="P19">___% ___</text:p>
        <text:p text:style-name="P18">fnd and remove</text:p>
        <text:p text:style-name="P18">traps</text:p>
        <text:p text:style-name="P19">___% ___</text:p>
        <text:p text:style-name="P18">move silently</text:p>
        <text:p text:style-name="P19">___% ___</text:p>
        <text:p text:style-name="P18">hide in shadows</text:p>
        <text:p text:style-name="P19">___% ___</text:p>
        <text:p text:style-name="P18">hear noise</text:p>
        <text:p text:style-name="P19">___% ___</text:p>
        <text:p text:style-name="P18">climb walls</text:p>
        <text:p text:style-name="P19">___% ___</text:p>
        <text:p text:style-name="P18">read languages</text:p>
        <text:p text:style-name="P19">___% ___</text:p>
        <text:p text:style-name="P18">item knowledge</text:p>
        <text:p text:style-name="P19">___% ___</text:p>
        <text:p text:style-name="P9">_______</text:p>
        <text:p text:style-name="P9">_______</text:p>
        <text:p text:style-name="P19">___% ___</text:p>
        <text:p text:style-name="P9">_______</text:p>
        <text:p text:style-name="P9">_______</text:p>
      </text:section>
      <text:section text:style-name="Sect6" text:name="Section8">
        <text:p text:style-name="P10"/>
        <text:p text:style-name="P64"><text:span text:style-name="T10">Steed</text:span><text:span text:style-name="T12"> </text:span><text:span text:style-name="T1"><text:s/>type_________________</text:span><text:span text:style-name="T6">_____ <text:s/></text:span><text:span text:style-name="T1"><text:s/></text:span><text:span text:style-name="T6"><text:s/></text:span><text:span text:style-name="T1">"______________________" </text:span><text:span text:style-name="T6"><text:s text:c="2"/></text:span><text:span text:style-name="T1"><text:s/>HD________ </text:span><text:span text:style-name="T6"><text:s text:c="2"/></text:span><text:span text:style-name="T1"><text:s/>Hp_______ </text:span><text:span text:style-name="T6"><text:s text:c="2"/></text:span><text:span text:style-name="T1"><text:s/>AC_______ </text:span><text:span text:style-name="T6"><text:s/></text:span><text:span text:style-name="T1"><text:s/></text:span><text:span text:style-name="T6"><text:tab/></text:span><text:span text:style-name="T1">Move rate</text:span><text:span text:style-name="T6">____</text:span><text:span text:style-name="T1">_____"</text:span></text:p>
        <text:p text:style-name="P64"><text:span text:style-name="T13">#attacks</text:span><text:span text:style-name="T1">____ <text:s/></text:span><text:span text:style-name="T13">dmg</text:span><text:span text:style-name="T1">____________</text:span><text:span text:style-name="T6">__</text:span><text:span text:style-name="T1">_ </text:span><text:span text:style-name="T6"><text:s/></text:span><text:span text:style-name="T1"><text:s/></text:span><text:span text:style-name="T13">encumbrance_______ </text:span><text:span text:style-name="T15"><text:tab/></text:span><text:span text:style-name="T13">notes</text:span><text:span text:style-name="T1">_____________________________________________________________</text:span></text:p>
        <text:p text:style-name="P43"/>
      </text:section>
      <text:p text:style-name="P53">Belongings</text:p>
      <text:section text:style-name="Sect8" text:name="Section10">
        <text:p text:style-name="P11">Item <text:tab/>Where<text:tab/>Enc<text:line-break/>_____________________<text:tab/>_____<text:tab/>____<text:line-break/>_____________________<text:tab/>_____<text:tab/>____<text:line-break/>_____________________<text:tab/>_____<text:tab/>____<text:line-break/>_____________________<text:tab/>_____<text:tab/>____<text:line-break/>_____________________<text:tab/>_____<text:tab/>____<text:line-break/>_____________________<text:tab/>_____<text:tab/>____<text:line-break/>_____________________<text:tab/>_____<text:tab/>____<text:line-break/>_____________________<text:tab/>_____<text:tab/>____<text:line-break/>_____________________<text:tab/>_____<text:tab/>____<text:line-break/>_____________________<text:tab/>_____<text:tab/>____<text:line-break/>_____________________<text:tab/>_____<text:tab/>____<text:line-break/>_____________________<text:tab/>_____<text:tab/>____</text:p>
        <text:p text:style-name="P12">Item <text:tab/>Where<text:tab/>Enc<text:line-break/>_____________________<text:tab/>_____<text:tab/>____<text:line-break/>_____________________<text:tab/>_____<text:tab/>____<text:line-break/>_____________________<text:tab/>_____<text:tab/>____<text:line-break/>_____________________<text:tab/>_____<text:tab/>____<text:line-break/>_____________________<text:tab/>_____<text:tab/>____<text:line-break/>_____________________<text:tab/>_____<text:tab/>____<text:line-break/>_____________________<text:tab/>_____<text:tab/>____<text:line-break/>_____________________<text:tab/>_____<text:tab/>____<text:line-break/>_____________________<text:tab/>_____<text:tab/>____<text:line-break/>_____________________<text:tab/>_____<text:tab/>____<text:line-break/>_____________________<text:tab/>_____<text:tab/>____<text:line-break/>_____________________<text:tab/>_____<text:tab/>____</text:p>
        <text:p text:style-name="P13"/>
        <text:p text:style-name="P14">Containers</text:p>
        <text:p text:style-name="P48">____________________________________</text:p>
        <text:p text:style-name="P48">____________________________________</text:p>
        <text:p text:style-name="P48">____________________________________</text:p>
        <text:p text:style-name="P48">____________________________________</text:p>
        <text:p text:style-name="P48">____________________________________</text:p>
        <text:p text:style-name="P48">____________________________________</text:p>
        <text:p text:style-name="P48">____________________________________</text:p>
        <text:p text:style-name="P48">____________________________________</text:p>
        <text:p text:style-name="P21">Total Weight___________ <text:s text:c="6"/>_________</text:p>
      </text:section>
      <text:section text:style-name="Sect12" text:name="Section9">
        <text:p text:style-name="P21"/>
      </text:section>
      <text:section text:style-name="Sect6" text:name="Section11">
        <text:p text:style-name="P23"/>
        <text:p text:style-name="P16">Magic Items</text:p>
      </text:section>
      <text:section text:style-name="Sect9" text:name="Section12">
        <text:p text:style-name="P26">__________________________________<text:span text:style-name="T26">___</text:span> Charges____ ____</text:p>
        <text:p text:style-name="P26">__________________________ __________________________</text:p>
        <text:p text:style-name="P26">__________________________ __________________________</text:p>
        <text:p text:style-name="P26">__________________________ __________________________</text:p>
        <text:p text:style-name="P27">__________________________________<text:span text:style-name="T26">___</text:span> Charges____ ____</text:p>
        <text:p text:style-name="P26">__________________________ __________________________</text:p>
        <text:p text:style-name="P26">__________________________ __________________________</text:p>
        <text:p text:style-name="P26">__________________________ __________________________</text:p>
        <text:section text:style-name="Sect12" text:name="Section20">
          <text:p text:style-name="P26"/>
        </text:section>
      </text:section>
      <text:section text:style-name="Sect10" text:name="Section14">
        <text:p text:style-name="P79"><text:span text:style-name="T1">________________________________________________________________________________________________________________________________________________________________________________________________________________________________</text:span></text:p>
        <text:p text:style-name="P12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  <text:p text:style-name="P11"/>
        <text:p text:style-name="P12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/text:section>
      <text:section text:style-name="Sect6" text:name="Section15">
        <text:p text:style-name="P6"/>
        <text:p text:style-name="P45">Rings<text:span text:style-name="T26"><text:tab/></text:span>______________<text:span text:style-name="T26">_ <text:s text:c="2"/></text:span><text:s/>______________<text:span text:style-name="T26">__ <text:s text:c="2"/></text:span><text:s/>______________<text:span text:style-name="T26">__ <text:s text:c="2"/></text:span><text:s/>______________<text:span text:style-name="T26">__ <text:s text:c="2"/></text:span><text:s/>______________<text:span text:style-name="T26">__ <text:s text:c="2"/></text:span><text:s/><text:span text:style-name="T26"><text:tab/></text:span>______________<text:span text:style-name="T26">__</text:span></text:p>
        <text:p text:style-name="P45">Potions<text:span text:style-name="T26"><text:tab/>_______________ <text:s text:c="3"/>________________ <text:s text:c="3"/>________________ <text:s text:c="3"/>________________ <text:s text:c="3"/>________________ <text:s text:c="3"/><text:tab/>________________</text:span></text:p>
        <text:p text:style-name="P26"/>
        <text:p text:style-name="P6"/>
      </text:section>
      <text:section text:style-name="Sect11" text:name="Section16">
        <text:p text:style-name="P16">Money</text:p>
        <text:p text:style-name="P68"><text:span text:style-name="T16">______ </text:span><text:span text:style-name="T1">copper</text:span><text:span text:style-name="T8"> </text:span><text:span text:style-name="T19">500</text:span><text:span text:style-name="T20"><text:tab/></text:span>Treasure<text:span text:style-name="T27"><text:tab/></text:span>____<text:span text:style-name="T1">__ ______ ______ ______ ______</text:span></text:p>
        <text:p text:style-name="P66"><text:span text:style-name="T1">______ silver </text:span><text:span text:style-name="T19">50</text:span><text:span text:style-name="T1"><text:tab/>______ ______ ______ ______ ______</text:span><text:span text:style-name="T7"><text:tab/></text:span><text:span text:style-name="T1">______</text:span></text:p>
        <text:p text:style-name="P66"><text:span text:style-name="T1">______ electrum </text:span><text:span text:style-name="T19">10</text:span><text:span text:style-name="T1"><text:tab/>______ ______ ______ ______</text:span><text:span text:style-name="T7"><text:tab/></text:span><text:span text:style-name="T1">______ ______</text:span></text:p>
        <text:p text:style-name="P66"><text:span text:style-name="T1">______ gold </text:span><text:span text:style-name="T19">5</text:span><text:span text:style-name="T1"><text:tab/></text:span><text:span text:style-name="T7">_________</text:span><text:span text:style-name="T1">________________________</text:span><text:span text:style-name="T7">_</text:span><text:span text:style-name="T1">______</text:span></text:p>
        <text:p text:style-name="P67"><text:span text:style-name="T1">______ platinum </text:span><text:span text:style-name="T19">1</text:span><text:span text:style-name="T1"><text:tab/></text:span><text:span text:style-name="T7">_________</text:span><text:span text:style-name="T1">________________________</text:span><text:span text:style-name="T7">_</text:span><text:span text:style-name="T1">______</text:span></text:p>
        <text:p text:style-name="P65"><text:span text:style-name="T1"/></text:p>
        <text:p text:style-name="P49"><text:span text:style-name="T17">Experience</text:span></text:p>
        <text:p text:style-name="P22"><text:span text:style-name="T13">Next Level Goal</text:span><text:span text:style-name="T1"><text:tab/></text:span><text:span text:style-name="T13">Bonus Exp<text:tab/>Current Exp</text:span></text:p>
        <text:p text:style-name="P20">_____________<text:tab/>_____%<text:tab/>_________________<text:line-break/>_____________<text:tab/>_____%<text:tab/>_________________<text:line-break/>_____________<text:tab/>_____%<text:tab/>_________________<text:line-break/></text:p>
      </text:section>
      <text:section text:style-name="Sect12" text:name="Section13">
        <text:p text:style-name="P20"/>
      </text:section>
      <text:section text:style-name="Sect6" text:name="Section17">
        <text:p text:style-name="P17">Character Description</text:p>
        <text:p text:style-name="P41">Front Appearance <text:span text:style-name="T27"><text:tab/></text:span>_________________________________________________________________________________________________</text:p>
        <text:p text:style-name="P42">Rear<text:span text:style-name="T27"> a</text:span>ppearance <text:span text:style-name="T27"><text:tab/></text:span>________________________________________________________________________________________________</text:p>
        <text:p text:style-name="P41">Mannerisms<text:span text:style-name="T27"><text:tab/></text:span>___________________________________________________________________________________________________</text:p>
        <text:p text:style-name="P41">Father _____________________ <text:s text:c="2"/>Mother ______________________ <text:s/><text:span text:style-name="T27"><text:tab/></text:span>Siblings<text:span text:style-name="T27">_</text:span>________________________________________________</text:p>
        <text:p text:style-name="P41">Deity _________________________ <text:s/><text:span text:style-name="T27"><text:s/></text:span>Standing ________________________________ <text:span text:style-name="T27"><text:tab/></text:span>Tithe________________________________</text:p>
        <text:p text:style-name="P46"/>
        <text:p text:style-name="P54">Final Notes</text:p>
        <table:table table:name="Table2" table:style-name="Table2" table:template-name="Default Style">
          <table:table-column table:style-name="Table2.A"/>
          <table:table-row>
            <table:table-cell table:style-name="Table2.A1" office:value-type="string">
              <text:p text:style-name="P83"/>
            </table:table-cell>
          </table:table-row>
          <table:table-row>
            <table:table-cell table:style-name="Table2.A2" office:value-type="string">
              <text:p text:style-name="P83"/>
            </table:table-cell>
          </table:table-row>
          <table:table-row>
            <table:table-cell table:style-name="Table2.A2" office:value-type="string">
              <text:p text:style-name="P83"/>
            </table:table-cell>
          </table:table-row>
          <table:table-row>
            <table:table-cell table:style-name="Table2.A2" office:value-type="string">
              <text:p text:style-name="P83"/>
            </table:table-cell>
          </table:table-row>
        </table:table>
        <text:p text:style-name="P77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(W1)" svg:font-family="'Courier (W1)', 'Courier New'" style:font-family-generic="modern"/>
    <style:font-face style:name="Liberation Mono" svg:font-family="'Liberation Mono'" style:font-family-generic="syste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Mono" style:font-size-asian="10.5pt" style:language-asian="zh" style:country-asian="CN" style:font-name-complex="Liberation Mono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Liberation Mono" style:font-size-asian="10.5pt" style:language-asian="zh" style:country-asian="CN" style:font-name-complex="Liberation Mono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style:contextual-spacing="false" fo:line-height="0.25in" fo:text-indent="0.5in" style:auto-text-indent="false"/>
      <style:text-properties fo:font-size="12pt" style:font-size-asian="12pt" style:font-size-complex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3in" fo:margin-bottom="0.5in" fo:margin-left="0.9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in" fo:margin-bottom="0.5in" fo:margin-left="0.9in" fo:margin-right="0.375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3in" fo:margin-bottom="0.5in" fo:margin-left="0.5in" fo:margin-right="0.625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/>
    <style:master-page style:name="Convert_20_2" style:display-name="Convert 2" style:page-layout-name="Mpm1" draw:style-name="Mdp1"/>
    <style:master-page style:name="Convert_20_3" style:display-name="Convert 3" style:page-layout-name="Mpm1" draw:style-name="Mdp1"/>
    <style:master-page style:name="Convert_20_4" style:display-name="Convert 4" style:page-layout-name="Mpm3" draw:style-name="Mdp1"/>
    <style:master-page style:name="Convert_20_5" style:display-name="Convert 5" style:page-layout-name="Mpm1" draw:style-name="Mdp1"/>
    <style:master-page style:name="Convert_20_6" style:display-name="Convert 6" style:page-layout-name="Mpm3" draw:style-name="Mdp1"/>
    <style:master-page style:name="Convert_20_7" style:display-name="Convert 7" style:page-layout-name="Mpm1" draw:style-name="Mdp1"/>
    <style:master-page style:name="Convert_20_8" style:display-name="Convert 8" style:page-layout-name="Mpm3" draw:style-name="Mdp1"/>
    <style:master-page style:name="Convert_20_9" style:display-name="Convert 9" style:page-layout-name="Mpm4" draw:style-name="Mdp1"/>
    <style:master-page style:name="Convert_20_10" style:display-name="Convert 10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Guise____________________    Mv___"    Sight_______   Handed_______</dc:title>
    <meta:initial-creator>Wayne J Taylor</meta:initial-creator>
    <meta:creation-date>1996-03-25T01:57:00</meta:creation-date>
    <dc:date>2026-01-19T21:06:58.482000000</dc:date>
    <meta:print-date>1999-06-06T19:02:00</meta:print-date>
    <meta:editing-cycles>4</meta:editing-cycles>
    <meta:editing-duration>P23DT22H22M53S</meta:editing-duration>
    <meta:generator>LibreOffice/7.3.7.2$Windows_X86_64 LibreOffice_project/e114eadc50a9ff8d8c8a0567d6da8f454beeb84f</meta:generator>
    <meta:document-statistic meta:table-count="2" meta:image-count="0" meta:object-count="0" meta:page-count="2" meta:paragraph-count="143" meta:word-count="592" meta:character-count="8245" meta:non-whitespace-character-count="7430"/>
  </office:meta>
</office:document-meta>
</file>