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Bol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, Bol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fo:borde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558cm" fo:min-width="0.32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loext:graphic-properties draw:fill="none"/>
      <style:paragraph-properties fo:text-align="start"/>
      <style:text-properties fo:font-size="9.10000038146973pt" style:font-size-asian="9.10000038146973pt" style:font-size-complex="9.10000038146973pt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0" style:family="paragraph">
      <style:paragraph-properties fo:text-align="end"/>
      <style:text-properties style:text-line-through-style="none" style:text-line-through-type="none" fo:font-style="normal" style:text-underline-style="none"/>
    </style:style>
    <style:style style:name="P11" style:family="paragraph">
      <loext:graphic-properties draw:fill="none"/>
      <style:text-properties fo:font-size="5pt" style:font-size-asian="5pt" style:font-size-complex="5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Times New Roman" fo:font-size="9.10000038146973pt" fo:font-weight="normal" style:font-name-asian="Times New Roman" style:font-size-asian="9.10000038146973pt" style:font-weight-asian="normal" style:font-name-complex="Times New Roman" style:font-size-complex="9.10000038146973pt" style:font-weight-complex="normal"/>
    </style:style>
    <style:style style:name="T2" style:family="text">
      <style:text-properties fo:color="#000000" loext:opacity="100%" style:font-name="Courier New" fo:font-size="9.10000038146973pt" fo:font-weight="normal" style:font-name-asian="Courier New" style:font-size-asian="9.10000038146973pt" style:font-weight-asian="normal" style:font-name-complex="Courier New" style:font-size-complex="9.10000038146973pt" style:font-weight-complex="normal"/>
    </style:style>
    <style:style style:name="T3" style:family="text">
      <style:text-properties fo:color="#000000" loext:opacity="100%" style:font-name="Times New Roman1" fo:font-size="9.10000038146973pt" fo:font-weight="normal" style:font-name-asian="Times New Roman1" style:font-size-asian="9.10000038146973pt" style:font-weight-asian="normal" style:font-name-complex="Times New Roman1" style:font-size-complex="9.10000038146973pt" style:font-weight-complex="normal"/>
    </style:style>
    <style:style style:name="T4" style:family="text">
      <style:text-properties fo:color="#000000" loext:opacity="100%" style:font-name="Times New Roman1" fo:font-size="10.1000003814697pt" fo:font-weight="normal" style:font-name-asian="Times New Roman1" style:font-size-asian="10.1000003814697pt" style:font-weight-asian="normal" style:font-name-complex="Times New Roman1" style:font-size-complex="10.1000003814697pt" style:font-weight-complex="normal"/>
    </style:style>
    <style:style style:name="T5" style:family="text">
      <style:text-properties fo:color="#000000" loext:opacity="100%" style:font-name="Times New Roman" fo:font-size="6pt" fo:font-weight="normal" style:font-name-asian="Times New Roman" style:font-size-asian="6pt" style:font-weight-asian="normal" style:font-name-complex="Times New Roman" style:font-size-complex="6pt" style:font-weight-complex="normal"/>
    </style:style>
    <style:style style:name="T6" style:family="text">
      <style:text-properties fo:color="#000000" loext:opacity="100%" style:font-name="Times New Roman" fo:font-size="7.90000009536743pt" fo:font-weight="normal" style:font-name-asian="Times New Roman" style:font-size-asian="7.90000009536743pt" style:font-weight-asian="normal" style:font-name-complex="Times New Roman" style:font-size-complex="7.90000009536743pt" style:font-weight-complex="normal"/>
    </style:style>
    <style:style style:name="T7" style:family="text">
      <style:text-properties fo:color="#000000" loext:opacity="100%" style:font-name="Times New Roman" fo:font-size="5pt" fo:font-weight="normal" style:font-name-asian="Times New Roman" style:font-size-asian="5pt" style:font-weight-asian="normal" style:font-name-complex="Times New Roman" style:font-size-complex="5pt" style:font-weight-complex="normal"/>
    </style:style>
    <style:style style:name="T8" style:family="text">
      <style:text-properties fo:color="#000000" loext:opacity="100%" style:font-name="Times New Roman1" fo:font-size="5pt" fo:font-weight="normal" style:font-name-asian="Times New Roman1" style:font-size-asian="5pt" style:font-weight-asian="normal" style:font-name-complex="Times New Roman1" style:font-size-complex="5pt" style:font-weight-complex="normal"/>
    </style:style>
    <style:style style:name="T9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Player's Name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2" form:id="control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Guise" form:control-implementation="ooo:com.sun.star.form.component.TextField" xml:id="control3" form:id="control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Character's Name"/>
                <form:property form:property-name="ObjIDinMSO" office:value-type="float" office:value="65535"/>
              </form:properties>
            </form:text>
            <form:text form:name="Mv" form:control-implementation="ooo:com.sun.star.form.component.TextField" xml:id="control4" form:id="control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Movement Rate"/>
                <form:property form:property-name="ObjIDinMSO" office:value-type="float" office:value="65535"/>
              </form:properties>
            </form:text>
            <form:text form:name="Vision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Normal, Infravision, or Ultravision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Left, Right, or Ambidextrous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nded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0.67cm" svg:height="0.357cm" svg:x="2.286cm" svg:y="0.772cm">
          <draw:text-box>
            <text:p text:style-name="P1"><text:span text:style-name="T1">v: XXVIII <text:s text:c="11"/></text:span><text:span text:style-name="T1">Name:_______________</text:span><text:span text:style-name="T1">_____________ <text:s/></text:span><text:span text:style-name="T1">Date____-____-____ </text:span></text:p>
          </draw:text-box>
        </draw:frame>
        <draw:frame draw:style-name="gr1" draw:text-style-name="P2" draw:layer="layout" svg:width="9.988cm" svg:height="0.357cm" svg:x="2.286cm" svg:y="1.491cm">
          <draw:text-box>
            <text:p text:style-name="P1"><text:span text:style-name="T1">Guise_______________</text:span><text:span text:style-name="T1">________________ <text:s text:c="5"/></text:span><text:span text:style-name="T1">Mv___" <text:s text:c="3"/></text:span><text:span text:style-name="T1">Vision_________ </text:span></text:p>
          </draw:text-box>
        </draw:frame>
        <draw:frame draw:style-name="gr1" draw:text-style-name="P2" draw:layer="layout" svg:width="2.208cm" svg:height="0.357cm" svg:x="12.412cm" svg:y="1.491cm">
          <draw:text-box>
            <text:p text:style-name="P1"><text:span text:style-name="T1">Handed_______ </text:span></text:p>
          </draw:text-box>
        </draw:frame>
        <draw:frame draw:style-name="gr1" draw:text-style-name="P2" draw:layer="layout" svg:width="10.018cm" svg:height="0.357cm" svg:x="2.286cm" svg:y="1.855cm">
          <draw:text-box>
            <text:p text:style-name="P1"><text:span text:style-name="T1">Ht_____'_____" <text:s/></text:span><text:span text:style-name="T1">Wt____ lbs. <text:s/>Age _____ </text:span><text:span text:style-name="T1">-____ (max_____) <text:s/></text:span><text:span text:style-name="T1">Hair________ </text:span></text:p>
          </draw:text-box>
        </draw:frame>
        <draw:frame draw:style-name="gr1" draw:text-style-name="P2" draw:layer="layout" svg:width="2.153cm" svg:height="0.357cm" svg:x="12.463cm" svg:y="1.855cm">
          <draw:text-box>
            <text:p text:style-name="P1"><text:span text:style-name="T1">Eyes_________ </text:span></text:p>
          </draw:text-box>
        </draw:frame>
        <draw:control draw:style-name="gr2" draw:text-style-name="P3" draw:layer="controls" svg:width="4.392cm" svg:height="0.291cm" svg:x="5.516cm" svg:y="0.768cm" draw:control="control1"/>
        <draw:frame draw:style-name="gr1" draw:text-style-name="P2" draw:layer="layout" svg:width="10.767cm" svg:height="0.357cm" svg:x="2.286cm" svg:y="2.219cm">
          <draw:text-box>
            <text:p text:style-name="P1"><text:span text:style-name="T1">Race_______________ <text:s text:c="2"/></text:span><text:span text:style-name="T1"><text:s text:c="2"/>Class &amp; Level </text:span><text:span text:style-name="T1">____________________</text:span><text:span text:style-name="T1">_____________ </text:span></text:p>
          </draw:text-box>
        </draw:frame>
        <draw:frame draw:style-name="gr1" draw:text-style-name="P2" draw:layer="layout" svg:width="1.53cm" svg:height="0.357cm" svg:x="13.081cm" svg:y="2.219cm">
          <draw:text-box>
            <text:p text:style-name="P1"><text:span text:style-name="T1">_________ </text:span></text:p>
          </draw:text-box>
        </draw:frame>
        <draw:frame draw:style-name="gr1" draw:text-style-name="P2" draw:layer="layout" svg:width="6.712cm" svg:height="0.357cm" svg:x="2.286cm" svg:y="2.592cm">
          <draw:text-box>
            <text:p text:style-name="P1"><text:span text:style-name="T1">Alignment___________ <text:s/></text:span><text:span text:style-name="T1"><text:s text:c="3"/>Luck____ <text:s text:c="4"/></text:span><text:span text:style-name="T1">Will_____ </text:span></text:p>
          </draw:text-box>
        </draw:frame>
        <draw:frame draw:style-name="gr1" draw:text-style-name="P2" draw:layer="layout" svg:width="4.333cm" svg:height="0.357cm" svg:x="10.312cm" svg:y="2.592cm">
          <draw:text-box>
            <text:p text:style-name="P1"><text:span text:style-name="T1">Surprise___/10 <text:s/></text:span><text:span text:style-name="T1">Surprised___/10 </text:span></text:p>
          </draw:text-box>
        </draw:frame>
        <draw:frame draw:style-name="gr1" draw:text-style-name="P2" draw:layer="layout" svg:width="0.321cm" svg:height="0.357cm" svg:x="2.286cm" svg:y="2.9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78cm" svg:height="0.365cm" svg:x="2.286cm" svg:y="3.339cm">
          <draw:text-box>
            <text:p text:style-name="P1"><text:span text:style-name="T2">STR</text:span></text:p>
          </draw:text-box>
        </draw:frame>
        <draw:frame draw:style-name="gr1" draw:text-style-name="P2" draw:layer="layout" svg:width="7.652cm" svg:height="0.357cm" svg:x="2.862cm" svg:y="3.32cm">
          <draw:text-box>
            <text:p text:style-name="P1"><text:span text:style-name="T3">____ </text:span><text:span text:style-name="T1">____% <text:s text:c="2"/>hit___ <text:s/></text:span><text:span text:style-name="T1">dmg___ <text:s text:c="6"/>open </text:span><text:span text:style-name="T1">doors___ (___)/20 </text:span></text:p>
          </draw:text-box>
        </draw:frame>
        <draw:frame draw:style-name="gr1" draw:text-style-name="P2" draw:layer="layout" svg:width="3.511cm" svg:height="0.357cm" svg:x="11.125cm" svg:y="3.32cm">
          <draw:text-box>
            <text:p text:style-name="P1"><text:span text:style-name="T1">bend bars, lift gates</text:span><text:span text:style-name="T1">%____ </text:span></text:p>
          </draw:text-box>
        </draw:frame>
        <draw:frame draw:style-name="gr1" draw:text-style-name="P2" draw:layer="layout" svg:width="0.578cm" svg:height="0.365cm" svg:x="2.286cm" svg:y="3.728cm">
          <draw:text-box>
            <text:p text:style-name="P1"><text:span text:style-name="T2">DEX</text:span></text:p>
          </draw:text-box>
        </draw:frame>
        <draw:frame draw:style-name="gr1" draw:text-style-name="P2" draw:layer="layout" svg:width="8.434cm" svg:height="0.357cm" svg:x="2.862cm" svg:y="3.71cm">
          <draw:text-box>
            <text:p text:style-name="P1"><text:span text:style-name="T3">____ <text:s/></text:span><text:span text:style-name="T1">reaction </text:span><text:span text:style-name="T1">adjustment___ <text:s text:c="9"/></text:span><text:span text:style-name="T1">missile attack </text:span><text:span text:style-name="T1">adjustment___ </text:span></text:p>
          </draw:text-box>
        </draw:frame>
        <draw:frame draw:style-name="gr1" draw:text-style-name="P2" draw:layer="layout" svg:width="2.665cm" svg:height="0.357cm" svg:x="11.963cm" svg:y="3.71cm">
          <draw:text-box>
            <text:p text:style-name="P1"><text:span text:style-name="T1">AC adjustment____ </text:span></text:p>
          </draw:text-box>
        </draw:frame>
        <draw:frame draw:style-name="gr1" draw:text-style-name="P2" draw:layer="layout" svg:width="0.578cm" svg:height="0.365cm" svg:x="2.286cm" svg:y="4.118cm">
          <draw:text-box>
            <text:p text:style-name="P1"><text:span text:style-name="T2">CON</text:span></text:p>
          </draw:text-box>
        </draw:frame>
        <draw:frame draw:style-name="gr1" draw:text-style-name="P2" draw:layer="layout" svg:width="10.141cm" svg:height="0.357cm" svg:x="2.862cm" svg:y="4.099cm">
          <draw:text-box>
            <text:p text:style-name="P1"><text:span text:style-name="T3">____ <text:s/></text:span><text:span text:style-name="T1">hit point bonus___ </text:span><text:span text:style-name="T1"><text:s text:c="3"/>system shock%____ <text:s text:c="3"/></text:span><text:span text:style-name="T1">resurrection survival</text:span><text:span text:style-name="T1">%____ </text:span></text:p>
          </draw:text-box>
        </draw:frame>
        <draw:frame draw:style-name="gr1" draw:text-style-name="P2" draw:layer="layout" svg:width="1.42cm" svg:height="0.357cm" svg:x="13.191cm" svg:y="4.099cm">
          <draw:text-box>
            <text:p text:style-name="P1"><text:span text:style-name="T1">poison___ </text:span></text:p>
          </draw:text-box>
        </draw:frame>
        <draw:frame draw:style-name="gr1" draw:text-style-name="P2" draw:layer="layout" svg:width="0.578cm" svg:height="0.365cm" svg:x="2.286cm" svg:y="4.516cm">
          <draw:text-box>
            <text:p text:style-name="P1"><text:span text:style-name="T2">INT</text:span></text:p>
          </draw:text-box>
        </draw:frame>
        <draw:frame draw:style-name="gr1" draw:text-style-name="P2" draw:layer="layout" svg:width="8.909cm" svg:height="0.357cm" svg:x="2.862cm" svg:y="4.497cm">
          <draw:text-box>
            <text:p text:style-name="P1"><text:span text:style-name="T3">____ <text:s/></text:span><text:span text:style-name="T1">number of </text:span><text:span text:style-name="T1">languages___ <text:s text:c="4"/>spell </text:span><text:span text:style-name="T1">level___ <text:s text:c="4"/>learn spell</text:span><text:span text:style-name="T1">%____ </text:span></text:p>
          </draw:text-box>
        </draw:frame>
        <draw:frame draw:style-name="gr1" draw:text-style-name="P2" draw:layer="layout" svg:width="2.474cm" svg:height="0.357cm" svg:x="12.15cm" svg:y="4.497cm">
          <draw:text-box>
            <text:p text:style-name="P1"><text:span text:style-name="T1">max# per level___ </text:span></text:p>
          </draw:text-box>
        </draw:frame>
        <draw:frame draw:style-name="gr1" draw:text-style-name="P2" draw:layer="layout" svg:width="0.578cm" svg:height="0.365cm" svg:x="2.286cm" svg:y="4.905cm">
          <draw:text-box>
            <text:p text:style-name="P1"><text:span text:style-name="T2">WIS</text:span></text:p>
          </draw:text-box>
        </draw:frame>
        <draw:frame draw:style-name="gr1" draw:text-style-name="P2" draw:layer="layout" svg:width="8.773cm" svg:height="0.357cm" svg:x="2.862cm" svg:y="4.886cm">
          <draw:text-box>
            <text:p text:style-name="P1"><text:span text:style-name="T3">____ <text:s/></text:span><text:span text:style-name="T1">magical defense </text:span><text:span text:style-name="T1">adjustment___ <text:s text:c="7"/></text:span><text:span text:style-name="T1">bonus spells __ __ __ __ </text:span></text:p>
          </draw:text-box>
        </draw:frame>
        <draw:frame draw:style-name="gr1" draw:text-style-name="P2" draw:layer="layout" svg:width="2.521cm" svg:height="0.357cm" svg:x="12.107cm" svg:y="4.886cm">
          <draw:text-box>
            <text:p text:style-name="P1"><text:span text:style-name="T1">spell failure%____ </text:span></text:p>
          </draw:text-box>
        </draw:frame>
        <draw:frame draw:style-name="gr1" draw:text-style-name="P2" draw:layer="layout" svg:width="0.578cm" svg:height="0.365cm" svg:x="2.286cm" svg:y="5.295cm">
          <draw:text-box>
            <text:p text:style-name="P1"><text:span text:style-name="T2">CHR</text:span></text:p>
          </draw:text-box>
        </draw:frame>
        <draw:frame draw:style-name="gr1" draw:text-style-name="P2" draw:layer="layout" svg:width="8.24cm" svg:height="0.357cm" svg:x="2.862cm" svg:y="5.276cm">
          <draw:text-box>
            <text:p text:style-name="P1"><text:span text:style-name="T3">____ <text:s/></text:span><text:span text:style-name="T1">maximum number </text:span><text:span text:style-name="T1">of henchmen____ <text:s text:c="4"/></text:span><text:span text:style-name="T1">loyalty base____ </text:span></text:p>
          </draw:text-box>
        </draw:frame>
        <draw:frame draw:style-name="gr1" draw:text-style-name="P2" draw:layer="layout" svg:width="3.253cm" svg:height="0.357cm" svg:x="11.379cm" svg:y="5.276cm">
          <draw:text-box>
            <text:p text:style-name="P1"><text:span text:style-name="T1">reaction adjustment____ </text:span></text:p>
          </draw:text-box>
        </draw:frame>
        <draw:frame draw:style-name="gr1" draw:text-style-name="P2" draw:layer="layout" svg:width="0.321cm" svg:height="0.357cm" svg:x="8.568cm" svg:y="5.6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352cm" svg:height="0.357cm" svg:x="2.286cm" svg:y="6.038cm">
          <draw:text-box>
            <text:p text:style-name="P1"><text:span text:style-name="T3">(</text:span><text:span text:style-name="T3">_</text:span><text:span text:style-name="T3">_</text:span><text:span text:style-name="T3">_</text:span><text:span text:style-name="T3">_</text:span><text:span text:style-name="T3">_</text:span><text:span text:style-name="T3">)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A</text:span><text:span text:style-name="T3">r</text:span><text:span text:style-name="T3">m</text:span><text:span text:style-name="T3">o</text:span><text:span text:style-name="T3">r </text:span><text:span text:style-name="T3">C</text:span><text:span text:style-name="T3">l</text:span><text:span text:style-name="T3">a</text:span><text:span text:style-name="T3">s</text:span><text:span text:style-name="T3">s</text:span><text:span text:style-name="T3"> <text:s/></text:span><text:span text:style-name="T3"><text:s text:c="2"/></text:span><text:span text:style-name="T3"><text:s text:c="2"/></text:span><text:span text:style-name="T3"><text:s/></text:span><text:span text:style-name="T1">(</text:span><text:span text:style-name="T1">_</text:span><text:span text:style-name="T1">_</text:span><text:span text:style-name="T1">_</text:span><text:span text:style-name="T1">_</text:span><text:span text:style-name="T1">)</text:span><text:span text:style-name="T1">R</text:span><text:span text:style-name="T1">e</text:span><text:span text:style-name="T1">a</text:span><text:span text:style-name="T1">r </text:span><text:span text:style-name="T1">A</text:span><text:span text:style-name="T1">C</text:span><text:span text:style-name="T1"> </text:span></text:p>
          </draw:text-box>
        </draw:frame>
        <draw:frame draw:style-name="gr1" draw:text-style-name="P2" draw:layer="layout" svg:width="5.361cm" svg:height="0.357cm" svg:x="9.296cm" svg:y="6.038cm">
          <draw:text-box>
            <text:p text:style-name="P1"><text:span text:style-name="T1">(_____) __________________________ </text:span></text:p>
          </draw:text-box>
        </draw:frame>
        <draw:frame draw:style-name="gr1" draw:text-style-name="P2" draw:layer="layout" svg:width="10.403cm" svg:height="0.357cm" svg:x="2.286cm" svg:y="6.58cm">
          <draw:text-box>
            <text:p text:style-name="P1"><text:span text:style-name="T1">(_____) </text:span><text:span text:style-name="T1">________</text:span><text:span text:style-name="T1">________</text:span><text:span text:style-name="T1">________ <text:s/></text:span><text:span text:style-name="T1"><text:s/>(_____) </text:span><text:span text:style-name="T1">________</text:span><text:span text:style-name="T1">________</text:span><text:span text:style-name="T1">________</text:span><text:span text:style-name="T1">_ </text:span></text:p>
          </draw:text-box>
        </draw:frame>
        <draw:frame draw:style-name="gr1" draw:text-style-name="P2" draw:layer="layout" svg:width="1.75cm" svg:height="0.357cm" svg:x="12.861cm" svg:y="6.58cm">
          <draw:text-box>
            <text:p text:style-name="P1"><text:span text:style-name="T1">Weight ____ </text:span></text:p>
          </draw:text-box>
        </draw:frame>
        <draw:frame draw:style-name="gr1" draw:text-style-name="P2" draw:layer="layout" svg:width="4.709cm" svg:height="0.357cm" svg:x="2.286cm" svg:y="7.13cm">
          <draw:text-box>
            <text:p text:style-name="P1"><text:span text:style-name="T1">(___)Slash <text:s/>(___)Pierce <text:s/>(___)Blunt </text:span></text:p>
          </draw:text-box>
        </draw:frame>
        <draw:frame draw:style-name="gr1" draw:text-style-name="P2" draw:layer="layout" svg:width="7.3cm" svg:height="0.357cm" svg:x="7.391cm" svg:y="7.13cm">
          <draw:text-box>
            <text:p text:style-name="P1"><text:span text:style-name="T1">Armor Worn </text:span><text:span text:style-name="T1">__________</text:span><text:span text:style-name="T1">__________</text:span><text:span text:style-name="T1">__________</text:span><text:span text:style-name="T1">____ </text:span></text:p>
          </draw:text-box>
        </draw:frame>
        <draw:frame draw:style-name="gr1" draw:text-style-name="P2" draw:layer="layout" svg:width="3.541cm" svg:height="0.357cm" svg:x="16.366cm" svg:y="1.491cm">
          <draw:text-box>
            <text:p text:style-name="P1"><text:span text:style-name="T1">** </text:span><text:span text:style-name="T3">SAVING THROWS </text:span><text:span text:style-name="T1">** </text:span></text:p>
          </draw:text-box>
        </draw:frame>
        <draw:frame draw:style-name="gr1" draw:text-style-name="P2" draw:layer="layout" svg:width="0.565cm" svg:height="0.357cm" svg:x="15.993cm" svg:y="2.042cm">
          <draw:text-box>
            <text:p text:style-name="P1"><text:span text:style-name="T1">___ </text:span></text:p>
          </draw:text-box>
        </draw:frame>
        <draw:frame draw:style-name="gr1" draw:text-style-name="P2" draw:layer="layout" svg:width="3.622cm" svg:height="0.357cm" svg:x="16.789cm" svg:y="2.042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565cm" svg:height="0.357cm" svg:x="15.993cm" svg:y="2.592cm">
          <draw:text-box>
            <text:p text:style-name="P1"><text:span text:style-name="T1">___ </text:span></text:p>
          </draw:text-box>
        </draw:frame>
        <draw:frame draw:style-name="gr1" draw:text-style-name="P2" draw:layer="layout" svg:width="3.622cm" svg:height="0.357cm" svg:x="16.789cm" svg:y="2.592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565cm" svg:height="0.357cm" svg:x="15.993cm" svg:y="3.134cm">
          <draw:text-box>
            <text:p text:style-name="P1"><text:span text:style-name="T1">___ </text:span></text:p>
          </draw:text-box>
        </draw:frame>
        <draw:frame draw:style-name="gr1" draw:text-style-name="P2" draw:layer="layout" svg:width="3.622cm" svg:height="0.357cm" svg:x="16.789cm" svg:y="3.134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565cm" svg:height="0.357cm" svg:x="15.993cm" svg:y="3.684cm">
          <draw:text-box>
            <text:p text:style-name="P1"><text:span text:style-name="T1">___ </text:span></text:p>
          </draw:text-box>
        </draw:frame>
        <draw:frame draw:style-name="gr1" draw:text-style-name="P2" draw:layer="layout" svg:width="3.622cm" svg:height="0.357cm" svg:x="16.789cm" svg:y="3.684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565cm" svg:height="0.357cm" svg:x="15.993cm" svg:y="4.235cm">
          <draw:text-box>
            <text:p text:style-name="P1"><text:span text:style-name="T1">___ </text:span></text:p>
          </draw:text-box>
        </draw:frame>
        <draw:frame draw:style-name="gr1" draw:text-style-name="P2" draw:layer="layout" svg:width="3.622cm" svg:height="0.357cm" svg:x="16.789cm" svg:y="4.235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2.724cm" svg:height="0.357cm" svg:x="15.994cm" svg:y="4.776cm">
          <draw:text-box>
            <text:p text:style-name="P1"><text:span text:style-name="T1">Paralyzation, Poison </text:span></text:p>
          </draw:text-box>
        </draw:frame>
        <draw:frame draw:style-name="gr1" draw:text-style-name="P2" draw:layer="layout" svg:width="0.887cm" svg:height="0.357cm" svg:x="19.482cm" svg:y="4.776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3.262cm" svg:height="0.357cm" svg:x="15.994cm" svg:y="5.327cm">
          <draw:text-box>
            <text:p text:style-name="P1"><text:span text:style-name="T1">Petrification, Polymorph </text:span></text:p>
          </draw:text-box>
        </draw:frame>
        <draw:frame draw:style-name="gr1" draw:text-style-name="P2" draw:layer="layout" svg:width="0.887cm" svg:height="0.357cm" svg:x="19.482cm" svg:y="5.327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2.601cm" svg:height="0.357cm" svg:x="15.994cm" svg:y="5.877cm">
          <draw:text-box>
            <text:p text:style-name="P1"><text:span text:style-name="T1">Rod, Staff or Wand </text:span></text:p>
          </draw:text-box>
        </draw:frame>
        <draw:frame draw:style-name="gr1" draw:text-style-name="P2" draw:layer="layout" svg:width="0.887cm" svg:height="0.357cm" svg:x="19.482cm" svg:y="5.877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2.089cm" svg:height="0.357cm" svg:x="15.994cm" svg:y="6.419cm">
          <draw:text-box>
            <text:p text:style-name="P1"><text:span text:style-name="T1">Breath Weapon </text:span></text:p>
          </draw:text-box>
        </draw:frame>
        <draw:frame draw:style-name="gr1" draw:text-style-name="P2" draw:layer="layout" svg:width="0.887cm" svg:height="0.357cm" svg:x="19.482cm" svg:y="6.419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866cm" svg:height="0.357cm" svg:x="15.994cm" svg:y="6.969cm">
          <draw:text-box>
            <text:p text:style-name="P1"><text:span text:style-name="T1">Spells </text:span></text:p>
          </draw:text-box>
        </draw:frame>
        <draw:frame draw:style-name="gr1" draw:text-style-name="P2" draw:layer="layout" svg:width="0.887cm" svg:height="0.357cm" svg:x="19.482cm" svg:y="6.969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321cm" svg:height="0.357cm" svg:x="18.136cm" svg:y="7.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94cm" svg:height="0.357cm" svg:x="2.286cm" svg:y="8.222cm">
          <draw:text-box>
            <text:p text:style-name="P1"><text:span text:style-name="T3">(_____)Hit </text:span><text:span text:style-name="T3">Points </text:span></text:p>
          </draw:text-box>
        </draw:frame>
        <draw:frame draw:style-name="gr1" draw:text-style-name="P2" draw:layer="layout" svg:width="4.434cm" svg:height="0.357cm" svg:x="6.079cm" svg:y="8.222cm">
          <draw:text-box>
            <text:p text:style-name="P1"><text:span text:style-name="T1">Hit </text:span><text:span text:style-name="T1">Die </text:span><text:span text:style-name="T1">Type </text:span><text:span text:style-name="T1">d____ </text:span><text:span text:style-name="T1">d____ </text:span><text:span text:style-name="T1">d____ </text:span></text:p>
          </draw:text-box>
        </draw:frame>
        <draw:frame draw:style-name="gr1" draw:text-style-name="P2" draw:layer="layout" svg:width="2.385cm" svg:height="0.357cm" svg:x="2.286cm" svg:y="8.586cm">
          <draw:text-box>
            <text:p text:style-name="P1"><text:span text:style-name="T1">Hit </text:span><text:span text:style-name="T1">poin</text:span><text:span text:style-name="T1">ts </text:span><text:span text:style-name="T1">gain</text:span><text:span text:style-name="T1">ed: </text:span></text:p>
          </draw:text-box>
        </draw:frame>
        <draw:frame draw:style-name="gr1" draw:text-style-name="P2" draw:layer="layout" svg:width="5.632cm" svg:height="0.357cm" svg:x="4.894cm" svg:y="8.586cm">
          <draw:text-box>
            <text:p text:style-name="P1"><text:span text:style-name="T1">__ __ __ __ __ __ __ __ __ __ __ __ __ __ </text:span></text:p>
          </draw:text-box>
        </draw:frame>
        <draw:frame draw:style-name="gr1" draw:text-style-name="P2" draw:layer="layout" svg:width="8.257cm" svg:height="0.357cm" svg:x="2.286cm" svg:y="8.959cm">
          <draw:text-box>
            <text:p text:style-name="P1"><text:span text:style-name="T1">Scars ______________________________________________ </text:span></text:p>
          </draw:text-box>
        </draw:frame>
        <draw:frame draw:style-name="gr1" draw:text-style-name="P2" draw:layer="layout" svg:width="0.321cm" svg:height="0.357cm" svg:x="2.286cm" svg:y="9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038cm" svg:height="0.357cm" svg:x="11.93cm" svg:y="8.222cm">
          <draw:text-box>
            <text:p text:style-name="P1"><text:span text:style-name="T3">Psioni</text:span><text:span text:style-name="T3">cs </text:span><text:span text:style-name="T1">(____) </text:span><text:span text:style-name="T1"><text:s/>attack </text:span><text:span text:style-name="T1">(____) </text:span><text:span text:style-name="T1"><text:s/></text:span><text:span text:style-name="T1">defens</text:span><text:span text:style-name="T1">e </text:span><text:span text:style-name="T1">(____) </text:span></text:p>
          </draw:text-box>
        </draw:frame>
        <draw:frame draw:style-name="gr1" draw:text-style-name="P2" draw:layer="layout" svg:width="2.296cm" svg:height="0.357cm" svg:x="18.136cm" svg:y="8.222cm">
          <draw:text-box>
            <text:p text:style-name="P1"><text:span text:style-name="T1">modes:________ </text:span></text:p>
          </draw:text-box>
        </draw:frame>
        <draw:frame draw:style-name="gr1" draw:text-style-name="P2" draw:layer="layout" svg:width="0.832cm" svg:height="0.357cm" svg:x="11.93cm" svg:y="8.586cm">
          <draw:text-box>
            <text:p text:style-name="P1"><text:span text:style-name="T1">major </text:span></text:p>
          </draw:text-box>
        </draw:frame>
        <draw:frame draw:style-name="gr1" draw:text-style-name="P2" draw:layer="layout" svg:width="7.643cm" svg:height="0.357cm" svg:x="12.861cm" svg:y="8.586cm">
          <draw:text-box>
            <text:p text:style-name="P1"><text:span text:style-name="T1">______________________</text:span><text:span text:style-name="T1">______________________</text:span><text:span text:style-name="T1">___ </text:span></text:p>
          </draw:text-box>
        </draw:frame>
        <draw:frame draw:style-name="gr1" draw:text-style-name="P2" draw:layer="layout" svg:width="8.57cm" svg:height="0.357cm" svg:x="11.93cm" svg:y="8.959cm">
          <draw:text-box>
            <text:p text:style-name="P1"><text:span text:style-name="T1">min</text:span><text:span text:style-name="T1">or <text:s/>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 </text:span></text:p>
          </draw:text-box>
        </draw:frame>
        <draw:frame draw:style-name="gr1" draw:text-style-name="P2" draw:layer="layout" svg:width="0.321cm" svg:height="0.357cm" svg:x="11.93cm" svg:y="9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286cm" svg:y="10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664cm" svg:height="0.357cm" svg:x="2.286cm" svg:y="10.415cm">
          <draw:text-box>
            <text:p text:style-name="P1"><text:span text:style-name="T3">Non-Weapon </text:span><text:span text:style-name="T3">Proficiencies: </text:span></text:p>
          </draw:text-box>
        </draw:frame>
        <draw:frame draw:style-name="gr1" draw:text-style-name="P2" draw:layer="layout" svg:width="3.622cm" svg:height="0.357cm" svg:x="2.286cm" svg:y="10.779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6.096cm" svg:y="10.779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7.044cm" svg:y="10.779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2.286cm" svg:y="11.143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6.096cm" svg:y="11.143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7.044cm" svg:y="11.143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2.286cm" svg:y="11.507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6.096cm" svg:y="11.507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7.044cm" svg:y="11.507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2.286cm" svg:y="11.871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6.096cm" svg:y="11.871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7.044cm" svg:y="11.871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2.286cm" svg:y="12.244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6.096cm" svg:y="12.24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7.044cm" svg:y="12.244cm">
          <draw:text-box>
            <text:p text:style-name="P1"><text:span text:style-name="T1">-___ </text:span></text:p>
          </draw:text-box>
        </draw:frame>
        <draw:frame draw:style-name="gr1" draw:text-style-name="P2" draw:layer="layout" svg:width="0.321cm" svg:height="0.357cm" svg:x="2.286cm" svg:y="12.6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36cm" svg:y="10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37cm" svg:height="0.357cm" svg:x="8.636cm" svg:y="10.415cm">
          <draw:text-box>
            <text:p text:style-name="P1"><text:span text:style-name="T1">Number </text:span></text:p>
          </draw:text-box>
        </draw:frame>
        <draw:frame draw:style-name="gr1" draw:text-style-name="P2" draw:layer="layout" svg:width="0.726cm" svg:height="0.357cm" svg:x="9.957cm" svg:y="10.415cm">
          <draw:text-box>
            <text:p text:style-name="P1"><text:span text:style-name="T1">____ </text:span></text:p>
          </draw:text-box>
        </draw:frame>
        <draw:frame draw:style-name="gr3" draw:text-style-name="P4" draw:layer="layout" svg:width="0.321cm" svg:height="1.558cm" svg:x="10.871cm" svg:y="9.2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142cm" svg:y="10.4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422cm" svg:y="10.4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693cm" svg:y="10.4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938cm" svg:height="0.357cm" svg:x="11.972cm" svg:y="10.415cm">
          <draw:text-box>
            <text:p text:style-name="P1"><text:span text:style-name="T1">gained </text:span></text:p>
          </draw:text-box>
        </draw:frame>
        <draw:frame draw:style-name="gr1" draw:text-style-name="P2" draw:layer="layout" svg:width="0.976cm" svg:height="0.357cm" svg:x="13.09cm" svg:y="10.415cm">
          <draw:text-box>
            <text:p text:style-name="P1"><text:span text:style-name="T1">1/____ </text:span></text:p>
          </draw:text-box>
        </draw:frame>
        <draw:frame draw:style-name="gr1" draw:text-style-name="P2" draw:layer="layout" svg:width="3.622cm" svg:height="0.357cm" svg:x="8.636cm" svg:y="10.779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2.446cm" svg:y="10.779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3.394cm" svg:y="10.779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8.636cm" svg:y="11.143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2.446cm" svg:y="11.143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3.394cm" svg:y="11.143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8.636cm" svg:y="11.507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2.446cm" svg:y="11.507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3.394cm" svg:y="11.507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8.636cm" svg:y="11.871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2.446cm" svg:y="11.871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3.394cm" svg:y="11.871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8.636cm" svg:y="12.244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2.446cm" svg:y="12.24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3.394cm" svg:y="12.244cm">
          <draw:text-box>
            <text:p text:style-name="P1"><text:span text:style-name="T1">-___ </text:span></text:p>
          </draw:text-box>
        </draw:frame>
        <draw:frame draw:style-name="gr1" draw:text-style-name="P2" draw:layer="layout" svg:width="0.321cm" svg:height="0.357cm" svg:x="8.636cm" svg:y="12.6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4.986cm" svg:y="10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88cm" svg:height="0.357cm" svg:x="14.986cm" svg:y="10.415cm">
          <draw:text-box>
            <text:p text:style-name="P1"><text:span text:style-name="T1">Skill </text:span></text:p>
          </draw:text-box>
        </draw:frame>
        <draw:frame draw:style-name="gr1" draw:text-style-name="P2" draw:layer="layout" svg:width="0.993cm" svg:height="0.357cm" svg:x="18.534cm" svg:y="10.415cm">
          <draw:text-box>
            <text:p text:style-name="P1"><text:span text:style-name="T1">Ability </text:span></text:p>
          </draw:text-box>
        </draw:frame>
        <draw:frame draw:style-name="gr1" draw:text-style-name="P2" draw:layer="layout" svg:width="0.688cm" svg:height="0.357cm" svg:x="19.719cm" svg:y="10.415cm">
          <draw:text-box>
            <text:p text:style-name="P1"><text:span text:style-name="T1">Mod </text:span></text:p>
          </draw:text-box>
        </draw:frame>
        <draw:frame draw:style-name="gr1" draw:text-style-name="P2" draw:layer="layout" svg:width="3.622cm" svg:height="0.357cm" svg:x="14.986cm" svg:y="10.779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8.796cm" svg:y="10.779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9.744cm" svg:y="10.779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14.986cm" svg:y="11.143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8.796cm" svg:y="11.143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9.744cm" svg:y="11.143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14.986cm" svg:y="11.507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8.796cm" svg:y="11.507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9.744cm" svg:y="11.507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14.986cm" svg:y="11.871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8.796cm" svg:y="11.871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9.744cm" svg:y="11.871cm">
          <draw:text-box>
            <text:p text:style-name="P1"><text:span text:style-name="T1">-___ </text:span></text:p>
          </draw:text-box>
        </draw:frame>
        <draw:frame draw:style-name="gr1" draw:text-style-name="P2" draw:layer="layout" svg:width="3.622cm" svg:height="0.357cm" svg:x="14.986cm" svg:y="12.244cm">
          <draw:text-box>
            <text:p text:style-name="P1"><text:span text:style-name="T1">____________________</text:span><text:span text:style-name="T1">__ </text:span></text:p>
          </draw:text-box>
        </draw:frame>
        <draw:frame draw:style-name="gr1" draw:text-style-name="P2" draw:layer="layout" svg:width="0.726cm" svg:height="0.357cm" svg:x="18.796cm" svg:y="12.24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19.744cm" svg:y="12.244cm">
          <draw:text-box>
            <text:p text:style-name="P1"><text:span text:style-name="T1">-___ </text:span></text:p>
          </draw:text-box>
        </draw:frame>
        <draw:frame draw:style-name="gr1" draw:text-style-name="P2" draw:layer="layout" svg:width="0.321cm" svg:height="0.357cm" svg:x="14.986cm" svg:y="12.6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06cm" svg:height="0.357cm" svg:x="2.286cm" svg:y="13.336cm">
          <draw:text-box>
            <text:p text:style-name="P1"><text:span text:style-name="T3">Skills and Detections: </text:span></text:p>
          </draw:text-box>
        </draw:frame>
        <draw:frame draw:style-name="gr1" draw:text-style-name="P2" draw:layer="layout" svg:width="8.769cm" svg:height="0.357cm" svg:x="2.286cm" svg:y="13.7cm">
          <draw:text-box>
            <text:p text:style-name="P1"><text:span text:style-name="T1">____________________</text:span><text:span text:style-name="T1">____________________</text:span><text:span text:style-name="T1">______________ </text:span></text:p>
          </draw:text-box>
        </draw:frame>
        <draw:frame draw:style-name="gr1" draw:text-style-name="P2" draw:layer="layout" svg:width="8.769cm" svg:height="0.357cm" svg:x="2.286cm" svg:y="14.064cm">
          <draw:text-box>
            <text:p text:style-name="P1"><text:span text:style-name="T1">____________________</text:span><text:span text:style-name="T1">____________________</text:span><text:span text:style-name="T1">______________ </text:span></text:p>
          </draw:text-box>
        </draw:frame>
        <draw:frame draw:style-name="gr1" draw:text-style-name="P2" draw:layer="layout" svg:width="8.769cm" svg:height="0.357cm" svg:x="2.286cm" svg:y="14.428cm">
          <draw:text-box>
            <text:p text:style-name="P1"><text:span text:style-name="T1">____________________</text:span><text:span text:style-name="T1">____________________</text:span><text:span text:style-name="T1">______________ </text:span></text:p>
          </draw:text-box>
        </draw:frame>
        <draw:frame draw:style-name="gr1" draw:text-style-name="P2" draw:layer="layout" svg:width="9.01cm" svg:height="0.357cm" svg:x="11.498cm" svg:y="13.336cm">
          <draw:text-box>
            <text:p text:style-name="P1"><text:span text:style-name="T1"><text:s/></text:span><text:span text:style-name="T1">____________________</text:span><text:span text:style-name="T1">____________________</text:span><text:span text:style-name="T1">_______________ </text:span></text:p>
          </draw:text-box>
        </draw:frame>
        <draw:frame draw:style-name="gr1" draw:text-style-name="P2" draw:layer="layout" svg:width="9.01cm" svg:height="0.357cm" svg:x="11.498cm" svg:y="13.7cm">
          <draw:text-box>
            <text:p text:style-name="P1"><text:span text:style-name="T1"><text:s/></text:span><text:span text:style-name="T1">____________________</text:span><text:span text:style-name="T1">____________________</text:span><text:span text:style-name="T1">_______________ </text:span></text:p>
          </draw:text-box>
        </draw:frame>
        <draw:frame draw:style-name="gr1" draw:text-style-name="P2" draw:layer="layout" svg:width="9.01cm" svg:height="0.357cm" svg:x="11.498cm" svg:y="14.064cm">
          <draw:text-box>
            <text:p text:style-name="P1"><text:span text:style-name="T1"><text:s/></text:span><text:span text:style-name="T1">____________________</text:span><text:span text:style-name="T1">____________________</text:span><text:span text:style-name="T1">_______________ </text:span></text:p>
          </draw:text-box>
        </draw:frame>
        <draw:frame draw:style-name="gr1" draw:text-style-name="P2" draw:layer="layout" svg:width="9.01cm" svg:height="0.357cm" svg:x="11.498cm" svg:y="14.428cm">
          <draw:text-box>
            <text:p text:style-name="P1"><text:span text:style-name="T1"><text:s/></text:span><text:span text:style-name="T1">____________________</text:span><text:span text:style-name="T1">____________________</text:span><text:span text:style-name="T1">_______________ </text:span></text:p>
          </draw:text-box>
        </draw:frame>
        <draw:frame draw:style-name="gr1" draw:text-style-name="P2" draw:layer="layout" svg:width="0.321cm" svg:height="0.357cm" svg:x="2.286cm" svg:y="14.79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12cm" svg:height="0.395cm" svg:x="2.286cm" svg:y="15.169cm">
          <draw:text-box>
            <text:p text:style-name="P1"><text:span text:style-name="T4">Weapons </text:span></text:p>
          </draw:text-box>
        </draw:frame>
        <draw:frame draw:style-name="gr1" draw:text-style-name="P2" draw:layer="layout" svg:width="7.453cm" svg:height="0.357cm" svg:x="3.768cm" svg:y="15.199cm">
          <draw:text-box>
            <text:p text:style-name="P1"><text:span text:style-name="T1"><text:s text:c="5"/></text:span><text:span text:style-name="T1">proficient #____ <text:s text:c="8"/></text:span><text:span text:style-name="T1"><text:s text:c="2"/>gain 1/____ <text:s text:c="10"/></text:span><text:span text:style-name="T1">penalty-___ </text:span></text:p>
          </draw:text-box>
        </draw:frame>
        <draw:frame draw:style-name="gr1" draw:text-style-name="P2" draw:layer="layout" svg:width="2.538cm" svg:height="0.357cm" svg:x="12.023cm" svg:y="15.199cm">
          <draw:text-box>
            <text:p text:style-name="P1"><text:span text:style-name="T1">#of attacks___/___ </text:span></text:p>
          </draw:text-box>
        </draw:frame>
        <draw:frame draw:style-name="gr1" draw:text-style-name="P2" draw:layer="layout" svg:width="9.629cm" svg:height="0.357cm" svg:x="2.286cm" svg:y="15.571cm">
          <draw:text-box>
            <text:p text:style-name="P1"><text:span text:style-name="T1">specialized in </text:span><text:span text:style-name="T1">____________________</text:span><text:span text:style-name="T1">__________ <text:s text:c="3"/>hit+___ <text:s text:c="3"/></text:span><text:span text:style-name="T1">dmg+___ </text:span></text:p>
          </draw:text-box>
        </draw:frame>
        <draw:frame draw:style-name="gr1" draw:text-style-name="P2" draw:layer="layout" svg:width="2.538cm" svg:height="0.357cm" svg:x="12.023cm" svg:y="15.571cm">
          <draw:text-box>
            <text:p text:style-name="P1"><text:span text:style-name="T1">#of attacks___/___ </text:span></text:p>
          </draw:text-box>
        </draw:frame>
        <draw:frame draw:style-name="gr1" draw:text-style-name="P2" draw:layer="layout" svg:width="12.414cm" svg:height="0.357cm" svg:x="2.286cm" svg:y="15.935cm">
          <draw:text-box>
            <text:p text:style-name="P1"><text:span text:style-name="T1">weapons used <text:s text:c="2"/></text:span><text:span text:style-name="T1">____________________</text:span><text:span text:style-name="T1">____________________</text:span><text:span text:style-name="T1">____________________</text:span><text:span text:style-name="T1">____ </text:span></text:p>
          </draw:text-box>
        </draw:frame>
        <draw:frame draw:style-name="gr1" draw:text-style-name="P2" draw:layer="layout" svg:width="0.321cm" svg:height="0.357cm" svg:x="2.286cm" svg:y="16.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93cm" svg:height="0.357cm" svg:x="2.286cm" svg:y="16.664cm">
          <draw:text-box>
            <text:p text:style-name="P1"><text:span text:style-name="T1">weapon description </text:span></text:p>
          </draw:text-box>
        </draw:frame>
        <draw:frame draw:style-name="gr1" draw:text-style-name="P2" draw:layer="layout" svg:width="2.33cm" svg:height="0.357cm" svg:x="7.976cm" svg:y="16.664cm">
          <draw:text-box>
            <text:p text:style-name="P1"><text:span text:style-name="T1">+hit <text:s/>+dmg speed </text:span></text:p>
          </draw:text-box>
        </draw:frame>
        <draw:frame draw:style-name="gr1" draw:text-style-name="P2" draw:layer="layout" svg:width="0.883cm" svg:height="0.357cm" svg:x="10.541cm" svg:y="16.664cm">
          <draw:text-box>
            <text:p text:style-name="P1"><text:span text:style-name="T1">length </text:span></text:p>
          </draw:text-box>
        </draw:frame>
        <draw:frame draw:style-name="gr1" draw:text-style-name="P2" draw:layer="layout" svg:width="1.67cm" svg:height="0.357cm" svg:x="11.692cm" svg:y="16.664cm">
          <draw:text-box>
            <text:p text:style-name="P1"><text:span text:style-name="T1">type <text:s/>S &amp; M </text:span></text:p>
          </draw:text-box>
        </draw:frame>
        <draw:frame draw:style-name="gr1" draw:text-style-name="P2" draw:layer="layout" svg:width="0.832cm" svg:height="0.357cm" svg:x="13.589cm" svg:y="16.664cm">
          <draw:text-box>
            <text:p text:style-name="P1"><text:span text:style-name="T1">Large </text:span></text:p>
          </draw:text-box>
        </draw:frame>
        <draw:frame draw:style-name="gr1" draw:text-style-name="P2" draw:layer="layout" svg:width="0.321cm" svg:height="0.357cm" svg:x="2.337cm" svg:y="17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17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17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17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0.279cm" svg:y="17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701cm" svg:y="17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2.336cm" svg:y="17.087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9cm" svg:x="2.277cm" svg:y="17.018cm" svg:viewBox="0 0 10 60" draw:points="0,60 10,60 10,0 0,0">
          <text:p/>
        </draw:polygon>
        <draw:polygon draw:style-name="gr5" draw:text-style-name="P6" draw:layer="layout" svg:width="0.009cm" svg:height="0.008cm" svg:x="2.277cm" svg:y="17.018cm" svg:viewBox="0 0 10 9" draw:points="0,9 10,9 10,0 0,0">
          <text:p/>
        </draw:polygon>
        <draw:polygon draw:style-name="gr5" draw:text-style-name="P6" draw:layer="layout" svg:width="0.008cm" svg:height="0.008cm" svg:x="2.286cm" svg:y="17.018cm" svg:viewBox="0 0 9 9" draw:points="0,9 9,9 9,0 0,0">
          <text:p/>
        </draw:polygon>
        <draw:polygon draw:style-name="gr5" draw:text-style-name="P6" draw:layer="layout" svg:width="5.537cm" svg:height="0.008cm" svg:x="2.294cm" svg:y="17.018cm" svg:viewBox="0 0 5538 9" draw:points="0,9 5538,9 5538,0 0,0">
          <text:p/>
        </draw:polygon>
        <draw:polygon draw:style-name="gr5" draw:text-style-name="P6" draw:layer="layout" svg:width="0.009cm" svg:height="0.051cm" svg:x="7.831cm" svg:y="17.026cm" svg:viewBox="0 0 10 52" draw:points="0,52 10,52 10,0 0,0">
          <text:p/>
        </draw:polygon>
        <draw:polygon draw:style-name="gr5" draw:text-style-name="P6" draw:layer="layout" svg:width="0.009cm" svg:height="0.008cm" svg:x="7.831cm" svg:y="17.018cm" svg:viewBox="0 0 10 9" draw:points="0,9 10,9 10,0 0,0">
          <text:p/>
        </draw:polygon>
        <draw:polygon draw:style-name="gr5" draw:text-style-name="P6" draw:layer="layout" svg:width="0.008cm" svg:height="0.008cm" svg:x="7.84cm" svg:y="17.018cm" svg:viewBox="0 0 9 9" draw:points="0,9 9,9 9,0 0,0">
          <text:p/>
        </draw:polygon>
        <draw:polygon draw:style-name="gr5" draw:text-style-name="P6" draw:layer="layout" svg:width="0.779cm" svg:height="0.008cm" svg:x="7.848cm" svg:y="17.018cm" svg:viewBox="0 0 780 9" draw:points="0,9 780,9 780,0 0,0">
          <text:p/>
        </draw:polygon>
        <draw:polygon draw:style-name="gr5" draw:text-style-name="P6" draw:layer="layout" svg:width="0.01cm" svg:height="0.051cm" svg:x="8.627cm" svg:y="17.026cm" svg:viewBox="0 0 11 52" draw:points="0,52 11,52 11,0 0,0">
          <text:p/>
        </draw:polygon>
        <draw:polygon draw:style-name="gr5" draw:text-style-name="P6" draw:layer="layout" svg:width="0.01cm" svg:height="0.008cm" svg:x="8.627cm" svg:y="17.018cm" svg:viewBox="0 0 11 9" draw:points="0,9 11,9 11,0 0,0">
          <text:p/>
        </draw:polygon>
        <draw:polygon draw:style-name="gr5" draw:text-style-name="P6" draw:layer="layout" svg:width="0.008cm" svg:height="0.008cm" svg:x="8.636cm" svg:y="17.018cm" svg:viewBox="0 0 9 9" draw:points="0,9 9,9 9,0 0,0">
          <text:p/>
        </draw:polygon>
        <draw:polygon draw:style-name="gr5" draw:text-style-name="P6" draw:layer="layout" svg:width="0.779cm" svg:height="0.008cm" svg:x="8.644cm" svg:y="17.018cm" svg:viewBox="0 0 780 9" draw:points="0,9 780,9 780,0 0,0">
          <text:p/>
        </draw:polygon>
        <draw:polygon draw:style-name="gr5" draw:text-style-name="P6" draw:layer="layout" svg:width="0.008cm" svg:height="0.051cm" svg:x="9.423cm" svg:y="17.026cm" svg:viewBox="0 0 9 52" draw:points="0,52 9,52 9,0 0,0">
          <text:p/>
        </draw:polygon>
        <draw:polygon draw:style-name="gr5" draw:text-style-name="P6" draw:layer="layout" svg:width="0.008cm" svg:height="0.008cm" svg:x="9.423cm" svg:y="17.018cm" svg:viewBox="0 0 9 9" draw:points="0,9 9,9 9,0 0,0">
          <text:p/>
        </draw:polygon>
        <draw:polygon draw:style-name="gr5" draw:text-style-name="P6" draw:layer="layout" svg:width="0.009cm" svg:height="0.008cm" svg:x="9.431cm" svg:y="17.018cm" svg:viewBox="0 0 10 9" draw:points="0,9 10,9 10,0 0,0">
          <text:p/>
        </draw:polygon>
        <draw:polygon draw:style-name="gr5" draw:text-style-name="P6" draw:layer="layout" svg:width="0.779cm" svg:height="0.008cm" svg:x="9.44cm" svg:y="17.018cm" svg:viewBox="0 0 780 9" draw:points="0,9 780,9 780,0 0,0">
          <text:p/>
        </draw:polygon>
        <draw:polygon draw:style-name="gr5" draw:text-style-name="P6" draw:layer="layout" svg:width="0.008cm" svg:height="0.051cm" svg:x="10.219cm" svg:y="17.026cm" svg:viewBox="0 0 9 52" draw:points="0,52 9,52 9,0 0,0">
          <text:p/>
        </draw:polygon>
        <draw:polygon draw:style-name="gr5" draw:text-style-name="P6" draw:layer="layout" svg:width="0.008cm" svg:height="0.008cm" svg:x="10.219cm" svg:y="17.018cm" svg:viewBox="0 0 9 9" draw:points="0,9 9,9 9,0 0,0">
          <text:p/>
        </draw:polygon>
        <draw:polygon draw:style-name="gr5" draw:text-style-name="P6" draw:layer="layout" svg:width="0.01cm" svg:height="0.008cm" svg:x="10.227cm" svg:y="17.018cm" svg:viewBox="0 0 11 9" draw:points="0,9 11,9 11,0 0,0">
          <text:p/>
        </draw:polygon>
        <draw:polygon draw:style-name="gr5" draw:text-style-name="P6" draw:layer="layout" svg:width="1.405cm" svg:height="0.008cm" svg:x="10.236cm" svg:y="17.018cm" svg:viewBox="0 0 1406 9" draw:points="0,9 1406,9 1406,0 0,0">
          <text:p/>
        </draw:polygon>
        <draw:polygon draw:style-name="gr5" draw:text-style-name="P6" draw:layer="layout" svg:width="0.009cm" svg:height="0.051cm" svg:x="11.641cm" svg:y="17.026cm" svg:viewBox="0 0 10 52" draw:points="0,52 10,52 10,0 0,0">
          <text:p/>
        </draw:polygon>
        <draw:polygon draw:style-name="gr5" draw:text-style-name="P6" draw:layer="layout" svg:width="0.009cm" svg:height="0.008cm" svg:x="11.641cm" svg:y="17.018cm" svg:viewBox="0 0 10 9" draw:points="0,9 10,9 10,0 0,0">
          <text:p/>
        </draw:polygon>
        <draw:polygon draw:style-name="gr5" draw:text-style-name="P6" draw:layer="layout" svg:width="0.008cm" svg:height="0.008cm" svg:x="11.65cm" svg:y="17.018cm" svg:viewBox="0 0 9 9" draw:points="0,9 9,9 9,0 0,0">
          <text:p/>
        </draw:polygon>
        <draw:polygon draw:style-name="gr5" draw:text-style-name="P6" draw:layer="layout" svg:width="0.618cm" svg:height="0.008cm" svg:x="11.658cm" svg:y="17.018cm" svg:viewBox="0 0 619 9" draw:points="0,9 619,9 619,0 0,0">
          <text:p/>
        </draw:polygon>
        <draw:polygon draw:style-name="gr5" draw:text-style-name="P6" draw:layer="layout" svg:width="0.009cm" svg:height="0.051cm" svg:x="12.276cm" svg:y="17.026cm" svg:viewBox="0 0 10 52" draw:points="0,52 10,52 10,0 0,0">
          <text:p/>
        </draw:polygon>
        <draw:polygon draw:style-name="gr5" draw:text-style-name="P6" draw:layer="layout" svg:width="0.009cm" svg:height="0.008cm" svg:x="12.276cm" svg:y="17.018cm" svg:viewBox="0 0 10 9" draw:points="0,9 10,9 10,0 0,0">
          <text:p/>
        </draw:polygon>
        <draw:polygon draw:style-name="gr5" draw:text-style-name="P6" draw:layer="layout" svg:width="0.008cm" svg:height="0.008cm" svg:x="12.285cm" svg:y="17.018cm" svg:viewBox="0 0 9 9" draw:points="0,9 9,9 9,0 0,0">
          <text:p/>
        </draw:polygon>
        <draw:polygon draw:style-name="gr5" draw:text-style-name="P6" draw:layer="layout" svg:width="1.101cm" svg:height="0.008cm" svg:x="12.293cm" svg:y="17.018cm" svg:viewBox="0 0 1102 9" draw:points="0,9 1102,9 1102,0 0,0">
          <text:p/>
        </draw:polygon>
        <draw:polygon draw:style-name="gr5" draw:text-style-name="P6" draw:layer="layout" svg:width="0.008cm" svg:height="0.051cm" svg:x="13.394cm" svg:y="17.026cm" svg:viewBox="0 0 9 52" draw:points="0,52 9,52 9,0 0,0">
          <text:p/>
        </draw:polygon>
        <draw:polygon draw:style-name="gr5" draw:text-style-name="P6" draw:layer="layout" svg:width="0.008cm" svg:height="0.008cm" svg:x="13.394cm" svg:y="17.018cm" svg:viewBox="0 0 9 9" draw:points="0,9 9,9 9,0 0,0">
          <text:p/>
        </draw:polygon>
        <draw:polygon draw:style-name="gr5" draw:text-style-name="P6" draw:layer="layout" svg:width="0.009cm" svg:height="0.008cm" svg:x="13.402cm" svg:y="17.018cm" svg:viewBox="0 0 10 9" draw:points="0,9 10,9 10,0 0,0">
          <text:p/>
        </draw:polygon>
        <draw:polygon draw:style-name="gr5" draw:text-style-name="P6" draw:layer="layout" svg:width="1.092cm" svg:height="0.008cm" svg:x="13.411cm" svg:y="17.018cm" svg:viewBox="0 0 1093 9" draw:points="0,9 1093,9 1093,0 0,0">
          <text:p/>
        </draw:polygon>
        <draw:polygon draw:style-name="gr5" draw:text-style-name="P6" draw:layer="layout" svg:width="0.008cm" svg:height="0.059cm" svg:x="14.503cm" svg:y="17.018cm" svg:viewBox="0 0 9 60" draw:points="0,60 9,60 9,0 0,0">
          <text:p/>
        </draw:polygon>
        <draw:polygon draw:style-name="gr5" draw:text-style-name="P6" draw:layer="layout" svg:width="0.008cm" svg:height="0.008cm" svg:x="14.503cm" svg:y="17.018cm" svg:viewBox="0 0 9 9" draw:points="0,9 9,9 9,0 0,0">
          <text:p/>
        </draw:polygon>
        <draw:polygon draw:style-name="gr5" draw:text-style-name="P6" draw:layer="layout" svg:width="0.009cm" svg:height="0.415cm" svg:x="2.277cm" svg:y="17.077cm" svg:viewBox="0 0 10 416" draw:points="0,416 10,416 10,0 0,0">
          <text:p/>
        </draw:polygon>
        <draw:polygon draw:style-name="gr5" draw:text-style-name="P6" draw:layer="layout" svg:width="0.009cm" svg:height="0.415cm" svg:x="7.831cm" svg:y="17.077cm" svg:viewBox="0 0 10 416" draw:points="0,416 10,416 10,0 0,0">
          <text:p/>
        </draw:polygon>
        <draw:polygon draw:style-name="gr5" draw:text-style-name="P6" draw:layer="layout" svg:width="0.01cm" svg:height="0.415cm" svg:x="8.627cm" svg:y="17.077cm" svg:viewBox="0 0 11 416" draw:points="0,416 11,416 11,0 0,0">
          <text:p/>
        </draw:polygon>
        <draw:polygon draw:style-name="gr5" draw:text-style-name="P6" draw:layer="layout" svg:width="0.008cm" svg:height="0.415cm" svg:x="9.423cm" svg:y="17.077cm" svg:viewBox="0 0 9 416" draw:points="0,416 9,416 9,0 0,0">
          <text:p/>
        </draw:polygon>
        <draw:polygon draw:style-name="gr5" draw:text-style-name="P6" draw:layer="layout" svg:width="0.008cm" svg:height="0.415cm" svg:x="10.219cm" svg:y="17.077cm" svg:viewBox="0 0 9 416" draw:points="0,416 9,416 9,0 0,0">
          <text:p/>
        </draw:polygon>
        <draw:polygon draw:style-name="gr5" draw:text-style-name="P6" draw:layer="layout" svg:width="0.009cm" svg:height="0.415cm" svg:x="11.641cm" svg:y="17.077cm" svg:viewBox="0 0 10 416" draw:points="0,416 10,416 10,0 0,0">
          <text:p/>
        </draw:polygon>
        <draw:polygon draw:style-name="gr5" draw:text-style-name="P6" draw:layer="layout" svg:width="0.009cm" svg:height="0.415cm" svg:x="12.276cm" svg:y="17.077cm" svg:viewBox="0 0 10 416" draw:points="0,416 10,416 10,0 0,0">
          <text:p/>
        </draw:polygon>
        <draw:polygon draw:style-name="gr5" draw:text-style-name="P6" draw:layer="layout" svg:width="0.008cm" svg:height="0.415cm" svg:x="13.394cm" svg:y="17.077cm" svg:viewBox="0 0 9 416" draw:points="0,416 9,416 9,0 0,0">
          <text:p/>
        </draw:polygon>
        <draw:polygon draw:style-name="gr5" draw:text-style-name="P6" draw:layer="layout" svg:width="0.008cm" svg:height="0.415cm" svg:x="14.503cm" svg:y="17.077cm" svg:viewBox="0 0 9 416" draw:points="0,416 9,416 9,0 0,0">
          <text:p/>
        </draw:polygon>
        <draw:frame draw:style-name="gr1" draw:text-style-name="P2" draw:layer="layout" svg:width="0.321cm" svg:height="0.357cm" svg:x="13.454cm" svg:y="17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337cm" svg:y="17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17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17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17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0.279cm" svg:y="17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701cm" svg:y="17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2.336cm" svg:y="17.553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cm" svg:x="2.277cm" svg:y="17.492cm" svg:viewBox="0 0 10 51" draw:points="0,51 10,51 10,0 0,0">
          <text:p/>
        </draw:polygon>
        <draw:polygon draw:style-name="gr5" draw:text-style-name="P6" draw:layer="layout" svg:width="5.545cm" svg:height="0.008cm" svg:x="2.286cm" svg:y="17.492cm" svg:viewBox="0 0 5546 9" draw:points="0,9 5546,9 5546,0 0,0">
          <text:p/>
        </draw:polygon>
        <draw:polygon draw:style-name="gr5" draw:text-style-name="P6" draw:layer="layout" svg:width="0.009cm" svg:height="0.05cm" svg:x="7.831cm" svg:y="17.492cm" svg:viewBox="0 0 10 51" draw:points="0,51 10,51 10,0 0,0">
          <text:p/>
        </draw:polygon>
        <draw:polygon draw:style-name="gr5" draw:text-style-name="P6" draw:layer="layout" svg:width="0.787cm" svg:height="0.008cm" svg:x="7.84cm" svg:y="17.492cm" svg:viewBox="0 0 788 9" draw:points="0,9 788,9 788,0 0,0">
          <text:p/>
        </draw:polygon>
        <draw:polygon draw:style-name="gr5" draw:text-style-name="P6" draw:layer="layout" svg:width="0.01cm" svg:height="0.05cm" svg:x="8.627cm" svg:y="17.492cm" svg:viewBox="0 0 11 51" draw:points="0,51 11,51 11,0 0,0">
          <text:p/>
        </draw:polygon>
        <draw:polygon draw:style-name="gr5" draw:text-style-name="P6" draw:layer="layout" svg:width="0.787cm" svg:height="0.008cm" svg:x="8.636cm" svg:y="17.492cm" svg:viewBox="0 0 788 9" draw:points="0,9 788,9 788,0 0,0">
          <text:p/>
        </draw:polygon>
        <draw:polygon draw:style-name="gr5" draw:text-style-name="P6" draw:layer="layout" svg:width="0.008cm" svg:height="0.05cm" svg:x="9.423cm" svg:y="17.492cm" svg:viewBox="0 0 9 51" draw:points="0,51 9,51 9,0 0,0">
          <text:p/>
        </draw:polygon>
        <draw:polygon draw:style-name="gr5" draw:text-style-name="P6" draw:layer="layout" svg:width="0.788cm" svg:height="0.008cm" svg:x="9.431cm" svg:y="17.492cm" svg:viewBox="0 0 789 9" draw:points="0,9 789,9 789,0 0,0">
          <text:p/>
        </draw:polygon>
        <draw:polygon draw:style-name="gr5" draw:text-style-name="P6" draw:layer="layout" svg:width="0.008cm" svg:height="0.05cm" svg:x="10.219cm" svg:y="17.492cm" svg:viewBox="0 0 9 51" draw:points="0,51 9,51 9,0 0,0">
          <text:p/>
        </draw:polygon>
        <draw:polygon draw:style-name="gr5" draw:text-style-name="P6" draw:layer="layout" svg:width="1.414cm" svg:height="0.008cm" svg:x="10.227cm" svg:y="17.492cm" svg:viewBox="0 0 1415 9" draw:points="0,9 1415,9 1415,0 0,0">
          <text:p/>
        </draw:polygon>
        <draw:polygon draw:style-name="gr5" draw:text-style-name="P6" draw:layer="layout" svg:width="0.009cm" svg:height="0.05cm" svg:x="11.641cm" svg:y="17.492cm" svg:viewBox="0 0 10 51" draw:points="0,51 10,51 10,0 0,0">
          <text:p/>
        </draw:polygon>
        <draw:polygon draw:style-name="gr5" draw:text-style-name="P6" draw:layer="layout" svg:width="0.626cm" svg:height="0.008cm" svg:x="11.65cm" svg:y="17.492cm" svg:viewBox="0 0 627 9" draw:points="0,9 627,9 627,0 0,0">
          <text:p/>
        </draw:polygon>
        <draw:polygon draw:style-name="gr5" draw:text-style-name="P6" draw:layer="layout" svg:width="0.009cm" svg:height="0.05cm" svg:x="12.276cm" svg:y="17.492cm" svg:viewBox="0 0 10 51" draw:points="0,51 10,51 10,0 0,0">
          <text:p/>
        </draw:polygon>
        <draw:polygon draw:style-name="gr5" draw:text-style-name="P6" draw:layer="layout" svg:width="1.109cm" svg:height="0.008cm" svg:x="12.285cm" svg:y="17.492cm" svg:viewBox="0 0 1110 9" draw:points="0,9 1110,9 1110,0 0,0">
          <text:p/>
        </draw:polygon>
        <draw:polygon draw:style-name="gr5" draw:text-style-name="P6" draw:layer="layout" svg:width="0.008cm" svg:height="0.05cm" svg:x="13.394cm" svg:y="17.492cm" svg:viewBox="0 0 9 51" draw:points="0,51 9,51 9,0 0,0">
          <text:p/>
        </draw:polygon>
        <draw:polygon draw:style-name="gr5" draw:text-style-name="P6" draw:layer="layout" svg:width="1.101cm" svg:height="0.008cm" svg:x="13.402cm" svg:y="17.492cm" svg:viewBox="0 0 1102 9" draw:points="0,9 1102,9 1102,0 0,0">
          <text:p/>
        </draw:polygon>
        <draw:polygon draw:style-name="gr5" draw:text-style-name="P6" draw:layer="layout" svg:width="0.008cm" svg:height="0.05cm" svg:x="14.503cm" svg:y="17.492cm" svg:viewBox="0 0 9 51" draw:points="0,51 9,51 9,0 0,0">
          <text:p/>
        </draw:polygon>
        <draw:polygon draw:style-name="gr5" draw:text-style-name="P6" draw:layer="layout" svg:width="0.009cm" svg:height="0.415cm" svg:x="2.277cm" svg:y="17.542cm" svg:viewBox="0 0 10 416" draw:points="0,416 10,416 10,0 0,0">
          <text:p/>
        </draw:polygon>
        <draw:polygon draw:style-name="gr5" draw:text-style-name="P6" draw:layer="layout" svg:width="0.009cm" svg:height="0.415cm" svg:x="7.831cm" svg:y="17.542cm" svg:viewBox="0 0 10 416" draw:points="0,416 10,416 10,0 0,0">
          <text:p/>
        </draw:polygon>
        <draw:polygon draw:style-name="gr5" draw:text-style-name="P6" draw:layer="layout" svg:width="0.01cm" svg:height="0.415cm" svg:x="8.627cm" svg:y="17.542cm" svg:viewBox="0 0 11 416" draw:points="0,416 11,416 11,0 0,0">
          <text:p/>
        </draw:polygon>
        <draw:polygon draw:style-name="gr5" draw:text-style-name="P6" draw:layer="layout" svg:width="0.008cm" svg:height="0.415cm" svg:x="9.423cm" svg:y="17.542cm" svg:viewBox="0 0 9 416" draw:points="0,416 9,416 9,0 0,0">
          <text:p/>
        </draw:polygon>
        <draw:polygon draw:style-name="gr5" draw:text-style-name="P6" draw:layer="layout" svg:width="0.008cm" svg:height="0.415cm" svg:x="10.219cm" svg:y="17.542cm" svg:viewBox="0 0 9 416" draw:points="0,416 9,416 9,0 0,0">
          <text:p/>
        </draw:polygon>
        <draw:polygon draw:style-name="gr5" draw:text-style-name="P6" draw:layer="layout" svg:width="0.009cm" svg:height="0.415cm" svg:x="11.641cm" svg:y="17.542cm" svg:viewBox="0 0 10 416" draw:points="0,416 10,416 10,0 0,0">
          <text:p/>
        </draw:polygon>
        <draw:polygon draw:style-name="gr5" draw:text-style-name="P6" draw:layer="layout" svg:width="0.009cm" svg:height="0.415cm" svg:x="12.276cm" svg:y="17.542cm" svg:viewBox="0 0 10 416" draw:points="0,416 10,416 10,0 0,0">
          <text:p/>
        </draw:polygon>
        <draw:polygon draw:style-name="gr5" draw:text-style-name="P6" draw:layer="layout" svg:width="0.008cm" svg:height="0.415cm" svg:x="13.394cm" svg:y="17.542cm" svg:viewBox="0 0 9 416" draw:points="0,416 9,416 9,0 0,0">
          <text:p/>
        </draw:polygon>
        <draw:polygon draw:style-name="gr5" draw:text-style-name="P6" draw:layer="layout" svg:width="0.008cm" svg:height="0.415cm" svg:x="14.503cm" svg:y="17.542cm" svg:viewBox="0 0 9 416" draw:points="0,416 9,416 9,0 0,0">
          <text:p/>
        </draw:polygon>
        <draw:frame draw:style-name="gr1" draw:text-style-name="P2" draw:layer="layout" svg:width="0.321cm" svg:height="0.357cm" svg:x="13.454cm" svg:y="17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337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0.279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701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2.336cm" svg:y="18.018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1cm" svg:x="2.277cm" svg:y="17.957cm" svg:viewBox="0 0 10 52" draw:points="0,52 10,52 10,0 0,0">
          <text:p/>
        </draw:polygon>
        <draw:polygon draw:style-name="gr5" draw:text-style-name="P6" draw:layer="layout" svg:width="5.545cm" svg:height="0.009cm" svg:x="2.286cm" svg:y="17.957cm" svg:viewBox="0 0 5546 10" draw:points="0,10 5546,10 5546,0 0,0">
          <text:p/>
        </draw:polygon>
        <draw:polygon draw:style-name="gr5" draw:text-style-name="P6" draw:layer="layout" svg:width="0.009cm" svg:height="0.051cm" svg:x="7.831cm" svg:y="17.957cm" svg:viewBox="0 0 10 52" draw:points="0,52 10,52 10,0 0,0">
          <text:p/>
        </draw:polygon>
        <draw:polygon draw:style-name="gr5" draw:text-style-name="P6" draw:layer="layout" svg:width="0.787cm" svg:height="0.009cm" svg:x="7.84cm" svg:y="17.957cm" svg:viewBox="0 0 788 10" draw:points="0,10 788,10 788,0 0,0">
          <text:p/>
        </draw:polygon>
        <draw:polygon draw:style-name="gr5" draw:text-style-name="P6" draw:layer="layout" svg:width="0.01cm" svg:height="0.051cm" svg:x="8.627cm" svg:y="17.957cm" svg:viewBox="0 0 11 52" draw:points="0,52 11,52 11,0 0,0">
          <text:p/>
        </draw:polygon>
        <draw:polygon draw:style-name="gr5" draw:text-style-name="P6" draw:layer="layout" svg:width="0.787cm" svg:height="0.009cm" svg:x="8.636cm" svg:y="17.957cm" svg:viewBox="0 0 788 10" draw:points="0,10 788,10 788,0 0,0">
          <text:p/>
        </draw:polygon>
        <draw:polygon draw:style-name="gr5" draw:text-style-name="P6" draw:layer="layout" svg:width="0.008cm" svg:height="0.051cm" svg:x="9.423cm" svg:y="17.957cm" svg:viewBox="0 0 9 52" draw:points="0,52 9,52 9,0 0,0">
          <text:p/>
        </draw:polygon>
        <draw:polygon draw:style-name="gr5" draw:text-style-name="P6" draw:layer="layout" svg:width="0.788cm" svg:height="0.009cm" svg:x="9.431cm" svg:y="17.957cm" svg:viewBox="0 0 789 10" draw:points="0,10 789,10 789,0 0,0">
          <text:p/>
        </draw:polygon>
        <draw:polygon draw:style-name="gr5" draw:text-style-name="P6" draw:layer="layout" svg:width="0.008cm" svg:height="0.051cm" svg:x="10.219cm" svg:y="17.957cm" svg:viewBox="0 0 9 52" draw:points="0,52 9,52 9,0 0,0">
          <text:p/>
        </draw:polygon>
        <draw:polygon draw:style-name="gr5" draw:text-style-name="P6" draw:layer="layout" svg:width="1.414cm" svg:height="0.009cm" svg:x="10.227cm" svg:y="17.957cm" svg:viewBox="0 0 1415 10" draw:points="0,10 1415,10 1415,0 0,0">
          <text:p/>
        </draw:polygon>
        <draw:polygon draw:style-name="gr5" draw:text-style-name="P6" draw:layer="layout" svg:width="0.009cm" svg:height="0.051cm" svg:x="11.641cm" svg:y="17.957cm" svg:viewBox="0 0 10 52" draw:points="0,52 10,52 10,0 0,0">
          <text:p/>
        </draw:polygon>
        <draw:polygon draw:style-name="gr5" draw:text-style-name="P6" draw:layer="layout" svg:width="0.626cm" svg:height="0.009cm" svg:x="11.65cm" svg:y="17.957cm" svg:viewBox="0 0 627 10" draw:points="0,10 627,10 627,0 0,0">
          <text:p/>
        </draw:polygon>
        <draw:polygon draw:style-name="gr5" draw:text-style-name="P6" draw:layer="layout" svg:width="0.009cm" svg:height="0.051cm" svg:x="12.276cm" svg:y="17.957cm" svg:viewBox="0 0 10 52" draw:points="0,52 10,52 10,0 0,0">
          <text:p/>
        </draw:polygon>
        <draw:polygon draw:style-name="gr5" draw:text-style-name="P6" draw:layer="layout" svg:width="1.109cm" svg:height="0.009cm" svg:x="12.285cm" svg:y="17.957cm" svg:viewBox="0 0 1110 10" draw:points="0,10 1110,10 1110,0 0,0">
          <text:p/>
        </draw:polygon>
        <draw:polygon draw:style-name="gr5" draw:text-style-name="P6" draw:layer="layout" svg:width="0.008cm" svg:height="0.051cm" svg:x="13.394cm" svg:y="17.957cm" svg:viewBox="0 0 9 52" draw:points="0,52 9,52 9,0 0,0">
          <text:p/>
        </draw:polygon>
        <draw:polygon draw:style-name="gr5" draw:text-style-name="P6" draw:layer="layout" svg:width="1.101cm" svg:height="0.009cm" svg:x="13.402cm" svg:y="17.957cm" svg:viewBox="0 0 1102 10" draw:points="0,10 1102,10 1102,0 0,0">
          <text:p/>
        </draw:polygon>
        <draw:polygon draw:style-name="gr5" draw:text-style-name="P6" draw:layer="layout" svg:width="0.008cm" svg:height="0.051cm" svg:x="14.503cm" svg:y="17.957cm" svg:viewBox="0 0 9 52" draw:points="0,52 9,52 9,0 0,0">
          <text:p/>
        </draw:polygon>
        <draw:polygon draw:style-name="gr5" draw:text-style-name="P6" draw:layer="layout" svg:width="0.009cm" svg:height="0.423cm" svg:x="2.277cm" svg:y="18.008cm" svg:viewBox="0 0 10 424" draw:points="0,424 10,424 10,0 0,0">
          <text:p/>
        </draw:polygon>
        <draw:polygon draw:style-name="gr5" draw:text-style-name="P6" draw:layer="layout" svg:width="0.009cm" svg:height="0.423cm" svg:x="7.831cm" svg:y="18.008cm" svg:viewBox="0 0 10 424" draw:points="0,424 10,424 10,0 0,0">
          <text:p/>
        </draw:polygon>
        <draw:polygon draw:style-name="gr5" draw:text-style-name="P6" draw:layer="layout" svg:width="0.01cm" svg:height="0.423cm" svg:x="8.627cm" svg:y="18.008cm" svg:viewBox="0 0 11 424" draw:points="0,424 11,424 11,0 0,0">
          <text:p/>
        </draw:polygon>
        <draw:polygon draw:style-name="gr5" draw:text-style-name="P6" draw:layer="layout" svg:width="0.008cm" svg:height="0.423cm" svg:x="9.423cm" svg:y="18.008cm" svg:viewBox="0 0 9 424" draw:points="0,424 9,424 9,0 0,0">
          <text:p/>
        </draw:polygon>
        <draw:polygon draw:style-name="gr5" draw:text-style-name="P6" draw:layer="layout" svg:width="0.008cm" svg:height="0.423cm" svg:x="10.219cm" svg:y="18.008cm" svg:viewBox="0 0 9 424" draw:points="0,424 9,424 9,0 0,0">
          <text:p/>
        </draw:polygon>
        <draw:polygon draw:style-name="gr5" draw:text-style-name="P6" draw:layer="layout" svg:width="0.009cm" svg:height="0.423cm" svg:x="11.641cm" svg:y="18.008cm" svg:viewBox="0 0 10 424" draw:points="0,424 10,424 10,0 0,0">
          <text:p/>
        </draw:polygon>
        <draw:polygon draw:style-name="gr5" draw:text-style-name="P6" draw:layer="layout" svg:width="0.009cm" svg:height="0.423cm" svg:x="12.276cm" svg:y="18.008cm" svg:viewBox="0 0 10 424" draw:points="0,424 10,424 10,0 0,0">
          <text:p/>
        </draw:polygon>
        <draw:polygon draw:style-name="gr5" draw:text-style-name="P6" draw:layer="layout" svg:width="0.008cm" svg:height="0.423cm" svg:x="13.394cm" svg:y="18.008cm" svg:viewBox="0 0 9 424" draw:points="0,424 9,424 9,0 0,0">
          <text:p/>
        </draw:polygon>
        <draw:polygon draw:style-name="gr5" draw:text-style-name="P6" draw:layer="layout" svg:width="0.008cm" svg:height="0.423cm" svg:x="14.503cm" svg:y="18.008cm" svg:viewBox="0 0 9 424" draw:points="0,424 9,424 9,0 0,0">
          <text:p/>
        </draw:polygon>
        <draw:frame draw:style-name="gr1" draw:text-style-name="P2" draw:layer="layout" svg:width="0.321cm" svg:height="0.357cm" svg:x="13.454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337cm" svg:y="18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18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18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18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0.279cm" svg:y="18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701cm" svg:y="18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2.336cm" svg:y="18.492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1cm" svg:x="2.277cm" svg:y="18.431cm" svg:viewBox="0 0 10 52" draw:points="0,52 10,52 10,0 0,0">
          <text:p/>
        </draw:polygon>
        <draw:polygon draw:style-name="gr5" draw:text-style-name="P6" draw:layer="layout" svg:width="5.545cm" svg:height="0.009cm" svg:x="2.286cm" svg:y="18.431cm" svg:viewBox="0 0 5546 10" draw:points="0,10 5546,10 5546,0 0,0">
          <text:p/>
        </draw:polygon>
        <draw:polygon draw:style-name="gr5" draw:text-style-name="P6" draw:layer="layout" svg:width="0.009cm" svg:height="0.051cm" svg:x="7.831cm" svg:y="18.431cm" svg:viewBox="0 0 10 52" draw:points="0,52 10,52 10,0 0,0">
          <text:p/>
        </draw:polygon>
        <draw:polygon draw:style-name="gr5" draw:text-style-name="P6" draw:layer="layout" svg:width="0.787cm" svg:height="0.009cm" svg:x="7.84cm" svg:y="18.431cm" svg:viewBox="0 0 788 10" draw:points="0,10 788,10 788,0 0,0">
          <text:p/>
        </draw:polygon>
        <draw:polygon draw:style-name="gr5" draw:text-style-name="P6" draw:layer="layout" svg:width="0.01cm" svg:height="0.051cm" svg:x="8.627cm" svg:y="18.431cm" svg:viewBox="0 0 11 52" draw:points="0,52 11,52 11,0 0,0">
          <text:p/>
        </draw:polygon>
        <draw:polygon draw:style-name="gr5" draw:text-style-name="P6" draw:layer="layout" svg:width="0.787cm" svg:height="0.009cm" svg:x="8.636cm" svg:y="18.431cm" svg:viewBox="0 0 788 10" draw:points="0,10 788,10 788,0 0,0">
          <text:p/>
        </draw:polygon>
        <draw:polygon draw:style-name="gr5" draw:text-style-name="P6" draw:layer="layout" svg:width="0.008cm" svg:height="0.051cm" svg:x="9.423cm" svg:y="18.431cm" svg:viewBox="0 0 9 52" draw:points="0,52 9,52 9,0 0,0">
          <text:p/>
        </draw:polygon>
        <draw:polygon draw:style-name="gr5" draw:text-style-name="P6" draw:layer="layout" svg:width="0.788cm" svg:height="0.009cm" svg:x="9.431cm" svg:y="18.431cm" svg:viewBox="0 0 789 10" draw:points="0,10 789,10 789,0 0,0">
          <text:p/>
        </draw:polygon>
        <draw:polygon draw:style-name="gr5" draw:text-style-name="P6" draw:layer="layout" svg:width="0.008cm" svg:height="0.051cm" svg:x="10.219cm" svg:y="18.431cm" svg:viewBox="0 0 9 52" draw:points="0,52 9,52 9,0 0,0">
          <text:p/>
        </draw:polygon>
        <draw:polygon draw:style-name="gr5" draw:text-style-name="P6" draw:layer="layout" svg:width="1.414cm" svg:height="0.009cm" svg:x="10.227cm" svg:y="18.431cm" svg:viewBox="0 0 1415 10" draw:points="0,10 1415,10 1415,0 0,0">
          <text:p/>
        </draw:polygon>
        <draw:polygon draw:style-name="gr5" draw:text-style-name="P6" draw:layer="layout" svg:width="0.009cm" svg:height="0.051cm" svg:x="11.641cm" svg:y="18.431cm" svg:viewBox="0 0 10 52" draw:points="0,52 10,52 10,0 0,0">
          <text:p/>
        </draw:polygon>
        <draw:polygon draw:style-name="gr5" draw:text-style-name="P6" draw:layer="layout" svg:width="0.626cm" svg:height="0.009cm" svg:x="11.65cm" svg:y="18.431cm" svg:viewBox="0 0 627 10" draw:points="0,10 627,10 627,0 0,0">
          <text:p/>
        </draw:polygon>
        <draw:polygon draw:style-name="gr5" draw:text-style-name="P6" draw:layer="layout" svg:width="0.009cm" svg:height="0.051cm" svg:x="12.276cm" svg:y="18.431cm" svg:viewBox="0 0 10 52" draw:points="0,52 10,52 10,0 0,0">
          <text:p/>
        </draw:polygon>
        <draw:polygon draw:style-name="gr5" draw:text-style-name="P6" draw:layer="layout" svg:width="1.109cm" svg:height="0.009cm" svg:x="12.285cm" svg:y="18.431cm" svg:viewBox="0 0 1110 10" draw:points="0,10 1110,10 1110,0 0,0">
          <text:p/>
        </draw:polygon>
        <draw:polygon draw:style-name="gr5" draw:text-style-name="P6" draw:layer="layout" svg:width="0.008cm" svg:height="0.051cm" svg:x="13.394cm" svg:y="18.431cm" svg:viewBox="0 0 9 52" draw:points="0,52 9,52 9,0 0,0">
          <text:p/>
        </draw:polygon>
        <draw:polygon draw:style-name="gr5" draw:text-style-name="P6" draw:layer="layout" svg:width="1.101cm" svg:height="0.009cm" svg:x="13.402cm" svg:y="18.431cm" svg:viewBox="0 0 1102 10" draw:points="0,10 1102,10 1102,0 0,0">
          <text:p/>
        </draw:polygon>
        <draw:polygon draw:style-name="gr5" draw:text-style-name="P6" draw:layer="layout" svg:width="0.008cm" svg:height="0.051cm" svg:x="14.503cm" svg:y="18.431cm" svg:viewBox="0 0 9 52" draw:points="0,52 9,52 9,0 0,0">
          <text:p/>
        </draw:polygon>
        <draw:polygon draw:style-name="gr5" draw:text-style-name="P6" draw:layer="layout" svg:width="0.009cm" svg:height="0.415cm" svg:x="2.277cm" svg:y="18.482cm" svg:viewBox="0 0 10 416" draw:points="0,416 10,416 10,0 0,0">
          <text:p/>
        </draw:polygon>
        <draw:polygon draw:style-name="gr5" draw:text-style-name="P6" draw:layer="layout" svg:width="0.009cm" svg:height="0.415cm" svg:x="7.831cm" svg:y="18.482cm" svg:viewBox="0 0 10 416" draw:points="0,416 10,416 10,0 0,0">
          <text:p/>
        </draw:polygon>
        <draw:polygon draw:style-name="gr5" draw:text-style-name="P6" draw:layer="layout" svg:width="0.01cm" svg:height="0.415cm" svg:x="8.627cm" svg:y="18.482cm" svg:viewBox="0 0 11 416" draw:points="0,416 11,416 11,0 0,0">
          <text:p/>
        </draw:polygon>
        <draw:polygon draw:style-name="gr5" draw:text-style-name="P6" draw:layer="layout" svg:width="0.008cm" svg:height="0.415cm" svg:x="9.423cm" svg:y="18.482cm" svg:viewBox="0 0 9 416" draw:points="0,416 9,416 9,0 0,0">
          <text:p/>
        </draw:polygon>
        <draw:polygon draw:style-name="gr5" draw:text-style-name="P6" draw:layer="layout" svg:width="0.008cm" svg:height="0.415cm" svg:x="10.219cm" svg:y="18.482cm" svg:viewBox="0 0 9 416" draw:points="0,416 9,416 9,0 0,0">
          <text:p/>
        </draw:polygon>
        <draw:polygon draw:style-name="gr5" draw:text-style-name="P6" draw:layer="layout" svg:width="0.009cm" svg:height="0.415cm" svg:x="11.641cm" svg:y="18.482cm" svg:viewBox="0 0 10 416" draw:points="0,416 10,416 10,0 0,0">
          <text:p/>
        </draw:polygon>
        <draw:polygon draw:style-name="gr5" draw:text-style-name="P6" draw:layer="layout" svg:width="0.009cm" svg:height="0.415cm" svg:x="12.276cm" svg:y="18.482cm" svg:viewBox="0 0 10 416" draw:points="0,416 10,416 10,0 0,0">
          <text:p/>
        </draw:polygon>
        <draw:polygon draw:style-name="gr5" draw:text-style-name="P6" draw:layer="layout" svg:width="0.008cm" svg:height="0.415cm" svg:x="13.394cm" svg:y="18.482cm" svg:viewBox="0 0 9 416" draw:points="0,416 9,416 9,0 0,0">
          <text:p/>
        </draw:polygon>
        <draw:polygon draw:style-name="gr5" draw:text-style-name="P6" draw:layer="layout" svg:width="0.008cm" svg:height="0.415cm" svg:x="14.503cm" svg:y="18.482cm" svg:viewBox="0 0 9 416" draw:points="0,416 9,416 9,0 0,0">
          <text:p/>
        </draw:polygon>
        <draw:frame draw:style-name="gr1" draw:text-style-name="P2" draw:layer="layout" svg:width="0.321cm" svg:height="0.357cm" svg:x="13.454cm" svg:y="18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337cm" svg:y="18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18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18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18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0.279cm" svg:y="18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701cm" svg:y="18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2.336cm" svg:y="18.958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1cm" svg:x="2.277cm" svg:y="18.897cm" svg:viewBox="0 0 10 52" draw:points="0,52 10,52 10,0 0,0">
          <text:p/>
        </draw:polygon>
        <draw:polygon draw:style-name="gr5" draw:text-style-name="P6" draw:layer="layout" svg:width="5.545cm" svg:height="0.009cm" svg:x="2.286cm" svg:y="18.897cm" svg:viewBox="0 0 5546 10" draw:points="0,10 5546,10 5546,0 0,0">
          <text:p/>
        </draw:polygon>
        <draw:polygon draw:style-name="gr5" draw:text-style-name="P6" draw:layer="layout" svg:width="0.009cm" svg:height="0.051cm" svg:x="7.831cm" svg:y="18.897cm" svg:viewBox="0 0 10 52" draw:points="0,52 10,52 10,0 0,0">
          <text:p/>
        </draw:polygon>
        <draw:polygon draw:style-name="gr5" draw:text-style-name="P6" draw:layer="layout" svg:width="0.787cm" svg:height="0.009cm" svg:x="7.84cm" svg:y="18.897cm" svg:viewBox="0 0 788 10" draw:points="0,10 788,10 788,0 0,0">
          <text:p/>
        </draw:polygon>
        <draw:polygon draw:style-name="gr5" draw:text-style-name="P6" draw:layer="layout" svg:width="0.01cm" svg:height="0.051cm" svg:x="8.627cm" svg:y="18.897cm" svg:viewBox="0 0 11 52" draw:points="0,52 11,52 11,0 0,0">
          <text:p/>
        </draw:polygon>
        <draw:polygon draw:style-name="gr5" draw:text-style-name="P6" draw:layer="layout" svg:width="0.787cm" svg:height="0.009cm" svg:x="8.636cm" svg:y="18.897cm" svg:viewBox="0 0 788 10" draw:points="0,10 788,10 788,0 0,0">
          <text:p/>
        </draw:polygon>
        <draw:polygon draw:style-name="gr5" draw:text-style-name="P6" draw:layer="layout" svg:width="0.008cm" svg:height="0.051cm" svg:x="9.423cm" svg:y="18.897cm" svg:viewBox="0 0 9 52" draw:points="0,52 9,52 9,0 0,0">
          <text:p/>
        </draw:polygon>
        <draw:polygon draw:style-name="gr5" draw:text-style-name="P6" draw:layer="layout" svg:width="0.788cm" svg:height="0.009cm" svg:x="9.431cm" svg:y="18.897cm" svg:viewBox="0 0 789 10" draw:points="0,10 789,10 789,0 0,0">
          <text:p/>
        </draw:polygon>
        <draw:polygon draw:style-name="gr5" draw:text-style-name="P6" draw:layer="layout" svg:width="0.008cm" svg:height="0.051cm" svg:x="10.219cm" svg:y="18.897cm" svg:viewBox="0 0 9 52" draw:points="0,52 9,52 9,0 0,0">
          <text:p/>
        </draw:polygon>
        <draw:polygon draw:style-name="gr5" draw:text-style-name="P6" draw:layer="layout" svg:width="1.414cm" svg:height="0.009cm" svg:x="10.227cm" svg:y="18.897cm" svg:viewBox="0 0 1415 10" draw:points="0,10 1415,10 1415,0 0,0">
          <text:p/>
        </draw:polygon>
        <draw:polygon draw:style-name="gr5" draw:text-style-name="P6" draw:layer="layout" svg:width="0.009cm" svg:height="0.051cm" svg:x="11.641cm" svg:y="18.897cm" svg:viewBox="0 0 10 52" draw:points="0,52 10,52 10,0 0,0">
          <text:p/>
        </draw:polygon>
        <draw:polygon draw:style-name="gr5" draw:text-style-name="P6" draw:layer="layout" svg:width="0.626cm" svg:height="0.009cm" svg:x="11.65cm" svg:y="18.897cm" svg:viewBox="0 0 627 10" draw:points="0,10 627,10 627,0 0,0">
          <text:p/>
        </draw:polygon>
        <draw:polygon draw:style-name="gr5" draw:text-style-name="P6" draw:layer="layout" svg:width="0.009cm" svg:height="0.051cm" svg:x="12.276cm" svg:y="18.897cm" svg:viewBox="0 0 10 52" draw:points="0,52 10,52 10,0 0,0">
          <text:p/>
        </draw:polygon>
        <draw:polygon draw:style-name="gr5" draw:text-style-name="P6" draw:layer="layout" svg:width="1.109cm" svg:height="0.009cm" svg:x="12.285cm" svg:y="18.897cm" svg:viewBox="0 0 1110 10" draw:points="0,10 1110,10 1110,0 0,0">
          <text:p/>
        </draw:polygon>
        <draw:polygon draw:style-name="gr5" draw:text-style-name="P6" draw:layer="layout" svg:width="0.008cm" svg:height="0.051cm" svg:x="13.394cm" svg:y="18.897cm" svg:viewBox="0 0 9 52" draw:points="0,52 9,52 9,0 0,0">
          <text:p/>
        </draw:polygon>
        <draw:polygon draw:style-name="gr5" draw:text-style-name="P6" draw:layer="layout" svg:width="1.101cm" svg:height="0.009cm" svg:x="13.402cm" svg:y="18.897cm" svg:viewBox="0 0 1102 10" draw:points="0,10 1102,10 1102,0 0,0">
          <text:p/>
        </draw:polygon>
        <draw:polygon draw:style-name="gr5" draw:text-style-name="P6" draw:layer="layout" svg:width="0.008cm" svg:height="0.051cm" svg:x="14.503cm" svg:y="18.897cm" svg:viewBox="0 0 9 52" draw:points="0,52 9,52 9,0 0,0">
          <text:p/>
        </draw:polygon>
        <draw:polygon draw:style-name="gr5" draw:text-style-name="P6" draw:layer="layout" svg:width="0.009cm" svg:height="0.415cm" svg:x="2.277cm" svg:y="18.948cm" svg:viewBox="0 0 10 416" draw:points="0,416 10,416 10,0 0,0">
          <text:p/>
        </draw:polygon>
        <draw:polygon draw:style-name="gr5" draw:text-style-name="P6" draw:layer="layout" svg:width="0.009cm" svg:height="0.415cm" svg:x="7.831cm" svg:y="18.948cm" svg:viewBox="0 0 10 416" draw:points="0,416 10,416 10,0 0,0">
          <text:p/>
        </draw:polygon>
        <draw:polygon draw:style-name="gr5" draw:text-style-name="P6" draw:layer="layout" svg:width="0.01cm" svg:height="0.415cm" svg:x="8.627cm" svg:y="18.948cm" svg:viewBox="0 0 11 416" draw:points="0,416 11,416 11,0 0,0">
          <text:p/>
        </draw:polygon>
        <draw:polygon draw:style-name="gr5" draw:text-style-name="P6" draw:layer="layout" svg:width="0.008cm" svg:height="0.415cm" svg:x="9.423cm" svg:y="18.948cm" svg:viewBox="0 0 9 416" draw:points="0,416 9,416 9,0 0,0">
          <text:p/>
        </draw:polygon>
        <draw:polygon draw:style-name="gr5" draw:text-style-name="P6" draw:layer="layout" svg:width="0.008cm" svg:height="0.415cm" svg:x="10.219cm" svg:y="18.948cm" svg:viewBox="0 0 9 416" draw:points="0,416 9,416 9,0 0,0">
          <text:p/>
        </draw:polygon>
        <draw:polygon draw:style-name="gr5" draw:text-style-name="P6" draw:layer="layout" svg:width="0.009cm" svg:height="0.415cm" svg:x="11.641cm" svg:y="18.948cm" svg:viewBox="0 0 10 416" draw:points="0,416 10,416 10,0 0,0">
          <text:p/>
        </draw:polygon>
        <draw:polygon draw:style-name="gr5" draw:text-style-name="P6" draw:layer="layout" svg:width="0.009cm" svg:height="0.415cm" svg:x="12.276cm" svg:y="18.948cm" svg:viewBox="0 0 10 416" draw:points="0,416 10,416 10,0 0,0">
          <text:p/>
        </draw:polygon>
        <draw:polygon draw:style-name="gr5" draw:text-style-name="P6" draw:layer="layout" svg:width="0.008cm" svg:height="0.415cm" svg:x="13.394cm" svg:y="18.948cm" svg:viewBox="0 0 9 416" draw:points="0,416 9,416 9,0 0,0">
          <text:p/>
        </draw:polygon>
        <draw:polygon draw:style-name="gr5" draw:text-style-name="P6" draw:layer="layout" svg:width="0.008cm" svg:height="0.415cm" svg:x="14.503cm" svg:y="18.948cm" svg:viewBox="0 0 9 416" draw:points="0,416 9,416 9,0 0,0">
          <text:p/>
        </draw:polygon>
        <draw:frame draw:style-name="gr1" draw:text-style-name="P2" draw:layer="layout" svg:width="0.321cm" svg:height="0.357cm" svg:x="13.454cm" svg:y="18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337cm" svg:y="19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19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19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19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0.279cm" svg:y="19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701cm" svg:y="19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2.336cm" svg:y="19.424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1cm" svg:x="2.277cm" svg:y="19.363cm" svg:viewBox="0 0 10 52" draw:points="0,52 10,52 10,0 0,0">
          <text:p/>
        </draw:polygon>
        <draw:polygon draw:style-name="gr5" draw:text-style-name="P6" draw:layer="layout" svg:width="5.545cm" svg:height="0.008cm" svg:x="2.286cm" svg:y="19.363cm" svg:viewBox="0 0 5546 9" draw:points="0,9 5546,9 5546,0 0,0">
          <text:p/>
        </draw:polygon>
        <draw:polygon draw:style-name="gr5" draw:text-style-name="P6" draw:layer="layout" svg:width="0.009cm" svg:height="0.051cm" svg:x="7.831cm" svg:y="19.363cm" svg:viewBox="0 0 10 52" draw:points="0,52 10,52 10,0 0,0">
          <text:p/>
        </draw:polygon>
        <draw:polygon draw:style-name="gr5" draw:text-style-name="P6" draw:layer="layout" svg:width="0.787cm" svg:height="0.008cm" svg:x="7.84cm" svg:y="19.363cm" svg:viewBox="0 0 788 9" draw:points="0,9 788,9 788,0 0,0">
          <text:p/>
        </draw:polygon>
        <draw:polygon draw:style-name="gr5" draw:text-style-name="P6" draw:layer="layout" svg:width="0.01cm" svg:height="0.051cm" svg:x="8.627cm" svg:y="19.363cm" svg:viewBox="0 0 11 52" draw:points="0,52 11,52 11,0 0,0">
          <text:p/>
        </draw:polygon>
        <draw:polygon draw:style-name="gr5" draw:text-style-name="P6" draw:layer="layout" svg:width="0.787cm" svg:height="0.008cm" svg:x="8.636cm" svg:y="19.363cm" svg:viewBox="0 0 788 9" draw:points="0,9 788,9 788,0 0,0">
          <text:p/>
        </draw:polygon>
        <draw:polygon draw:style-name="gr5" draw:text-style-name="P6" draw:layer="layout" svg:width="0.008cm" svg:height="0.051cm" svg:x="9.423cm" svg:y="19.363cm" svg:viewBox="0 0 9 52" draw:points="0,52 9,52 9,0 0,0">
          <text:p/>
        </draw:polygon>
        <draw:polygon draw:style-name="gr5" draw:text-style-name="P6" draw:layer="layout" svg:width="0.788cm" svg:height="0.008cm" svg:x="9.431cm" svg:y="19.363cm" svg:viewBox="0 0 789 9" draw:points="0,9 789,9 789,0 0,0">
          <text:p/>
        </draw:polygon>
        <draw:polygon draw:style-name="gr5" draw:text-style-name="P6" draw:layer="layout" svg:width="0.008cm" svg:height="0.051cm" svg:x="10.219cm" svg:y="19.363cm" svg:viewBox="0 0 9 52" draw:points="0,52 9,52 9,0 0,0">
          <text:p/>
        </draw:polygon>
        <draw:polygon draw:style-name="gr5" draw:text-style-name="P6" draw:layer="layout" svg:width="1.414cm" svg:height="0.008cm" svg:x="10.227cm" svg:y="19.363cm" svg:viewBox="0 0 1415 9" draw:points="0,9 1415,9 1415,0 0,0">
          <text:p/>
        </draw:polygon>
        <draw:polygon draw:style-name="gr5" draw:text-style-name="P6" draw:layer="layout" svg:width="0.009cm" svg:height="0.051cm" svg:x="11.641cm" svg:y="19.363cm" svg:viewBox="0 0 10 52" draw:points="0,52 10,52 10,0 0,0">
          <text:p/>
        </draw:polygon>
        <draw:polygon draw:style-name="gr5" draw:text-style-name="P6" draw:layer="layout" svg:width="0.626cm" svg:height="0.008cm" svg:x="11.65cm" svg:y="19.363cm" svg:viewBox="0 0 627 9" draw:points="0,9 627,9 627,0 0,0">
          <text:p/>
        </draw:polygon>
        <draw:polygon draw:style-name="gr5" draw:text-style-name="P6" draw:layer="layout" svg:width="0.009cm" svg:height="0.051cm" svg:x="12.276cm" svg:y="19.363cm" svg:viewBox="0 0 10 52" draw:points="0,52 10,52 10,0 0,0">
          <text:p/>
        </draw:polygon>
        <draw:polygon draw:style-name="gr5" draw:text-style-name="P6" draw:layer="layout" svg:width="1.109cm" svg:height="0.008cm" svg:x="12.285cm" svg:y="19.363cm" svg:viewBox="0 0 1110 9" draw:points="0,9 1110,9 1110,0 0,0">
          <text:p/>
        </draw:polygon>
        <draw:polygon draw:style-name="gr5" draw:text-style-name="P6" draw:layer="layout" svg:width="0.008cm" svg:height="0.051cm" svg:x="13.394cm" svg:y="19.363cm" svg:viewBox="0 0 9 52" draw:points="0,52 9,52 9,0 0,0">
          <text:p/>
        </draw:polygon>
        <draw:polygon draw:style-name="gr5" draw:text-style-name="P6" draw:layer="layout" svg:width="1.101cm" svg:height="0.008cm" svg:x="13.402cm" svg:y="19.363cm" svg:viewBox="0 0 1102 9" draw:points="0,9 1102,9 1102,0 0,0">
          <text:p/>
        </draw:polygon>
        <draw:polygon draw:style-name="gr5" draw:text-style-name="P6" draw:layer="layout" svg:width="0.008cm" svg:height="0.051cm" svg:x="14.503cm" svg:y="19.363cm" svg:viewBox="0 0 9 52" draw:points="0,52 9,52 9,0 0,0">
          <text:p/>
        </draw:polygon>
        <draw:polygon draw:style-name="gr5" draw:text-style-name="P6" draw:layer="layout" svg:width="0.009cm" svg:height="0.414cm" svg:x="2.277cm" svg:y="19.414cm" svg:viewBox="0 0 10 415" draw:points="0,415 10,415 10,0 0,0">
          <text:p/>
        </draw:polygon>
        <draw:polygon draw:style-name="gr5" draw:text-style-name="P6" draw:layer="layout" svg:width="0.009cm" svg:height="0.414cm" svg:x="7.831cm" svg:y="19.414cm" svg:viewBox="0 0 10 415" draw:points="0,415 10,415 10,0 0,0">
          <text:p/>
        </draw:polygon>
        <draw:polygon draw:style-name="gr5" draw:text-style-name="P6" draw:layer="layout" svg:width="0.01cm" svg:height="0.414cm" svg:x="8.627cm" svg:y="19.414cm" svg:viewBox="0 0 11 415" draw:points="0,415 11,415 11,0 0,0">
          <text:p/>
        </draw:polygon>
        <draw:polygon draw:style-name="gr5" draw:text-style-name="P6" draw:layer="layout" svg:width="0.008cm" svg:height="0.414cm" svg:x="9.423cm" svg:y="19.414cm" svg:viewBox="0 0 9 415" draw:points="0,415 9,415 9,0 0,0">
          <text:p/>
        </draw:polygon>
        <draw:polygon draw:style-name="gr5" draw:text-style-name="P6" draw:layer="layout" svg:width="0.008cm" svg:height="0.414cm" svg:x="10.219cm" svg:y="19.414cm" svg:viewBox="0 0 9 415" draw:points="0,415 9,415 9,0 0,0">
          <text:p/>
        </draw:polygon>
        <draw:polygon draw:style-name="gr5" draw:text-style-name="P6" draw:layer="layout" svg:width="0.009cm" svg:height="0.414cm" svg:x="11.641cm" svg:y="19.414cm" svg:viewBox="0 0 10 415" draw:points="0,415 10,415 10,0 0,0">
          <text:p/>
        </draw:polygon>
        <draw:polygon draw:style-name="gr5" draw:text-style-name="P6" draw:layer="layout" svg:width="0.009cm" svg:height="0.414cm" svg:x="12.276cm" svg:y="19.414cm" svg:viewBox="0 0 10 415" draw:points="0,415 10,415 10,0 0,0">
          <text:p/>
        </draw:polygon>
        <draw:polygon draw:style-name="gr5" draw:text-style-name="P6" draw:layer="layout" svg:width="0.008cm" svg:height="0.414cm" svg:x="13.394cm" svg:y="19.414cm" svg:viewBox="0 0 9 415" draw:points="0,415 9,415 9,0 0,0">
          <text:p/>
        </draw:polygon>
        <draw:polygon draw:style-name="gr5" draw:text-style-name="P6" draw:layer="layout" svg:width="0.008cm" svg:height="0.414cm" svg:x="14.503cm" svg:y="19.414cm" svg:viewBox="0 0 9 415" draw:points="0,415 9,415 9,0 0,0">
          <text:p/>
        </draw:polygon>
        <draw:frame draw:style-name="gr1" draw:text-style-name="P2" draw:layer="layout" svg:width="0.321cm" svg:height="0.357cm" svg:x="13.454cm" svg:y="19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337cm" svg:y="19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19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19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19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0.279cm" svg:y="19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1.701cm" svg:y="19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2.336cm" svg:y="19.889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1cm" svg:x="2.277cm" svg:y="19.828cm" svg:viewBox="0 0 10 52" draw:points="0,52 10,52 10,0 0,0">
          <text:p/>
        </draw:polygon>
        <draw:polygon draw:style-name="gr5" draw:text-style-name="P6" draw:layer="layout" svg:width="5.545cm" svg:height="0.009cm" svg:x="2.286cm" svg:y="19.828cm" svg:viewBox="0 0 5546 10" draw:points="0,10 5546,10 5546,0 0,0">
          <text:p/>
        </draw:polygon>
        <draw:polygon draw:style-name="gr5" draw:text-style-name="P6" draw:layer="layout" svg:width="0.009cm" svg:height="0.051cm" svg:x="7.831cm" svg:y="19.828cm" svg:viewBox="0 0 10 52" draw:points="0,52 10,52 10,0 0,0">
          <text:p/>
        </draw:polygon>
        <draw:polygon draw:style-name="gr5" draw:text-style-name="P6" draw:layer="layout" svg:width="0.787cm" svg:height="0.009cm" svg:x="7.84cm" svg:y="19.828cm" svg:viewBox="0 0 788 10" draw:points="0,10 788,10 788,0 0,0">
          <text:p/>
        </draw:polygon>
        <draw:polygon draw:style-name="gr5" draw:text-style-name="P6" draw:layer="layout" svg:width="0.01cm" svg:height="0.051cm" svg:x="8.627cm" svg:y="19.828cm" svg:viewBox="0 0 11 52" draw:points="0,52 11,52 11,0 0,0">
          <text:p/>
        </draw:polygon>
        <draw:polygon draw:style-name="gr5" draw:text-style-name="P6" draw:layer="layout" svg:width="0.787cm" svg:height="0.009cm" svg:x="8.636cm" svg:y="19.828cm" svg:viewBox="0 0 788 10" draw:points="0,10 788,10 788,0 0,0">
          <text:p/>
        </draw:polygon>
        <draw:polygon draw:style-name="gr5" draw:text-style-name="P6" draw:layer="layout" svg:width="0.008cm" svg:height="0.051cm" svg:x="9.423cm" svg:y="19.828cm" svg:viewBox="0 0 9 52" draw:points="0,52 9,52 9,0 0,0">
          <text:p/>
        </draw:polygon>
        <draw:polygon draw:style-name="gr5" draw:text-style-name="P6" draw:layer="layout" svg:width="0.788cm" svg:height="0.009cm" svg:x="9.431cm" svg:y="19.828cm" svg:viewBox="0 0 789 10" draw:points="0,10 789,10 789,0 0,0">
          <text:p/>
        </draw:polygon>
        <draw:polygon draw:style-name="gr5" draw:text-style-name="P6" draw:layer="layout" svg:width="0.008cm" svg:height="0.051cm" svg:x="10.219cm" svg:y="19.828cm" svg:viewBox="0 0 9 52" draw:points="0,52 9,52 9,0 0,0">
          <text:p/>
        </draw:polygon>
        <draw:polygon draw:style-name="gr5" draw:text-style-name="P6" draw:layer="layout" svg:width="1.414cm" svg:height="0.009cm" svg:x="10.227cm" svg:y="19.828cm" svg:viewBox="0 0 1415 10" draw:points="0,10 1415,10 1415,0 0,0">
          <text:p/>
        </draw:polygon>
        <draw:polygon draw:style-name="gr5" draw:text-style-name="P6" draw:layer="layout" svg:width="0.009cm" svg:height="0.051cm" svg:x="11.641cm" svg:y="19.828cm" svg:viewBox="0 0 10 52" draw:points="0,52 10,52 10,0 0,0">
          <text:p/>
        </draw:polygon>
        <draw:polygon draw:style-name="gr5" draw:text-style-name="P6" draw:layer="layout" svg:width="0.626cm" svg:height="0.009cm" svg:x="11.65cm" svg:y="19.828cm" svg:viewBox="0 0 627 10" draw:points="0,10 627,10 627,0 0,0">
          <text:p/>
        </draw:polygon>
        <draw:polygon draw:style-name="gr5" draw:text-style-name="P6" draw:layer="layout" svg:width="0.009cm" svg:height="0.051cm" svg:x="12.276cm" svg:y="19.828cm" svg:viewBox="0 0 10 52" draw:points="0,52 10,52 10,0 0,0">
          <text:p/>
        </draw:polygon>
        <draw:polygon draw:style-name="gr5" draw:text-style-name="P6" draw:layer="layout" svg:width="1.109cm" svg:height="0.009cm" svg:x="12.285cm" svg:y="19.828cm" svg:viewBox="0 0 1110 10" draw:points="0,10 1110,10 1110,0 0,0">
          <text:p/>
        </draw:polygon>
        <draw:polygon draw:style-name="gr5" draw:text-style-name="P6" draw:layer="layout" svg:width="0.008cm" svg:height="0.051cm" svg:x="13.394cm" svg:y="19.828cm" svg:viewBox="0 0 9 52" draw:points="0,52 9,52 9,0 0,0">
          <text:p/>
        </draw:polygon>
        <draw:polygon draw:style-name="gr5" draw:text-style-name="P6" draw:layer="layout" svg:width="1.101cm" svg:height="0.009cm" svg:x="13.402cm" svg:y="19.828cm" svg:viewBox="0 0 1102 10" draw:points="0,10 1102,10 1102,0 0,0">
          <text:p/>
        </draw:polygon>
        <draw:polygon draw:style-name="gr5" draw:text-style-name="P6" draw:layer="layout" svg:width="0.008cm" svg:height="0.051cm" svg:x="14.503cm" svg:y="19.828cm" svg:viewBox="0 0 9 52" draw:points="0,52 9,52 9,0 0,0">
          <text:p/>
        </draw:polygon>
        <draw:polygon draw:style-name="gr5" draw:text-style-name="P6" draw:layer="layout" svg:width="0.009cm" svg:height="0.415cm" svg:x="2.277cm" svg:y="19.879cm" svg:viewBox="0 0 10 416" draw:points="0,416 10,416 10,0 0,0">
          <text:p/>
        </draw:polygon>
        <draw:polygon draw:style-name="gr5" draw:text-style-name="P6" draw:layer="layout" svg:width="0.009cm" svg:height="0.415cm" svg:x="7.831cm" svg:y="19.879cm" svg:viewBox="0 0 10 416" draw:points="0,416 10,416 10,0 0,0">
          <text:p/>
        </draw:polygon>
        <draw:polygon draw:style-name="gr5" draw:text-style-name="P6" draw:layer="layout" svg:width="0.01cm" svg:height="0.415cm" svg:x="8.627cm" svg:y="19.879cm" svg:viewBox="0 0 11 416" draw:points="0,416 11,416 11,0 0,0">
          <text:p/>
        </draw:polygon>
        <draw:polygon draw:style-name="gr5" draw:text-style-name="P6" draw:layer="layout" svg:width="0.008cm" svg:height="0.415cm" svg:x="9.423cm" svg:y="19.879cm" svg:viewBox="0 0 9 416" draw:points="0,416 9,416 9,0 0,0">
          <text:p/>
        </draw:polygon>
        <draw:polygon draw:style-name="gr5" draw:text-style-name="P6" draw:layer="layout" svg:width="0.008cm" svg:height="0.415cm" svg:x="10.219cm" svg:y="19.879cm" svg:viewBox="0 0 9 416" draw:points="0,416 9,416 9,0 0,0">
          <text:p/>
        </draw:polygon>
        <draw:polygon draw:style-name="gr5" draw:text-style-name="P6" draw:layer="layout" svg:width="0.009cm" svg:height="0.415cm" svg:x="11.641cm" svg:y="19.879cm" svg:viewBox="0 0 10 416" draw:points="0,416 10,416 10,0 0,0">
          <text:p/>
        </draw:polygon>
        <draw:polygon draw:style-name="gr5" draw:text-style-name="P6" draw:layer="layout" svg:width="0.009cm" svg:height="0.415cm" svg:x="12.276cm" svg:y="19.879cm" svg:viewBox="0 0 10 416" draw:points="0,416 10,416 10,0 0,0">
          <text:p/>
        </draw:polygon>
        <draw:polygon draw:style-name="gr5" draw:text-style-name="P6" draw:layer="layout" svg:width="0.008cm" svg:height="0.415cm" svg:x="13.394cm" svg:y="19.879cm" svg:viewBox="0 0 9 416" draw:points="0,416 9,416 9,0 0,0">
          <text:p/>
        </draw:polygon>
        <draw:polygon draw:style-name="gr5" draw:text-style-name="P6" draw:layer="layout" svg:width="0.008cm" svg:height="0.415cm" svg:x="14.503cm" svg:y="19.879cm" svg:viewBox="0 0 9 416" draw:points="0,416 9,416 9,0 0,0">
          <text:p/>
        </draw:polygon>
        <draw:frame draw:style-name="gr1" draw:text-style-name="P2" draw:layer="layout" svg:width="0.321cm" svg:height="0.357cm" svg:x="13.454cm" svg:y="19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337cm" svg:y="20.3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7.891cm" svg:y="20.3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8.687cm" svg:y="20.3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9.483cm" svg:y="20.36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211cm" svg:height="0.239cm" svg:x="10.279cm" svg:y="20.36cm">
          <draw:text-box>
            <text:p text:style-name="P1"><text:span text:style-name="T5">s </text:span></text:p>
          </draw:text-box>
        </draw:frame>
        <draw:frame draw:style-name="gr6" draw:text-style-name="P7" draw:layer="layout" svg:width="0.218cm" svg:height="0.239cm" svg:x="10.914cm" svg:y="20.36cm">
          <draw:text-box>
            <text:p text:style-name="P1"><text:span text:style-name="T5">m </text:span></text:p>
          </draw:text-box>
        </draw:frame>
        <draw:frame draw:style-name="gr6" draw:text-style-name="P7" draw:layer="layout" svg:width="0.211cm" svg:height="0.239cm" svg:x="11.549cm" svg:y="20.36cm">
          <draw:text-box>
            <text:p text:style-name="P1"><text:span text:style-name="T5">l </text:span></text:p>
          </draw:text-box>
        </draw:frame>
        <draw:frame draw:style-name="gr1" draw:text-style-name="P2" draw:layer="layout" svg:width="0.321cm" svg:height="0.357cm" svg:x="12.336cm" svg:y="20.364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09cm" svg:height="0.051cm" svg:x="2.277cm" svg:y="20.294cm" svg:viewBox="0 0 10 52" draw:points="0,52 10,52 10,0 0,0">
          <text:p/>
        </draw:polygon>
        <draw:polygon draw:style-name="gr5" draw:text-style-name="P6" draw:layer="layout" svg:width="5.545cm" svg:height="0.009cm" svg:x="2.286cm" svg:y="20.294cm" svg:viewBox="0 0 5546 10" draw:points="0,10 5546,10 5546,0 0,0">
          <text:p/>
        </draw:polygon>
        <draw:polygon draw:style-name="gr5" draw:text-style-name="P6" draw:layer="layout" svg:width="0.009cm" svg:height="0.051cm" svg:x="7.831cm" svg:y="20.294cm" svg:viewBox="0 0 10 52" draw:points="0,52 10,52 10,0 0,0">
          <text:p/>
        </draw:polygon>
        <draw:polygon draw:style-name="gr5" draw:text-style-name="P6" draw:layer="layout" svg:width="0.787cm" svg:height="0.009cm" svg:x="7.84cm" svg:y="20.294cm" svg:viewBox="0 0 788 10" draw:points="0,10 788,10 788,0 0,0">
          <text:p/>
        </draw:polygon>
        <draw:polygon draw:style-name="gr5" draw:text-style-name="P6" draw:layer="layout" svg:width="0.01cm" svg:height="0.051cm" svg:x="8.627cm" svg:y="20.294cm" svg:viewBox="0 0 11 52" draw:points="0,52 11,52 11,0 0,0">
          <text:p/>
        </draw:polygon>
        <draw:polygon draw:style-name="gr5" draw:text-style-name="P6" draw:layer="layout" svg:width="0.787cm" svg:height="0.009cm" svg:x="8.636cm" svg:y="20.294cm" svg:viewBox="0 0 788 10" draw:points="0,10 788,10 788,0 0,0">
          <text:p/>
        </draw:polygon>
        <draw:polygon draw:style-name="gr5" draw:text-style-name="P6" draw:layer="layout" svg:width="0.008cm" svg:height="0.051cm" svg:x="9.423cm" svg:y="20.294cm" svg:viewBox="0 0 9 52" draw:points="0,52 9,52 9,0 0,0">
          <text:p/>
        </draw:polygon>
        <draw:polygon draw:style-name="gr5" draw:text-style-name="P6" draw:layer="layout" svg:width="0.788cm" svg:height="0.009cm" svg:x="9.431cm" svg:y="20.294cm" svg:viewBox="0 0 789 10" draw:points="0,10 789,10 789,0 0,0">
          <text:p/>
        </draw:polygon>
        <draw:polygon draw:style-name="gr5" draw:text-style-name="P6" draw:layer="layout" svg:width="0.008cm" svg:height="0.051cm" svg:x="10.219cm" svg:y="20.294cm" svg:viewBox="0 0 9 52" draw:points="0,52 9,52 9,0 0,0">
          <text:p/>
        </draw:polygon>
        <draw:polygon draw:style-name="gr5" draw:text-style-name="P6" draw:layer="layout" svg:width="0.627cm" svg:height="0.009cm" svg:x="10.227cm" svg:y="20.294cm" svg:viewBox="0 0 628 10" draw:points="0,10 628,10 628,0 0,0">
          <text:p/>
        </draw:polygon>
        <draw:polygon draw:style-name="gr5" draw:text-style-name="P6" draw:layer="layout" svg:width="0.008cm" svg:height="0.042cm" svg:x="10.854cm" svg:y="20.303cm" svg:viewBox="0 0 9 43" draw:points="0,43 9,43 9,0 0,0">
          <text:p/>
        </draw:polygon>
        <draw:polygon draw:style-name="gr5" draw:text-style-name="P6" draw:layer="layout" svg:width="0.008cm" svg:height="0.009cm" svg:x="10.854cm" svg:y="20.294cm" svg:viewBox="0 0 9 10" draw:points="0,10 9,10 9,0 0,0">
          <text:p/>
        </draw:polygon>
        <draw:polygon draw:style-name="gr5" draw:text-style-name="P6" draw:layer="layout" svg:width="0.627cm" svg:height="0.009cm" svg:x="10.862cm" svg:y="20.294cm" svg:viewBox="0 0 628 10" draw:points="0,10 628,10 628,0 0,0">
          <text:p/>
        </draw:polygon>
        <draw:polygon draw:style-name="gr5" draw:text-style-name="P6" draw:layer="layout" svg:width="0.008cm" svg:height="0.042cm" svg:x="11.489cm" svg:y="20.303cm" svg:viewBox="0 0 9 43" draw:points="0,43 9,43 9,0 0,0">
          <text:p/>
        </draw:polygon>
        <draw:polygon draw:style-name="gr5" draw:text-style-name="P6" draw:layer="layout" svg:width="0.008cm" svg:height="0.009cm" svg:x="11.489cm" svg:y="20.294cm" svg:viewBox="0 0 9 10" draw:points="0,10 9,10 9,0 0,0">
          <text:p/>
        </draw:polygon>
        <draw:polygon draw:style-name="gr5" draw:text-style-name="P6" draw:layer="layout" svg:width="0.144cm" svg:height="0.009cm" svg:x="11.497cm" svg:y="20.294cm" svg:viewBox="0 0 145 10" draw:points="0,10 145,10 145,0 0,0">
          <text:p/>
        </draw:polygon>
        <draw:polygon draw:style-name="gr5" draw:text-style-name="P6" draw:layer="layout" svg:width="0.009cm" svg:height="0.009cm" svg:x="11.641cm" svg:y="20.294cm" svg:viewBox="0 0 10 10" draw:points="0,10 10,10 10,0 0,0">
          <text:p/>
        </draw:polygon>
        <draw:polygon draw:style-name="gr5" draw:text-style-name="P6" draw:layer="layout" svg:width="0.626cm" svg:height="0.009cm" svg:x="11.65cm" svg:y="20.294cm" svg:viewBox="0 0 627 10" draw:points="0,10 627,10 627,0 0,0">
          <text:p/>
        </draw:polygon>
        <draw:polygon draw:style-name="gr5" draw:text-style-name="P6" draw:layer="layout" svg:width="0.009cm" svg:height="0.051cm" svg:x="12.276cm" svg:y="20.294cm" svg:viewBox="0 0 10 52" draw:points="0,52 10,52 10,0 0,0">
          <text:p/>
        </draw:polygon>
        <draw:polygon draw:style-name="gr5" draw:text-style-name="P6" draw:layer="layout" svg:width="1.109cm" svg:height="0.009cm" svg:x="12.285cm" svg:y="20.294cm" svg:viewBox="0 0 1110 10" draw:points="0,10 1110,10 1110,0 0,0">
          <text:p/>
        </draw:polygon>
        <draw:polygon draw:style-name="gr5" draw:text-style-name="P6" draw:layer="layout" svg:width="0.008cm" svg:height="0.051cm" svg:x="13.394cm" svg:y="20.294cm" svg:viewBox="0 0 9 52" draw:points="0,52 9,52 9,0 0,0">
          <text:p/>
        </draw:polygon>
        <draw:polygon draw:style-name="gr5" draw:text-style-name="P6" draw:layer="layout" svg:width="1.101cm" svg:height="0.009cm" svg:x="13.402cm" svg:y="20.294cm" svg:viewBox="0 0 1102 10" draw:points="0,10 1102,10 1102,0 0,0">
          <text:p/>
        </draw:polygon>
        <draw:polygon draw:style-name="gr5" draw:text-style-name="P6" draw:layer="layout" svg:width="0.008cm" svg:height="0.051cm" svg:x="14.503cm" svg:y="20.294cm" svg:viewBox="0 0 9 52" draw:points="0,52 9,52 9,0 0,0">
          <text:p/>
        </draw:polygon>
        <draw:polygon draw:style-name="gr5" draw:text-style-name="P6" draw:layer="layout" svg:width="0.009cm" svg:height="0.423cm" svg:x="2.277cm" svg:y="20.345cm" svg:viewBox="0 0 10 424" draw:points="0,424 10,424 10,0 0,0">
          <text:p/>
        </draw:polygon>
        <draw:polygon draw:style-name="gr5" draw:text-style-name="P6" draw:layer="layout" svg:width="0.009cm" svg:height="0.009cm" svg:x="2.277cm" svg:y="20.768cm" svg:viewBox="0 0 10 10" draw:points="0,10 10,10 10,0 0,0">
          <text:p/>
        </draw:polygon>
        <draw:polygon draw:style-name="gr5" draw:text-style-name="P6" draw:layer="layout" svg:width="0.009cm" svg:height="0.009cm" svg:x="2.277cm" svg:y="20.768cm" svg:viewBox="0 0 10 10" draw:points="0,10 10,10 10,0 0,0">
          <text:p/>
        </draw:polygon>
        <draw:polygon draw:style-name="gr5" draw:text-style-name="P6" draw:layer="layout" svg:width="5.545cm" svg:height="0.009cm" svg:x="2.286cm" svg:y="20.768cm" svg:viewBox="0 0 5546 10" draw:points="0,10 5546,10 5546,0 0,0">
          <text:p/>
        </draw:polygon>
        <draw:polygon draw:style-name="gr5" draw:text-style-name="P6" draw:layer="layout" svg:width="0.009cm" svg:height="0.423cm" svg:x="7.831cm" svg:y="20.345cm" svg:viewBox="0 0 10 424" draw:points="0,424 10,424 10,0 0,0">
          <text:p/>
        </draw:polygon>
        <draw:polygon draw:style-name="gr5" draw:text-style-name="P6" draw:layer="layout" svg:width="0.009cm" svg:height="0.009cm" svg:x="7.831cm" svg:y="20.768cm" svg:viewBox="0 0 10 10" draw:points="0,10 10,10 10,0 0,0">
          <text:p/>
        </draw:polygon>
        <draw:polygon draw:style-name="gr5" draw:text-style-name="P6" draw:layer="layout" svg:width="0.787cm" svg:height="0.009cm" svg:x="7.84cm" svg:y="20.768cm" svg:viewBox="0 0 788 10" draw:points="0,10 788,10 788,0 0,0">
          <text:p/>
        </draw:polygon>
        <draw:polygon draw:style-name="gr5" draw:text-style-name="P6" draw:layer="layout" svg:width="0.01cm" svg:height="0.423cm" svg:x="8.627cm" svg:y="20.345cm" svg:viewBox="0 0 11 424" draw:points="0,424 11,424 11,0 0,0">
          <text:p/>
        </draw:polygon>
        <draw:polygon draw:style-name="gr5" draw:text-style-name="P6" draw:layer="layout" svg:width="0.01cm" svg:height="0.009cm" svg:x="8.627cm" svg:y="20.768cm" svg:viewBox="0 0 11 10" draw:points="0,10 11,10 11,0 0,0">
          <text:p/>
        </draw:polygon>
        <draw:polygon draw:style-name="gr5" draw:text-style-name="P6" draw:layer="layout" svg:width="0.787cm" svg:height="0.009cm" svg:x="8.636cm" svg:y="20.768cm" svg:viewBox="0 0 788 10" draw:points="0,10 788,10 788,0 0,0">
          <text:p/>
        </draw:polygon>
        <draw:polygon draw:style-name="gr5" draw:text-style-name="P6" draw:layer="layout" svg:width="0.008cm" svg:height="0.423cm" svg:x="9.423cm" svg:y="20.345cm" svg:viewBox="0 0 9 424" draw:points="0,424 9,424 9,0 0,0">
          <text:p/>
        </draw:polygon>
        <draw:polygon draw:style-name="gr5" draw:text-style-name="P6" draw:layer="layout" svg:width="0.008cm" svg:height="0.009cm" svg:x="9.423cm" svg:y="20.768cm" svg:viewBox="0 0 9 10" draw:points="0,10 9,10 9,0 0,0">
          <text:p/>
        </draw:polygon>
        <draw:polygon draw:style-name="gr5" draw:text-style-name="P6" draw:layer="layout" svg:width="0.788cm" svg:height="0.009cm" svg:x="9.431cm" svg:y="20.768cm" svg:viewBox="0 0 789 10" draw:points="0,10 789,10 789,0 0,0">
          <text:p/>
        </draw:polygon>
        <draw:polygon draw:style-name="gr5" draw:text-style-name="P6" draw:layer="layout" svg:width="0.008cm" svg:height="0.423cm" svg:x="10.219cm" svg:y="20.345cm" svg:viewBox="0 0 9 424" draw:points="0,424 9,424 9,0 0,0">
          <text:p/>
        </draw:polygon>
        <draw:polygon draw:style-name="gr5" draw:text-style-name="P6" draw:layer="layout" svg:width="0.008cm" svg:height="0.009cm" svg:x="10.219cm" svg:y="20.768cm" svg:viewBox="0 0 9 10" draw:points="0,10 9,10 9,0 0,0">
          <text:p/>
        </draw:polygon>
        <draw:polygon draw:style-name="gr5" draw:text-style-name="P6" draw:layer="layout" svg:width="0.627cm" svg:height="0.009cm" svg:x="10.227cm" svg:y="20.768cm" svg:viewBox="0 0 628 10" draw:points="0,10 628,10 628,0 0,0">
          <text:p/>
        </draw:polygon>
        <draw:polygon draw:style-name="gr5" draw:text-style-name="P6" draw:layer="layout" svg:width="0.008cm" svg:height="0.423cm" svg:x="10.854cm" svg:y="20.345cm" svg:viewBox="0 0 9 424" draw:points="0,424 9,424 9,0 0,0">
          <text:p/>
        </draw:polygon>
        <draw:polygon draw:style-name="gr5" draw:text-style-name="P6" draw:layer="layout" svg:width="0.008cm" svg:height="0.009cm" svg:x="10.854cm" svg:y="20.768cm" svg:viewBox="0 0 9 10" draw:points="0,10 9,10 9,0 0,0">
          <text:p/>
        </draw:polygon>
        <draw:polygon draw:style-name="gr5" draw:text-style-name="P6" draw:layer="layout" svg:width="0.627cm" svg:height="0.009cm" svg:x="10.862cm" svg:y="20.768cm" svg:viewBox="0 0 628 10" draw:points="0,10 628,10 628,0 0,0">
          <text:p/>
        </draw:polygon>
        <draw:polygon draw:style-name="gr5" draw:text-style-name="P6" draw:layer="layout" svg:width="0.008cm" svg:height="0.423cm" svg:x="11.489cm" svg:y="20.345cm" svg:viewBox="0 0 9 424" draw:points="0,424 9,424 9,0 0,0">
          <text:p/>
        </draw:polygon>
        <draw:polygon draw:style-name="gr5" draw:text-style-name="P6" draw:layer="layout" svg:width="0.008cm" svg:height="0.009cm" svg:x="11.489cm" svg:y="20.768cm" svg:viewBox="0 0 9 10" draw:points="0,10 9,10 9,0 0,0">
          <text:p/>
        </draw:polygon>
        <draw:polygon draw:style-name="gr5" draw:text-style-name="P6" draw:layer="layout" svg:width="0.779cm" svg:height="0.009cm" svg:x="11.497cm" svg:y="20.768cm" svg:viewBox="0 0 780 10" draw:points="0,10 780,10 780,0 0,0">
          <text:p/>
        </draw:polygon>
        <draw:polygon draw:style-name="gr5" draw:text-style-name="P6" draw:layer="layout" svg:width="0.009cm" svg:height="0.423cm" svg:x="12.276cm" svg:y="20.345cm" svg:viewBox="0 0 10 424" draw:points="0,424 10,424 10,0 0,0">
          <text:p/>
        </draw:polygon>
        <draw:polygon draw:style-name="gr5" draw:text-style-name="P6" draw:layer="layout" svg:width="0.009cm" svg:height="0.009cm" svg:x="12.276cm" svg:y="20.768cm" svg:viewBox="0 0 10 10" draw:points="0,10 10,10 10,0 0,0">
          <text:p/>
        </draw:polygon>
        <draw:polygon draw:style-name="gr5" draw:text-style-name="P6" draw:layer="layout" svg:width="1.109cm" svg:height="0.009cm" svg:x="12.285cm" svg:y="20.768cm" svg:viewBox="0 0 1110 10" draw:points="0,10 1110,10 1110,0 0,0">
          <text:p/>
        </draw:polygon>
        <draw:polygon draw:style-name="gr5" draw:text-style-name="P6" draw:layer="layout" svg:width="0.008cm" svg:height="0.423cm" svg:x="13.394cm" svg:y="20.345cm" svg:viewBox="0 0 9 424" draw:points="0,424 9,424 9,0 0,0">
          <text:p/>
        </draw:polygon>
        <draw:polygon draw:style-name="gr5" draw:text-style-name="P6" draw:layer="layout" svg:width="0.008cm" svg:height="0.009cm" svg:x="13.394cm" svg:y="20.768cm" svg:viewBox="0 0 9 10" draw:points="0,10 9,10 9,0 0,0">
          <text:p/>
        </draw:polygon>
        <draw:polygon draw:style-name="gr5" draw:text-style-name="P6" draw:layer="layout" svg:width="1.101cm" svg:height="0.009cm" svg:x="13.402cm" svg:y="20.768cm" svg:viewBox="0 0 1102 10" draw:points="0,10 1102,10 1102,0 0,0">
          <text:p/>
        </draw:polygon>
        <draw:polygon draw:style-name="gr5" draw:text-style-name="P6" draw:layer="layout" svg:width="0.008cm" svg:height="0.423cm" svg:x="14.503cm" svg:y="20.345cm" svg:viewBox="0 0 9 424" draw:points="0,424 9,424 9,0 0,0">
          <text:p/>
        </draw:polygon>
        <draw:polygon draw:style-name="gr5" draw:text-style-name="P6" draw:layer="layout" svg:width="0.008cm" svg:height="0.009cm" svg:x="14.503cm" svg:y="20.768cm" svg:viewBox="0 0 9 10" draw:points="0,10 9,10 9,0 0,0">
          <text:p/>
        </draw:polygon>
        <draw:polygon draw:style-name="gr5" draw:text-style-name="P6" draw:layer="layout" svg:width="0.008cm" svg:height="0.009cm" svg:x="14.503cm" svg:y="20.768cm" svg:viewBox="0 0 9 10" draw:points="0,10 9,10 9,0 0,0">
          <text:p/>
        </draw:polygon>
        <draw:frame draw:style-name="gr1" draw:text-style-name="P2" draw:layer="layout" svg:width="0.321cm" svg:height="0.357cm" svg:x="13.454cm" svg:y="20.3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5.155cm" svg:y="14.7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7cm" svg:height="0.357cm" svg:x="17.196cm" svg:y="15.165cm">
          <draw:text-box>
            <text:p text:style-name="P1"><text:span text:style-name="T1">Familiar </text:span></text:p>
          </draw:text-box>
        </draw:frame>
        <draw:frame draw:style-name="gr1" draw:text-style-name="P2" draw:layer="layout" svg:width="5.171cm" svg:height="0.357cm" svg:x="15.155cm" svg:y="15.529cm">
          <draw:text-box>
            <text:p text:style-name="P1"><text:span text:style-name="T1">"___________________</text:span><text:span text:style-name="T1">___________" </text:span></text:p>
          </draw:text-box>
        </draw:frame>
        <draw:frame draw:style-name="gr1" draw:text-style-name="P2" draw:layer="layout" svg:width="5.23cm" svg:height="0.357cm" svg:x="15.155cm" svg:y="15.893cm">
          <draw:text-box>
            <text:p text:style-name="P1"><text:span text:style-name="T1">____hp <text:s/></text:span><text:span text:style-name="T1">____________________</text:span><text:span text:style-name="T1">_____ </text:span></text:p>
          </draw:text-box>
        </draw:frame>
        <draw:frame draw:style-name="gr1" draw:text-style-name="P2" draw:layer="layout" svg:width="5.23cm" svg:height="0.357cm" svg:x="15.155cm" svg:y="16.257cm">
          <draw:text-box>
            <text:p text:style-name="P1"><text:span text:style-name="T1">____________________</text:span><text:span text:style-name="T1">____________ </text:span></text:p>
          </draw:text-box>
        </draw:frame>
        <draw:frame draw:style-name="gr1" draw:text-style-name="P2" draw:layer="layout" svg:width="5.23cm" svg:height="0.357cm" svg:x="15.155cm" svg:y="16.621cm">
          <draw:text-box>
            <text:p text:style-name="P1"><text:span text:style-name="T1">____________________</text:span><text:span text:style-name="T1">____________ </text:span></text:p>
          </draw:text-box>
        </draw:frame>
        <draw:frame draw:style-name="gr1" draw:text-style-name="P2" draw:layer="layout" svg:width="5.23cm" svg:height="0.357cm" svg:x="15.155cm" svg:y="16.985cm">
          <draw:text-box>
            <text:p text:style-name="P1"><text:span text:style-name="T1">____________________</text:span><text:span text:style-name="T1">____________ </text:span></text:p>
          </draw:text-box>
        </draw:frame>
        <draw:frame draw:style-name="gr1" draw:text-style-name="P2" draw:layer="layout" svg:width="0.321cm" svg:height="0.357cm" svg:x="15.155cm" svg:y="17.3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5.155cm" svg:y="17.7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15.155cm" svg:y="18.0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15cm" svg:height="0.357cm" svg:x="15.155cm" svg:y="18.45cm">
          <draw:text-box>
            <text:p text:style-name="P1"><text:span text:style-name="T1">missiles </text:span></text:p>
          </draw:text-box>
        </draw:frame>
        <draw:frame draw:style-name="gr1" draw:text-style-name="P2" draw:layer="layout" svg:width="0.51cm" svg:height="0.357cm" svg:x="19.6cm" svg:y="18.45cm">
          <draw:text-box>
            <text:p text:style-name="P1"><text:span text:style-name="T1">#of </text:span></text:p>
          </draw:text-box>
        </draw:frame>
        <draw:frame draw:style-name="gr1" draw:text-style-name="P2" draw:layer="layout" svg:width="4.989cm" svg:height="0.357cm" svg:x="15.155cm" svg:y="18.814cm">
          <draw:text-box>
            <text:p text:style-name="P1"><text:span text:style-name="T1">____________________</text:span><text:span text:style-name="T1">_______ ___ </text:span></text:p>
          </draw:text-box>
        </draw:frame>
        <draw:frame draw:style-name="gr1" draw:text-style-name="P2" draw:layer="layout" svg:width="4.989cm" svg:height="0.357cm" svg:x="15.155cm" svg:y="19.178cm">
          <draw:text-box>
            <text:p text:style-name="P1"><text:span text:style-name="T1">____________________</text:span><text:span text:style-name="T1">_______ ___ </text:span></text:p>
          </draw:text-box>
        </draw:frame>
        <draw:frame draw:style-name="gr1" draw:text-style-name="P2" draw:layer="layout" svg:width="4.989cm" svg:height="0.357cm" svg:x="15.155cm" svg:y="19.542cm">
          <draw:text-box>
            <text:p text:style-name="P1"><text:span text:style-name="T1">____________________</text:span><text:span text:style-name="T1">_______ ___ </text:span></text:p>
          </draw:text-box>
        </draw:frame>
        <draw:frame draw:style-name="gr1" draw:text-style-name="P2" draw:layer="layout" svg:width="4.989cm" svg:height="0.357cm" svg:x="15.155cm" svg:y="19.906cm">
          <draw:text-box>
            <text:p text:style-name="P1"><text:span text:style-name="T1">____________________</text:span><text:span text:style-name="T1">_______ ___ </text:span></text:p>
          </draw:text-box>
        </draw:frame>
        <draw:frame draw:style-name="gr1" draw:text-style-name="P2" draw:layer="layout" svg:width="4.989cm" svg:height="0.357cm" svg:x="15.155cm" svg:y="20.27cm">
          <draw:text-box>
            <text:p text:style-name="P1"><text:span text:style-name="T1">____________________</text:span><text:span text:style-name="T1">_______ ___ </text:span></text:p>
          </draw:text-box>
        </draw:frame>
        <draw:frame draw:style-name="gr1" draw:text-style-name="P2" draw:layer="layout" svg:width="0.321cm" svg:height="0.357cm" svg:x="15.155cm" svg:y="20.6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025cm" svg:height="0.357cm" svg:x="2.286cm" svg:y="21.151cm">
          <draw:text-box>
            <text:p text:style-name="P1"><text:span text:style-name="T1">**Special Weapon** </text:span><text:span text:style-name="T1">"___________________</text:span><text:span text:style-name="T1">_____" </text:span></text:p>
          </draw:text-box>
        </draw:frame>
        <draw:frame draw:style-name="gr1" draw:text-style-name="P2" draw:layer="layout" svg:width="10.861cm" svg:height="0.357cm" svg:x="9.677cm" svg:y="21.151cm">
          <draw:text-box>
            <text:p text:style-name="P1"><text:span text:style-name="T1">____________________</text:span><text:span text:style-name="T1">____________________</text:span><text:span text:style-name="T1">____________________</text:span><text:span text:style-name="T1">_______ </text:span></text:p>
          </draw:text-box>
        </draw:frame>
        <draw:frame draw:style-name="gr1" draw:text-style-name="P2" draw:layer="layout" svg:width="18.341cm" svg:height="0.357cm" svg:x="2.286cm" svg:y="21.515cm">
          <draw:text-box>
            <text:p text:style-name="P1"><text:span text:style-name="T1">____________________</text:span><text:span text:style-name="T1">____________________</text:span><text:span text:style-name="T1">_____________ </text:span><text:span text:style-name="T1">____________________</text:span><text:span text:style-name="T1">____________________</text:span><text:span text:style-name="T1">____________________ </text:span></text:p>
          </draw:text-box>
        </draw:frame>
        <draw:frame draw:style-name="gr1" draw:text-style-name="P2" draw:layer="layout" svg:width="0.321cm" svg:height="0.357cm" svg:x="2.286cm" svg:y="21.87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8.05cm" svg:height="0.395cm" svg:x="2.286cm" svg:y="22.247cm">
          <draw:text-box>
            <text:p text:style-name="P1"><text:span text:style-name="T4">Clerical Turning <text:s text:c="10"/></text:span><text:span text:style-name="T4"><text:s text:c="38"/></text:span><text:span text:style-name="T4"><text:s text:c="15"/></text:span></text:p>
          </draw:text-box>
        </draw:frame>
        <draw:frame draw:style-name="gr1" draw:text-style-name="P2" draw:layer="layout" svg:width="3.423cm" svg:height="0.357cm" svg:x="10.473cm" svg:y="22.277cm">
          <draw:text-box>
            <text:p text:style-name="P1"><text:span text:style-name="T1">Spells Castable per level: </text:span><text:span text:style-name="T1"><text:s/></text:span></text:p>
          </draw:text-box>
        </draw:frame>
        <draw:frame draw:style-name="gr1" draw:text-style-name="P2" draw:layer="layout" svg:width="6.195cm" svg:height="0.357cm" svg:x="14.283cm" svg:y="22.277cm">
          <draw:text-box>
            <text:p text:style-name="P1"><text:span text:style-name="T1">1____ 2____ 3____ </text:span><text:span text:style-name="T1">4____ 5____ 6____ </text:span><text:span text:style-name="T1">7____ </text:span></text:p>
          </draw:text-box>
        </draw:frame>
        <draw:frame draw:style-name="gr7" draw:text-style-name="P8" draw:layer="layout" svg:width="16.461cm" svg:height="0.31cm" svg:x="2.286cm" svg:y="22.653cm">
          <draw:text-box>
            <text:p text:style-name="P1"><text:span text:style-name="T6">skeleton___ <text:s text:c="3"/>zombie___ <text:s text:c="3"/></text:span><text:span text:style-name="T6">ghoul___ <text:s text:c="3"/>shadow___ <text:s text:c="2"/></text:span><text:span text:style-name="T6">wight___ <text:s text:c="2"/>ghast___ <text:s text:c="2"/></text:span><text:span text:style-name="T6">wraith___ <text:s text:c="2"/>mummy___ <text:s text:c="2"/></text:span><text:span text:style-name="T6">spectre___ <text:s text:c="2"/>vampire___ <text:s text:c="2"/></text:span><text:span text:style-name="T6">ghost___ <text:s text:c="2"/>lich___ </text:span></text:p>
          </draw:text-box>
        </draw:frame>
        <draw:frame draw:style-name="gr7" draw:text-style-name="P8" draw:layer="layout" svg:width="1.196cm" svg:height="0.31cm" svg:x="19.101cm" svg:y="22.653cm">
          <draw:text-box>
            <text:p text:style-name="P1"><text:span text:style-name="T6">special___</text:span></text:p>
          </draw:text-box>
        </draw:frame>
        <draw:frame draw:style-name="gr1" draw:text-style-name="P2" draw:layer="layout" svg:width="0.321cm" svg:height="0.357cm" svg:x="20.312cm" svg:y="22.616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278cm" svg:height="0.31cm" svg:x="2.286cm" svg:y="22.97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656cm" svg:height="0.395cm" svg:x="2.286cm" svg:y="23.305cm">
          <draw:text-box>
            <text:p text:style-name="P1"><text:span text:style-name="T4">Percentage Ability</text:span></text:p>
          </draw:text-box>
        </draw:frame>
        <draw:frame draw:style-name="gr1" draw:text-style-name="P2" draw:layer="layout" svg:width="0.321cm" svg:height="0.357cm" svg:x="5.08cm" svg:y="23.33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4.43cm" svg:height="0.31cm" svg:x="5.783cm" svg:y="23.373cm">
          <draw:text-box>
            <text:p text:style-name="P1"><text:span text:style-name="T6">Base Ability Score % <text:s text:c="2"/></text:span><text:span text:style-name="T6">Armor Modifier</text:span></text:p>
          </draw:text-box>
        </draw:frame>
        <draw:frame draw:style-name="gr1" draw:text-style-name="P2" draw:layer="layout" svg:width="0.321cm" svg:height="0.357cm" svg:x="10.262cm" svg:y="23.335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.209cm" svg:height="0.31cm" svg:x="2.345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0.552cm" svg:height="0.31cm" svg:x="2.675cm" svg:y="24.033cm">
          <draw:text-box>
            <text:p text:style-name="P1"><text:span text:style-name="T6">pick </text:span></text:p>
          </draw:text-box>
        </draw:frame>
        <draw:frame draw:style-name="gr7" draw:text-style-name="P8" draw:layer="layout" svg:width="0.925cm" svg:height="0.31cm" svg:x="2.489cm" svg:y="24.355cm">
          <draw:text-box>
            <text:p text:style-name="P1"><text:span text:style-name="T6">pockets </text:span></text:p>
          </draw:text-box>
        </draw:frame>
        <draw:frame draw:style-name="gr7" draw:text-style-name="P8" draw:layer="layout" svg:width="1.209cm" svg:height="0.31cm" svg:x="4.022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1.272cm" svg:height="0.31cm" svg:x="3.988cm" svg:y="24.033cm">
          <draw:text-box>
            <text:p text:style-name="P1"><text:span text:style-name="T6">open locks </text:span></text:p>
          </draw:text-box>
        </draw:frame>
        <draw:frame draw:style-name="gr7" draw:text-style-name="P8" draw:layer="layout" svg:width="1.209cm" svg:height="0.31cm" svg:x="5.698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0.916cm" svg:height="0.31cm" svg:x="5.842cm" svg:y="24.033cm">
          <draw:text-box>
            <text:p text:style-name="P1"><text:span text:style-name="T6">fnd and </text:span></text:p>
          </draw:text-box>
        </draw:frame>
        <draw:frame draw:style-name="gr7" draw:text-style-name="P8" draw:layer="layout" svg:width="0.908cm" svg:height="0.31cm" svg:x="5.85cm" svg:y="24.355cm">
          <draw:text-box>
            <text:p text:style-name="P1"><text:span text:style-name="T6">remove </text:span></text:p>
          </draw:text-box>
        </draw:frame>
        <draw:frame draw:style-name="gr7" draw:text-style-name="P8" draw:layer="layout" svg:width="0.612cm" svg:height="0.31cm" svg:x="5.994cm" svg:y="24.685cm">
          <draw:text-box>
            <text:p text:style-name="P1"><text:span text:style-name="T6">traps </text:span></text:p>
          </draw:text-box>
        </draw:frame>
        <draw:frame draw:style-name="gr7" draw:text-style-name="P8" draw:layer="layout" svg:width="1.209cm" svg:height="0.31cm" svg:x="7.374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0.692cm" svg:height="0.31cm" svg:x="7.628cm" svg:y="24.033cm">
          <draw:text-box>
            <text:p text:style-name="P1"><text:span text:style-name="T6">move </text:span></text:p>
          </draw:text-box>
        </draw:frame>
        <draw:frame draw:style-name="gr7" draw:text-style-name="P8" draw:layer="layout" svg:width="0.891cm" svg:height="0.31cm" svg:x="7.535cm" svg:y="24.355cm">
          <draw:text-box>
            <text:p text:style-name="P1"><text:span text:style-name="T6">silently </text:span></text:p>
          </draw:text-box>
        </draw:frame>
        <draw:frame draw:style-name="gr7" draw:text-style-name="P8" draw:layer="layout" svg:width="1.209cm" svg:height="0.31cm" svg:x="9.051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0.836cm" svg:height="0.31cm" svg:x="9.237cm" svg:y="24.033cm">
          <draw:text-box>
            <text:p text:style-name="P1"><text:span text:style-name="T6">hide in </text:span></text:p>
          </draw:text-box>
        </draw:frame>
        <draw:frame draw:style-name="gr7" draw:text-style-name="P8" draw:layer="layout" svg:width="1.031cm" svg:height="0.31cm" svg:x="9.136cm" svg:y="24.355cm">
          <draw:text-box>
            <text:p text:style-name="P1"><text:span text:style-name="T6">shadows </text:span></text:p>
          </draw:text-box>
        </draw:frame>
        <draw:frame draw:style-name="gr7" draw:text-style-name="P8" draw:layer="layout" svg:width="1.209cm" svg:height="0.31cm" svg:x="10.727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1.209cm" svg:height="0.31cm" svg:x="10.727cm" svg:y="24.033cm">
          <draw:text-box>
            <text:p text:style-name="P1"><text:span text:style-name="T6">hear noise </text:span></text:p>
          </draw:text-box>
        </draw:frame>
        <draw:frame draw:style-name="gr7" draw:text-style-name="P8" draw:layer="layout" svg:width="1.209cm" svg:height="0.31cm" svg:x="12.404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0.705cm" svg:height="0.31cm" svg:x="12.658cm" svg:y="24.033cm">
          <draw:text-box>
            <text:p text:style-name="P1"><text:span text:style-name="T6">climb </text:span></text:p>
          </draw:text-box>
        </draw:frame>
        <draw:frame draw:style-name="gr7" draw:text-style-name="P8" draw:layer="layout" svg:width="0.658cm" svg:height="0.31cm" svg:x="12.683cm" svg:y="24.355cm">
          <draw:text-box>
            <text:p text:style-name="P1"><text:span text:style-name="T6">walls </text:span></text:p>
          </draw:text-box>
        </draw:frame>
        <draw:frame draw:style-name="gr7" draw:text-style-name="P8" draw:layer="layout" svg:width="1.209cm" svg:height="0.31cm" svg:x="14.071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0.552cm" svg:height="0.31cm" svg:x="14.402cm" svg:y="24.033cm">
          <draw:text-box>
            <text:p text:style-name="P1"><text:span text:style-name="T6">read </text:span></text:p>
          </draw:text-box>
        </draw:frame>
        <draw:frame draw:style-name="gr7" draw:text-style-name="P8" draw:layer="layout" svg:width="1.187cm" svg:height="0.31cm" svg:x="14.08cm" svg:y="24.355cm">
          <draw:text-box>
            <text:p text:style-name="P1"><text:span text:style-name="T6">languages </text:span></text:p>
          </draw:text-box>
        </draw:frame>
        <draw:frame draw:style-name="gr7" draw:text-style-name="P8" draw:layer="layout" svg:width="1.209cm" svg:height="0.31cm" svg:x="15.748cm" svg:y="23.712cm">
          <draw:text-box>
            <text:p text:style-name="P1"><text:span text:style-name="T6">___% ___ </text:span></text:p>
          </draw:text-box>
        </draw:frame>
        <draw:frame draw:style-name="gr7" draw:text-style-name="P8" draw:layer="layout" svg:width="0.565cm" svg:height="0.31cm" svg:x="16.07cm" svg:y="24.033cm">
          <draw:text-box>
            <text:p text:style-name="P1"><text:span text:style-name="T6">item </text:span></text:p>
          </draw:text-box>
        </draw:frame>
        <draw:frame draw:style-name="gr7" draw:text-style-name="P8" draw:layer="layout" svg:width="1.297cm" svg:height="0.31cm" svg:x="15.706cm" svg:y="24.355cm">
          <draw:text-box>
            <text:p text:style-name="P1"><text:span text:style-name="T6">knowledge </text:span></text:p>
          </draw:text-box>
        </draw:frame>
        <draw:frame draw:style-name="gr7" draw:text-style-name="P8" draw:layer="layout" svg:width="1.209cm" svg:height="0.31cm" svg:x="17.424cm" svg:y="23.712cm">
          <draw:text-box>
            <text:p text:style-name="P1"><text:span text:style-name="T6">___% ___ </text:span></text:p>
          </draw:text-box>
        </draw:frame>
        <draw:frame draw:style-name="gr1" draw:text-style-name="P2" draw:layer="layout" svg:width="1.209cm" svg:height="0.357cm" svg:x="17.441cm" svg:y="24.03cm">
          <draw:text-box>
            <text:p text:style-name="P1"><text:span text:style-name="T1">_______ </text:span></text:p>
          </draw:text-box>
        </draw:frame>
        <draw:frame draw:style-name="gr1" draw:text-style-name="P2" draw:layer="layout" svg:width="1.209cm" svg:height="0.357cm" svg:x="17.441cm" svg:y="24.394cm">
          <draw:text-box>
            <text:p text:style-name="P1"><text:span text:style-name="T1">_______ </text:span></text:p>
          </draw:text-box>
        </draw:frame>
        <draw:frame draw:style-name="gr7" draw:text-style-name="P8" draw:layer="layout" svg:width="1.209cm" svg:height="0.31cm" svg:x="19.101cm" svg:y="23.712cm">
          <draw:text-box>
            <text:p text:style-name="P1"><text:span text:style-name="T6">___% ___ </text:span></text:p>
          </draw:text-box>
        </draw:frame>
        <draw:frame draw:style-name="gr1" draw:text-style-name="P2" draw:layer="layout" svg:width="1.209cm" svg:height="0.357cm" svg:x="19.118cm" svg:y="24.03cm">
          <draw:text-box>
            <text:p text:style-name="P1"><text:span text:style-name="T1">_______ </text:span></text:p>
          </draw:text-box>
        </draw:frame>
        <draw:frame draw:style-name="gr1" draw:text-style-name="P2" draw:layer="layout" svg:width="1.209cm" svg:height="0.357cm" svg:x="19.118cm" svg:y="24.394cm">
          <draw:text-box>
            <text:p text:style-name="P1"><text:span text:style-name="T1">_______ </text:span></text:p>
          </draw:text-box>
        </draw:frame>
        <draw:frame draw:style-name="gr1" draw:text-style-name="P2" draw:layer="layout" svg:width="0.321cm" svg:height="0.357cm" svg:x="2.286cm" svg:y="25.36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78cm" svg:height="0.395cm" svg:x="2.286cm" svg:y="25.735cm">
          <draw:text-box>
            <text:p text:style-name="P1"><text:span text:style-name="T4">Steed </text:span></text:p>
          </draw:text-box>
        </draw:frame>
        <draw:frame draw:style-name="gr1" draw:text-style-name="P2" draw:layer="layout" svg:width="14.187cm" svg:height="0.357cm" svg:x="3.2cm" svg:y="25.765cm">
          <draw:text-box>
            <text:p text:style-name="P1"><text:span text:style-name="T1"><text:s/></text:span><text:span text:style-name="T1">type________________</text:span><text:span text:style-name="T1">______ <text:s text:c="3"/></text:span><text:span text:style-name="T1">"___________________</text:span><text:span text:style-name="T1">___" <text:s text:c="3"/>HD________ <text:s text:c="3"/></text:span><text:span text:style-name="T1">Hp_______ <text:s text:c="3"/></text:span><text:span text:style-name="T1">AC_______ </text:span></text:p>
          </draw:text-box>
        </draw:frame>
        <draw:frame draw:style-name="gr1" draw:text-style-name="P2" draw:layer="layout" svg:width="2.974cm" svg:height="0.357cm" svg:x="17.458cm" svg:y="25.765cm">
          <draw:text-box>
            <text:p text:style-name="P1"><text:span text:style-name="T1">Move rate_________" </text:span></text:p>
          </draw:text-box>
        </draw:frame>
        <draw:frame draw:style-name="gr7" draw:text-style-name="P8" draw:layer="layout" svg:width="0.916cm" svg:height="0.31cm" svg:x="2.286cm" svg:y="26.176cm">
          <draw:text-box>
            <text:p text:style-name="P1"><text:span text:style-name="T6">#attacks</text:span></text:p>
          </draw:text-box>
        </draw:frame>
        <draw:frame draw:style-name="gr1" draw:text-style-name="P2" draw:layer="layout" svg:width="0.806cm" svg:height="0.357cm" svg:x="3.217cm" svg:y="26.138cm">
          <draw:text-box>
            <text:p text:style-name="P1"><text:span text:style-name="T1">____ <text:s/></text:span></text:p>
          </draw:text-box>
        </draw:frame>
        <draw:frame draw:style-name="gr7" draw:text-style-name="P8" draw:layer="layout" svg:width="0.497cm" svg:height="0.31cm" svg:x="4.013cm" svg:y="26.176cm">
          <draw:text-box>
            <text:p text:style-name="P1"><text:span text:style-name="T6">dmg</text:span></text:p>
          </draw:text-box>
        </draw:frame>
        <draw:frame draw:style-name="gr1" draw:text-style-name="P2" draw:layer="layout" svg:width="2.656cm" svg:height="0.357cm" svg:x="4.513cm" svg:y="26.138cm">
          <draw:text-box>
            <text:p text:style-name="P1"><text:span text:style-name="T1">_______________ <text:s text:c="2"/></text:span></text:p>
          </draw:text-box>
        </draw:frame>
        <draw:frame draw:style-name="gr7" draw:text-style-name="P8" draw:layer="layout" svg:width="2.538cm" svg:height="0.31cm" svg:x="7.129cm" svg:y="26.176cm">
          <draw:text-box>
            <text:p text:style-name="P1"><text:span text:style-name="T6">encumbrance_______ </text:span></text:p>
          </draw:text-box>
        </draw:frame>
        <draw:frame draw:style-name="gr7" draw:text-style-name="P8" draw:layer="layout" svg:width="0.59cm" svg:height="0.31cm" svg:x="10.033cm" svg:y="26.176cm">
          <draw:text-box>
            <text:p text:style-name="P1"><text:span text:style-name="T6">notes</text:span></text:p>
          </draw:text-box>
        </draw:frame>
        <draw:frame draw:style-name="gr1" draw:text-style-name="P2" draw:layer="layout" svg:width="9.895cm" svg:height="0.357cm" svg:x="10.634cm" svg:y="26.138cm">
          <draw:text-box>
            <text:p text:style-name="P1"><text:span text:style-name="T1">____________________</text:span><text:span text:style-name="T1">____________________</text:span><text:span text:style-name="T1">____________________</text:span><text:span text:style-name="T1">_ </text:span></text:p>
          </draw:text-box>
        </draw:frame>
        <draw:control draw:style-name="gr2" draw:text-style-name="P3" draw:layer="controls" svg:width="2.038cm" svg:height="0.291cm" svg:x="10.807cm" svg:y="0.766cm" draw:control="control2"/>
        <draw:control draw:style-name="gr2" draw:text-style-name="P3" draw:layer="controls" svg:width="4.919cm" svg:height="0.291cm" svg:x="3.067cm" svg:y="1.493cm" draw:control="control3"/>
        <draw:control draw:style-name="gr2" draw:text-style-name="P9" draw:layer="controls" svg:width="0.461cm" svg:height="0.291cm" svg:x="8.971cm" svg:y="1.494cm" draw:control="control4"/>
        <draw:control draw:style-name="gr2" draw:text-style-name="P3" draw:layer="controls" svg:width="1.386cm" svg:height="0.291cm" svg:x="10.772cm" svg:y="1.495cm" draw:control="control5"/>
        <draw:control draw:style-name="gr2" draw:text-style-name="P3" draw:layer="controls" svg:width="1.137cm" svg:height="0.291cm" svg:x="13.421cm" svg:y="1.496cm" draw:control="control6"/>
        <draw:control draw:style-name="gr2" draw:text-style-name="P3" draw:layer="controls" svg:width="1.605cm" svg:height="0.291cm" svg:x="2.622cm" svg:y="1.864cm" draw:control="control7"/>
        <draw:control draw:style-name="gr2" draw:text-style-name="P10" draw:layer="controls" svg:width="0.535cm" svg:height="0.291cm" svg:x="5.004cm" svg:y="1.865cm" draw:control="control8"/>
        <draw:control draw:style-name="gr2" draw:text-style-name="P3" draw:layer="controls" svg:width="0.685cm" svg:height="0.291cm" svg:x="6.958cm" svg:y="1.866cm" draw:control="control9"/>
        <draw:control draw:style-name="gr2" draw:text-style-name="P9" draw:layer="controls" svg:width="1.153cm" svg:height="0.291cm" svg:x="11.011cm" svg:y="1.867cm" draw:control="control10"/>
        <draw:control draw:style-name="gr2" draw:text-style-name="P9" draw:layer="controls" svg:width="1.372cm" svg:height="0.291cm" svg:x="13.12cm" svg:y="1.868cm" draw:control="control11"/>
        <draw:control draw:style-name="gr2" draw:text-style-name="P9" draw:layer="controls" svg:width="2.35cm" svg:height="0.291cm" svg:x="2.948cm" svg:y="2.217cm" draw:control="control12"/>
        <draw:control draw:style-name="gr2" draw:text-style-name="P9" draw:layer="controls" svg:width="5.269cm" svg:height="0.291cm" svg:x="7.672cm" svg:y="2.218cm" draw:control="control13"/>
        <draw:control draw:style-name="gr2" draw:text-style-name="P9" draw:layer="controls" svg:width="1.386cm" svg:height="0.291cm" svg:x="13.1cm" svg:y="2.219cm" draw:control="control14"/>
        <draw:control draw:style-name="gr2" draw:text-style-name="P9" draw:layer="controls" svg:width="1.695cm" svg:height="0.291cm" svg:x="3.698cm" svg:y="2.584cm" draw:control="control15"/>
        <draw:control draw:style-name="gr2" draw:text-style-name="P9" draw:layer="controls" svg:width="0.572cm" svg:height="0.291cm" svg:x="6.523cm" svg:y="2.585cm" draw:control="control16"/>
        <draw:control draw:style-name="gr2" draw:text-style-name="P9" draw:layer="controls" svg:width="0.758cm" svg:height="0.291cm" svg:x="8.135cm" svg:y="2.586cm" draw:control="control17"/>
        <draw:control draw:style-name="gr2" draw:text-style-name="P9" draw:layer="controls" svg:width="0.411cm" svg:height="0.291cm" svg:x="11.405cm" svg:y="2.587cm" draw:control="control18"/>
        <draw:control draw:style-name="gr2" draw:text-style-name="P9" draw:layer="controls" svg:width="0.411cm" svg:height="0.291cm" svg:x="13.706cm" svg:y="2.588cm" draw:control="control19"/>
        <draw:control draw:style-name="gr2" draw:text-style-name="P9" draw:layer="controls" svg:width="0.575cm" svg:height="0.291cm" svg:x="2.901cm" svg:y="3.313cm" draw:control="control20"/>
        <draw:control draw:style-name="gr2" draw:text-style-name="P9" draw:layer="controls" svg:width="0.575cm" svg:height="0.291cm" svg:x="3.602cm" svg:y="3.314cm" draw:control="control21"/>
        <draw:control draw:style-name="gr2" draw:text-style-name="P9" draw:layer="controls" svg:width="0.435cm" svg:height="0.291cm" svg:x="5.103cm" svg:y="3.315cm" draw:control="control22"/>
        <draw:control draw:style-name="gr2" draw:text-style-name="P9" draw:layer="controls" svg:width="0.435cm" svg:height="0.291cm" svg:x="6.316cm" svg:y="3.316cm" draw:control="control23"/>
        <draw:control draw:style-name="gr2" draw:text-style-name="P9" draw:layer="controls" svg:width="0.435cm" svg:height="0.291cm" svg:x="8.777cm" svg:y="3.317cm" draw:control="control24"/>
        <draw:control draw:style-name="gr2" draw:text-style-name="P9" draw:layer="controls" svg:width="0.435cm" svg:height="0.291cm" svg:x="9.448cm" svg:y="3.318cm" draw:control="control25"/>
        <draw:control draw:style-name="gr2" draw:text-style-name="P9" draw:layer="controls" svg:width="0.435cm" svg:height="0.291cm" svg:x="14.002cm" svg:y="3.318cm" draw:control="control26"/>
        <draw:control draw:style-name="gr2" draw:text-style-name="P9" draw:layer="controls" svg:width="0.592cm" svg:height="0.291cm" svg:x="2.884cm" svg:y="3.694cm" draw:control="control27"/>
        <draw:control draw:style-name="gr2" draw:text-style-name="P9" draw:layer="controls" svg:width="0.421cm" svg:height="0.291cm" svg:x="6.224cm" svg:y="3.695cm" draw:control="control28"/>
        <draw:control draw:style-name="gr2" draw:text-style-name="P9" draw:layer="controls" svg:width="0.421cm" svg:height="0.291cm" svg:x="10.755cm" svg:y="3.696cm" draw:control="control29"/>
        <draw:control draw:style-name="gr2" draw:text-style-name="P9" draw:layer="controls" svg:width="0.554cm" svg:height="0.291cm" svg:x="13.956cm" svg:y="3.697cm" draw:control="control30"/>
        <draw:control draw:style-name="gr2" draw:text-style-name="P9" draw:layer="controls" svg:width="0.554cm" svg:height="0.291cm" svg:x="2.902cm" svg:y="4.092cm" draw:control="control31"/>
        <draw:control draw:style-name="gr2" draw:text-style-name="P9" draw:layer="controls" svg:width="0.554cm" svg:height="0.291cm" svg:x="5.702cm" svg:y="4.093cm" draw:control="control32"/>
        <draw:control draw:style-name="gr2" draw:text-style-name="P9" draw:layer="controls" svg:width="0.554cm" svg:height="0.291cm" svg:x="8.426cm" svg:y="4.094cm" draw:control="control33"/>
        <draw:control draw:style-name="gr2" draw:text-style-name="P9" draw:layer="controls" svg:width="0.554cm" svg:height="0.291cm" svg:x="12.318cm" svg:y="4.095cm" draw:control="control34"/>
        <draw:control draw:style-name="gr2" draw:text-style-name="P9" draw:layer="controls" svg:width="0.474cm" svg:height="0.291cm" svg:x="14.066cm" svg:y="4.096cm" draw:control="control35"/>
        <draw:control draw:style-name="gr2" draw:text-style-name="P9" draw:layer="controls" svg:width="0.569cm" svg:height="0.291cm" svg:x="2.898cm" svg:y="4.483cm" draw:control="control36"/>
        <draw:control draw:style-name="gr2" draw:text-style-name="P9" draw:layer="controls" svg:width="0.478cm" svg:height="0.291cm" svg:x="6.381cm" svg:y="4.484cm" draw:control="control37"/>
        <draw:control draw:style-name="gr2" draw:text-style-name="P9" draw:layer="controls" svg:width="0.478cm" svg:height="0.291cm" svg:x="8.579cm" svg:y="4.485cm" draw:control="control38"/>
        <draw:control draw:style-name="gr2" draw:text-style-name="P9" draw:layer="controls" svg:width="0.478cm" svg:height="0.291cm" svg:x="11.121cm" svg:y="4.486cm" draw:control="control39"/>
        <draw:control draw:style-name="gr2" draw:text-style-name="P9" draw:layer="controls" svg:width="0.478cm" svg:height="0.291cm" svg:x="14.093cm" svg:y="4.487cm" draw:control="control40"/>
        <draw:control draw:style-name="gr2" draw:text-style-name="P9" draw:layer="controls" svg:width="0.478cm" svg:height="0.291cm" svg:x="2.935cm" svg:y="4.874cm" draw:control="control41"/>
        <draw:control draw:style-name="gr2" draw:text-style-name="P9" draw:layer="controls" svg:width="0.478cm" svg:height="0.291cm" svg:x="7.263cm" svg:y="4.875cm" draw:control="control42"/>
        <draw:control draw:style-name="gr2" draw:text-style-name="P9" draw:layer="controls" svg:width="1.45cm" svg:height="0.291cm" svg:x="10.063cm" svg:y="4.869cm" draw:control="control43"/>
        <draw:control draw:style-name="gr2" draw:text-style-name="P9" draw:layer="controls" svg:width="0.592cm" svg:height="0.291cm" svg:x="13.921cm" svg:y="4.87cm" draw:control="control44"/>
        <draw:control draw:style-name="gr2" draw:text-style-name="P9" draw:layer="controls" svg:width="0.592cm" svg:height="0.291cm" svg:x="2.9cm" svg:y="5.257cm" draw:control="control45"/>
        <draw:control draw:style-name="gr2" draw:text-style-name="P9" draw:layer="controls" svg:width="0.592cm" svg:height="0.291cm" svg:x="7.809cm" svg:y="5.258cm" draw:control="control46"/>
        <draw:control draw:style-name="gr2" draw:text-style-name="P9" draw:layer="controls" svg:width="0.592cm" svg:height="0.291cm" svg:x="10.409cm" svg:y="5.259cm" draw:control="control47"/>
        <draw:control draw:style-name="gr2" draw:text-style-name="P9" draw:layer="controls" svg:width="0.592cm" svg:height="0.291cm" svg:x="13.939cm" svg:y="5.26cm" draw:control="control48"/>
        <draw:control draw:style-name="gr2" draw:text-style-name="P9" draw:layer="controls" svg:width="0.592cm" svg:height="0.291cm" svg:x="19.567cm" svg:y="4.747cm" draw:control="control49"/>
        <draw:control draw:style-name="gr2" draw:text-style-name="P9" draw:layer="controls" svg:width="0.592cm" svg:height="0.291cm" svg:x="19.567cm" svg:y="5.313cm" draw:control="control50"/>
        <draw:control draw:style-name="gr2" draw:text-style-name="P9" draw:layer="controls" svg:width="0.592cm" svg:height="0.291cm" svg:x="19.567cm" svg:y="5.856cm" draw:control="control51"/>
        <draw:control draw:style-name="gr2" draw:text-style-name="P9" draw:layer="controls" svg:width="0.592cm" svg:height="0.291cm" svg:x="19.567cm" svg:y="6.399cm" draw:control="control52"/>
        <draw:control draw:style-name="gr2" draw:text-style-name="P9" draw:layer="controls" svg:width="0.592cm" svg:height="0.291cm" svg:x="19.567cm" svg:y="6.928cm" draw:control="control53"/>
        <draw:control draw:style-name="gr2" draw:text-style-name="P9" draw:layer="controls" svg:width="0.592cm" svg:height="0.291cm" svg:x="2.067cm" svg:y="6.029cm" draw:control="control54"/>
      </draw:page>
      <draw:page draw:name="page2" draw:style-name="dp1" draw:master-page-name="master-page3">
        <draw:frame draw:style-name="gr1" draw:text-style-name="P2" draw:layer="layout" svg:width="1.547cm" svg:height="0.357cm" svg:x="10.558cm" svg:y="0.772cm">
          <draw:text-box>
            <text:p text:style-name="P1"><text:span text:style-name="T3">Belongings </text:span></text:p>
          </draw:text-box>
        </draw:frame>
        <draw:frame draw:style-name="gr1" draw:text-style-name="P2" draw:layer="layout" svg:width="0.671cm" svg:height="0.357cm" svg:x="2.286cm" svg:y="1.559cm">
          <draw:text-box>
            <text:p text:style-name="P1"><text:span text:style-name="T1">Item </text:span></text:p>
          </draw:text-box>
        </draw:frame>
        <draw:frame draw:style-name="gr1" draw:text-style-name="P2" draw:layer="layout" svg:width="0.938cm" svg:height="0.357cm" svg:x="5.935cm" svg:y="1.559cm">
          <draw:text-box>
            <text:p text:style-name="P1"><text:span text:style-name="T1">Where </text:span></text:p>
          </draw:text-box>
        </draw:frame>
        <draw:frame draw:style-name="gr1" draw:text-style-name="P2" draw:layer="layout" svg:width="0.582cm" svg:height="0.357cm" svg:x="7.053cm" svg:y="1.559cm">
          <draw:text-box>
            <text:p text:style-name="P1"><text:span text:style-name="T1">Enc </text:span></text:p>
          </draw:text-box>
        </draw:frame>
        <draw:frame draw:style-name="gr1" draw:text-style-name="P2" draw:layer="layout" svg:width="3.461cm" svg:height="0.357cm" svg:x="2.286cm" svg:y="1.999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1.999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1.999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2.44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2.44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2.4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2.871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2.871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2.871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3.312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3.312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3.312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3.752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3.752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3.752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4.192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4.192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4.192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4.624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4.624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4.62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5.064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5.064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5.06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5.505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5.505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5.505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5.945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5.945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5.945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6.377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6.377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6.377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2.286cm" svg:y="6.817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5.935cm" svg:y="6.817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7.053cm" svg:y="6.817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671cm" svg:height="0.357cm" svg:x="8.39cm" svg:y="1.559cm">
          <draw:text-box>
            <text:p text:style-name="P1"><text:span text:style-name="T1">Item </text:span></text:p>
          </draw:text-box>
        </draw:frame>
        <draw:frame draw:style-name="gr1" draw:text-style-name="P2" draw:layer="layout" svg:width="0.938cm" svg:height="0.357cm" svg:x="12.04cm" svg:y="1.559cm">
          <draw:text-box>
            <text:p text:style-name="P1"><text:span text:style-name="T1">Where </text:span></text:p>
          </draw:text-box>
        </draw:frame>
        <draw:frame draw:style-name="gr1" draw:text-style-name="P2" draw:layer="layout" svg:width="0.582cm" svg:height="0.357cm" svg:x="13.157cm" svg:y="1.559cm">
          <draw:text-box>
            <text:p text:style-name="P1"><text:span text:style-name="T1">Enc </text:span></text:p>
          </draw:text-box>
        </draw:frame>
        <draw:frame draw:style-name="gr1" draw:text-style-name="P2" draw:layer="layout" svg:width="3.461cm" svg:height="0.357cm" svg:x="8.39cm" svg:y="1.999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1.999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1.999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2.44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2.44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2.4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2.871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2.871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2.871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3.312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3.312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3.312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3.752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3.752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3.752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4.192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4.192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4.192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4.624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4.624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4.62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5.064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5.064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5.064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5.505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5.505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5.505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5.945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5.945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5.945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6.377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6.377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6.377cm">
          <draw:text-box>
            <text:p text:style-name="P1"><text:span text:style-name="T1">____ </text:span></text:p>
          </draw:text-box>
        </draw:frame>
        <draw:frame draw:style-name="gr1" draw:text-style-name="P2" draw:layer="layout" svg:width="3.461cm" svg:height="0.357cm" svg:x="8.39cm" svg:y="6.817cm">
          <draw:text-box>
            <text:p text:style-name="P1"><text:span text:style-name="T1">____________________</text:span><text:span text:style-name="T1">_ </text:span></text:p>
          </draw:text-box>
        </draw:frame>
        <draw:frame draw:style-name="gr1" draw:text-style-name="P2" draw:layer="layout" svg:width="0.887cm" svg:height="0.357cm" svg:x="12.039cm" svg:y="6.817cm">
          <draw:text-box>
            <text:p text:style-name="P1"><text:span text:style-name="T1">_____ </text:span></text:p>
          </draw:text-box>
        </draw:frame>
        <draw:frame draw:style-name="gr1" draw:text-style-name="P2" draw:layer="layout" svg:width="0.726cm" svg:height="0.357cm" svg:x="13.157cm" svg:y="6.817cm">
          <draw:text-box>
            <text:p text:style-name="P1"><text:span text:style-name="T1">____ </text:span></text:p>
          </draw:text-box>
        </draw:frame>
        <draw:frame draw:style-name="gr1" draw:text-style-name="P2" draw:layer="layout" svg:width="1.475cm" svg:height="0.357cm" svg:x="16.722cm" svg:y="1.559cm">
          <draw:text-box>
            <text:p text:style-name="P1"><text:span text:style-name="T1">Containers </text:span></text:p>
          </draw:text-box>
        </draw:frame>
        <draw:frame draw:style-name="gr1" draw:text-style-name="P2" draw:layer="layout" svg:width="5.874cm" svg:height="0.357cm" svg:x="14.605cm" svg:y="2.211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5.874cm" svg:height="0.357cm" svg:x="14.605cm" svg:y="2.863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5.874cm" svg:height="0.357cm" svg:x="14.605cm" svg:y="3.506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5.874cm" svg:height="0.357cm" svg:x="14.605cm" svg:y="4.158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5.874cm" svg:height="0.357cm" svg:x="14.605cm" svg:y="4.81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5.874cm" svg:height="0.357cm" svg:x="14.605cm" svg:y="5.462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5.874cm" svg:height="0.357cm" svg:x="14.605cm" svg:y="6.106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5.874cm" svg:height="0.357cm" svg:x="14.605cm" svg:y="6.758cm">
          <draw:text-box>
            <text:p text:style-name="P1"><text:span text:style-name="T1">____________________</text:span><text:span text:style-name="T1">________________ </text:span></text:p>
          </draw:text-box>
        </draw:frame>
        <draw:frame draw:style-name="gr7" draw:text-style-name="P8" draw:layer="layout" svg:width="4.836cm" svg:height="0.31cm" svg:x="15.511cm" svg:y="7.413cm">
          <draw:text-box>
            <text:p text:style-name="P1"><text:span text:style-name="T6">Total Weight___________ <text:s/></text:span><text:span text:style-name="T6"><text:s text:c="5"/>_________ </text:span></text:p>
          </draw:text-box>
        </draw:frame>
        <draw:frame draw:style-name="gr7" draw:text-style-name="P8" draw:layer="layout" svg:width="0.278cm" svg:height="0.31cm" svg:x="20.32cm" svg:y="8.01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21cm" svg:height="0.357cm" svg:x="11.303cm" svg:y="8.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7cm" svg:height="0.357cm" svg:x="10.456cm" svg:y="8.764cm">
          <draw:text-box>
            <text:p text:style-name="P1"><text:span text:style-name="T3">Magic Items </text:span></text:p>
          </draw:text-box>
        </draw:frame>
        <draw:frame draw:style-name="gr1" draw:text-style-name="P2" draw:layer="layout" svg:width="8.536cm" svg:height="0.357cm" svg:x="2.286cm" svg:y="9.128cm">
          <draw:text-box>
            <text:p text:style-name="P1"><text:span text:style-name="T1">____________________</text:span><text:span text:style-name="T1">_________________ </text:span><text:span text:style-name="T1">Charges____ ____ </text:span></text:p>
          </draw:text-box>
        </draw:frame>
        <draw:frame draw:style-name="gr1" draw:text-style-name="P2" draw:layer="layout" svg:width="8.528cm" svg:height="0.357cm" svg:x="2.286cm" svg:y="9.492cm">
          <draw:text-box>
            <text:p text:style-name="P1"><text:span text:style-name="T1">____________________</text:span><text:span text:style-name="T1">______ </text:span><text:span text:style-name="T1">____________________</text:span><text:span text:style-name="T1">______ </text:span></text:p>
          </draw:text-box>
        </draw:frame>
        <draw:frame draw:style-name="gr1" draw:text-style-name="P2" draw:layer="layout" svg:width="8.528cm" svg:height="0.357cm" svg:x="2.286cm" svg:y="9.856cm">
          <draw:text-box>
            <text:p text:style-name="P1"><text:span text:style-name="T1">____________________</text:span><text:span text:style-name="T1">______ </text:span><text:span text:style-name="T1">____________________</text:span><text:span text:style-name="T1">______ </text:span></text:p>
          </draw:text-box>
        </draw:frame>
        <draw:frame draw:style-name="gr1" draw:text-style-name="P2" draw:layer="layout" svg:width="8.528cm" svg:height="0.357cm" svg:x="2.286cm" svg:y="10.22cm">
          <draw:text-box>
            <text:p text:style-name="P1"><text:span text:style-name="T1">____________________</text:span><text:span text:style-name="T1">______ </text:span><text:span text:style-name="T1">____________________</text:span><text:span text:style-name="T1">______ </text:span></text:p>
          </draw:text-box>
        </draw:frame>
        <draw:frame draw:style-name="gr1" draw:text-style-name="P2" draw:layer="layout" svg:width="8.536cm" svg:height="0.357cm" svg:x="11.65cm" svg:y="9.128cm">
          <draw:text-box>
            <text:p text:style-name="P1"><text:span text:style-name="T1">____________________</text:span><text:span text:style-name="T1">_________________ </text:span><text:span text:style-name="T1">Charges____ ____ </text:span></text:p>
          </draw:text-box>
        </draw:frame>
        <draw:frame draw:style-name="gr1" draw:text-style-name="P2" draw:layer="layout" svg:width="8.528cm" svg:height="0.357cm" svg:x="11.65cm" svg:y="9.492cm">
          <draw:text-box>
            <text:p text:style-name="P1"><text:span text:style-name="T1">____________________</text:span><text:span text:style-name="T1">______ </text:span><text:span text:style-name="T1">____________________</text:span><text:span text:style-name="T1">______ </text:span></text:p>
          </draw:text-box>
        </draw:frame>
        <draw:frame draw:style-name="gr1" draw:text-style-name="P2" draw:layer="layout" svg:width="8.528cm" svg:height="0.357cm" svg:x="11.65cm" svg:y="9.856cm">
          <draw:text-box>
            <text:p text:style-name="P1"><text:span text:style-name="T1">____________________</text:span><text:span text:style-name="T1">______ </text:span><text:span text:style-name="T1">____________________</text:span><text:span text:style-name="T1">______ </text:span></text:p>
          </draw:text-box>
        </draw:frame>
        <draw:frame draw:style-name="gr1" draw:text-style-name="P2" draw:layer="layout" svg:width="8.528cm" svg:height="0.357cm" svg:x="11.65cm" svg:y="10.22cm">
          <draw:text-box>
            <text:p text:style-name="P1"><text:span text:style-name="T1">____________________</text:span><text:span text:style-name="T1">______ </text:span><text:span text:style-name="T1">____________________</text:span><text:span text:style-name="T1">______ </text:span></text:p>
          </draw:text-box>
        </draw:frame>
        <draw:frame draw:style-name="gr1" draw:text-style-name="P2" draw:layer="layout" svg:width="0.321cm" svg:height="0.357cm" svg:x="2.286cm" svg:y="10.9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06cm" svg:height="0.357cm" svg:x="2.286cm" svg:y="11.321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4.506cm" svg:height="0.357cm" svg:x="2.286cm" svg:y="11.761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4.506cm" svg:height="0.357cm" svg:x="2.286cm" svg:y="12.193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4.506cm" svg:height="0.357cm" svg:x="2.286cm" svg:y="12.633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4.506cm" svg:height="0.357cm" svg:x="2.286cm" svg:y="13.074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4.506cm" svg:height="0.357cm" svg:x="2.286cm" svg:y="13.514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4.506cm" svg:height="0.357cm" svg:x="2.286cm" svg:y="13.946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4.506cm" svg:height="0.357cm" svg:x="2.286cm" svg:y="14.386cm">
          <draw:text-box>
            <text:p text:style-name="P1"><text:span text:style-name="T1">____________________</text:span><text:span text:style-name="T1">________</text:span></text:p>
          </draw:text-box>
        </draw:frame>
        <draw:frame draw:style-name="gr1" draw:text-style-name="P2" draw:layer="layout" svg:width="6.115cm" svg:height="0.357cm" svg:x="7.408cm" svg:y="11.321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7.408cm" svg:y="11.761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7.408cm" svg:y="12.193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7.408cm" svg:y="12.633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7.408cm" svg:y="13.074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7.408cm" svg:y="13.514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7.408cm" svg:y="13.946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7.408cm" svg:y="14.386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14.173cm" svg:y="11.321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14.173cm" svg:y="11.761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14.173cm" svg:y="12.193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14.173cm" svg:y="12.633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14.173cm" svg:y="13.074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14.173cm" svg:y="13.514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15cm" svg:height="0.357cm" svg:x="14.173cm" svg:y="13.946cm">
          <draw:text-box>
            <text:p text:style-name="P1"><text:span text:style-name="T1">____________________</text:span><text:span text:style-name="T1">__________________</text:span></text:p>
          </draw:text-box>
        </draw:frame>
        <draw:frame draw:style-name="gr1" draw:text-style-name="P2" draw:layer="layout" svg:width="6.195cm" svg:height="0.357cm" svg:x="14.173cm" svg:y="14.386cm">
          <draw:text-box>
            <text:p text:style-name="P1"><text:span text:style-name="T1">____________________</text:span><text:span text:style-name="T1">__________________ </text:span></text:p>
          </draw:text-box>
        </draw:frame>
        <draw:frame draw:style-name="gr1" draw:text-style-name="P2" draw:layer="layout" svg:width="0.321cm" svg:height="0.357cm" svg:x="2.286cm" svg:y="14.8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32cm" svg:height="0.357cm" svg:x="2.286cm" svg:y="15.19cm">
          <draw:text-box>
            <text:p text:style-name="P1"><text:span text:style-name="T1">Rings </text:span></text:p>
          </draw:text-box>
        </draw:frame>
        <draw:frame draw:style-name="gr1" draw:text-style-name="P2" draw:layer="layout" svg:width="16.973cm" svg:height="0.357cm" svg:x="3.556cm" svg:y="15.19cm">
          <draw:text-box>
            <text:p text:style-name="P1"><text:span text:style-name="T1">_______________ <text:s text:c="3"/></text:span><text:span text:style-name="T1">________________ <text:s text:c="3"/></text:span><text:span text:style-name="T1">________________ <text:s text:c="3"/></text:span><text:span text:style-name="T1">________________ <text:s text:c="3"/></text:span><text:span text:style-name="T1">________________ <text:s text:c="3"/></text:span><text:span text:style-name="T1">________________ </text:span></text:p>
          </draw:text-box>
        </draw:frame>
        <draw:frame draw:style-name="gr1" draw:text-style-name="P2" draw:layer="layout" svg:width="1.048cm" svg:height="0.357cm" svg:x="2.286cm" svg:y="15.554cm">
          <draw:text-box>
            <text:p text:style-name="P1"><text:span text:style-name="T1">Potions </text:span></text:p>
          </draw:text-box>
        </draw:frame>
        <draw:frame draw:style-name="gr1" draw:text-style-name="P2" draw:layer="layout" svg:width="16.973cm" svg:height="0.357cm" svg:x="3.556cm" svg:y="15.554cm">
          <draw:text-box>
            <text:p text:style-name="P1"><text:span text:style-name="T1">_______________ <text:s text:c="3"/></text:span><text:span text:style-name="T1">________________ <text:s text:c="3"/></text:span><text:span text:style-name="T1">________________ <text:s text:c="3"/></text:span><text:span text:style-name="T1">________________ <text:s text:c="3"/></text:span><text:span text:style-name="T1">________________ <text:s text:c="3"/></text:span><text:span text:style-name="T1">________________ </text:span></text:p>
          </draw:text-box>
        </draw:frame>
        <draw:frame draw:style-name="gr1" draw:text-style-name="P2" draw:layer="layout" svg:width="0.321cm" svg:height="0.357cm" svg:x="2.286cm" svg:y="15.9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21cm" svg:height="0.357cm" svg:x="2.286cm" svg:y="16.2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993cm" svg:height="0.357cm" svg:x="6.604cm" svg:y="16.647cm">
          <draw:text-box>
            <text:p text:style-name="P1"><text:span text:style-name="T3">Money </text:span></text:p>
          </draw:text-box>
        </draw:frame>
        <draw:frame draw:style-name="gr1" draw:text-style-name="P2" draw:layer="layout" svg:width="2cm" svg:height="0.357cm" svg:x="2.286cm" svg:y="17.011cm">
          <draw:text-box>
            <text:p text:style-name="P1"><text:span text:style-name="T1">______ copper </text:span></text:p>
          </draw:text-box>
        </draw:frame>
        <draw:frame draw:style-name="gr8" draw:text-style-name="P11" draw:layer="layout" svg:width="0.269cm" svg:height="0.196cm" svg:x="4.267cm" svg:y="17.054cm">
          <draw:text-box>
            <text:p text:style-name="P1"><text:span text:style-name="T7">500</text:span></text:p>
          </draw:text-box>
        </draw:frame>
        <draw:frame draw:style-name="gr8" draw:text-style-name="P11" draw:layer="layout" svg:width="0.177cm" svg:height="0.196cm" svg:x="4.521cm" svg:y="17.02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6.513cm" svg:height="0.357cm" svg:x="5.148cm" svg:y="17.011cm">
          <draw:text-box>
            <text:p text:style-name="P1"><text:span text:style-name="T1">Treasure <text:s/>______ </text:span><text:span text:style-name="T1">______ ______ ______ </text:span><text:span text:style-name="T1">______ </text:span></text:p>
          </draw:text-box>
        </draw:frame>
        <draw:frame draw:style-name="gr1" draw:text-style-name="P2" draw:layer="layout" svg:width="1.839cm" svg:height="0.357cm" svg:x="2.286cm" svg:y="17.383cm">
          <draw:text-box>
            <text:p text:style-name="P1"><text:span text:style-name="T1">______ silver </text:span></text:p>
          </draw:text-box>
        </draw:frame>
        <draw:frame draw:style-name="gr8" draw:text-style-name="P11" draw:layer="layout" svg:width="0.18cm" svg:height="0.196cm" svg:x="4.106cm" svg:y="17.427cm">
          <draw:text-box>
            <text:p text:style-name="P1"><text:span text:style-name="T7">50</text:span></text:p>
          </draw:text-box>
        </draw:frame>
        <draw:frame draw:style-name="gr1" draw:text-style-name="P2" draw:layer="layout" svg:width="0.321cm" svg:height="0.357cm" svg:x="4.276cm" svg:y="17.3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23cm" svg:height="0.357cm" svg:x="5.148cm" svg:y="17.383cm">
          <draw:text-box>
            <text:p text:style-name="P1"><text:span text:style-name="T1">______ ______ ______ </text:span><text:span text:style-name="T1">______ ______ </text:span></text:p>
          </draw:text-box>
        </draw:frame>
        <draw:frame draw:style-name="gr1" draw:text-style-name="P2" draw:layer="layout" svg:width="1.048cm" svg:height="0.357cm" svg:x="10.549cm" svg:y="17.383cm">
          <draw:text-box>
            <text:p text:style-name="P1"><text:span text:style-name="T1">______ </text:span></text:p>
          </draw:text-box>
        </draw:frame>
        <draw:frame draw:style-name="gr1" draw:text-style-name="P2" draw:layer="layout" svg:width="2.25cm" svg:height="0.357cm" svg:x="2.286cm" svg:y="17.747cm">
          <draw:text-box>
            <text:p text:style-name="P1"><text:span text:style-name="T1">______ electrum </text:span></text:p>
          </draw:text-box>
        </draw:frame>
        <draw:frame draw:style-name="gr8" draw:text-style-name="P11" draw:layer="layout" svg:width="0.18cm" svg:height="0.196cm" svg:x="4.513cm" svg:y="17.791cm">
          <draw:text-box>
            <text:p text:style-name="P1"><text:span text:style-name="T7">10</text:span></text:p>
          </draw:text-box>
        </draw:frame>
        <draw:frame draw:style-name="gr1" draw:text-style-name="P2" draw:layer="layout" svg:width="0.321cm" svg:height="0.357cm" svg:x="4.682cm" svg:y="17.7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85cm" svg:height="0.357cm" svg:x="5.148cm" svg:y="17.747cm">
          <draw:text-box>
            <text:p text:style-name="P1"><text:span text:style-name="T1">______ ______ ______ </text:span><text:span text:style-name="T1">______ </text:span></text:p>
          </draw:text-box>
        </draw:frame>
        <draw:frame draw:style-name="gr1" draw:text-style-name="P2" draw:layer="layout" svg:width="2.093cm" svg:height="0.357cm" svg:x="9.516cm" svg:y="17.747cm">
          <draw:text-box>
            <text:p text:style-name="P1"><text:span text:style-name="T1">______ ______ </text:span></text:p>
          </draw:text-box>
        </draw:frame>
        <draw:frame draw:style-name="gr1" draw:text-style-name="P2" draw:layer="layout" svg:width="1.7cm" svg:height="0.357cm" svg:x="2.286cm" svg:y="18.111cm">
          <draw:text-box>
            <text:p text:style-name="P1"><text:span text:style-name="T1">______ gold </text:span></text:p>
          </draw:text-box>
        </draw:frame>
        <draw:frame draw:style-name="gr8" draw:text-style-name="P11" draw:layer="layout" svg:width="0.177cm" svg:height="0.196cm" svg:x="3.962cm" svg:y="18.155cm">
          <draw:text-box>
            <text:p text:style-name="P1"><text:span text:style-name="T7">5</text:span></text:p>
          </draw:text-box>
        </draw:frame>
        <draw:frame draw:style-name="gr1" draw:text-style-name="P2" draw:layer="layout" svg:width="0.321cm" svg:height="0.357cm" svg:x="4.047cm" svg:y="18.1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517cm" svg:height="0.357cm" svg:x="5.148cm" svg:y="18.111cm">
          <draw:text-box>
            <text:p text:style-name="P1"><text:span text:style-name="T1">____________________</text:span><text:span text:style-name="T1">____________________ </text:span></text:p>
          </draw:text-box>
        </draw:frame>
        <draw:frame draw:style-name="gr1" draw:text-style-name="P2" draw:layer="layout" svg:width="2.271cm" svg:height="0.357cm" svg:x="2.286cm" svg:y="18.475cm">
          <draw:text-box>
            <text:p text:style-name="P1"><text:span text:style-name="T1">______ platinum </text:span></text:p>
          </draw:text-box>
        </draw:frame>
        <draw:frame draw:style-name="gr8" draw:text-style-name="P11" draw:layer="layout" svg:width="0.177cm" svg:height="0.196cm" svg:x="4.53cm" svg:y="18.519cm">
          <draw:text-box>
            <text:p text:style-name="P1"><text:span text:style-name="T7">1</text:span></text:p>
          </draw:text-box>
        </draw:frame>
        <draw:frame draw:style-name="gr1" draw:text-style-name="P2" draw:layer="layout" svg:width="0.321cm" svg:height="0.357cm" svg:x="4.614cm" svg:y="18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517cm" svg:height="0.357cm" svg:x="5.148cm" svg:y="18.475cm">
          <draw:text-box>
            <text:p text:style-name="P1"><text:span text:style-name="T1">____________________</text:span><text:span text:style-name="T1">____________________ </text:span></text:p>
          </draw:text-box>
        </draw:frame>
        <draw:frame draw:style-name="gr1" draw:text-style-name="P2" draw:layer="layout" svg:width="1.526cm" svg:height="0.357cm" svg:x="16.205cm" svg:y="16.647cm">
          <draw:text-box>
            <text:p text:style-name="P1"><text:span text:style-name="T3">Experience </text:span></text:p>
          </draw:text-box>
        </draw:frame>
        <draw:frame draw:style-name="gr7" draw:text-style-name="P8" draw:layer="layout" svg:width="1.86cm" svg:height="0.31cm" svg:x="13.606cm" svg:y="17.015cm">
          <draw:text-box>
            <text:p text:style-name="P1"><text:span text:style-name="T6">Next Level Goal</text:span></text:p>
          </draw:text-box>
        </draw:frame>
        <draw:frame draw:style-name="gr1" draw:text-style-name="P2" draw:layer="layout" svg:width="0.321cm" svg:height="0.357cm" svg:x="15.486cm" svg:y="16.977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.306cm" svg:height="0.31cm" svg:x="16.146cm" svg:y="17.015cm">
          <draw:text-box>
            <text:p text:style-name="P1"><text:span text:style-name="T6">Bonus Exp </text:span></text:p>
          </draw:text-box>
        </draw:frame>
        <draw:frame draw:style-name="gr7" draw:text-style-name="P8" draw:layer="layout" svg:width="1.374cm" svg:height="0.31cm" svg:x="17.89cm" svg:y="17.015cm">
          <draw:text-box>
            <text:p text:style-name="P1"><text:span text:style-name="T6">Current Exp</text:span></text:p>
          </draw:text-box>
        </draw:frame>
        <draw:frame draw:style-name="gr1" draw:text-style-name="P2" draw:layer="layout" svg:width="0.321cm" svg:height="0.357cm" svg:x="19.279cm" svg:y="16.977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.886cm" svg:height="0.31cm" svg:x="13.606cm" svg:y="17.506cm">
          <draw:text-box>
            <text:p text:style-name="P1"><text:span text:style-name="T6">_____________ </text:span></text:p>
          </draw:text-box>
        </draw:frame>
        <draw:frame draw:style-name="gr7" draw:text-style-name="P8" draw:layer="layout" svg:width="1.001cm" svg:height="0.31cm" svg:x="16.146cm" svg:y="17.506cm">
          <draw:text-box>
            <text:p text:style-name="P1"><text:span text:style-name="T6">_____% </text:span></text:p>
          </draw:text-box>
        </draw:frame>
        <draw:frame draw:style-name="gr7" draw:text-style-name="P8" draw:layer="layout" svg:width="2.445cm" svg:height="0.31cm" svg:x="17.89cm" svg:y="17.506cm">
          <draw:text-box>
            <text:p text:style-name="P1"><text:span text:style-name="T6">_________________ </text:span></text:p>
          </draw:text-box>
        </draw:frame>
        <draw:frame draw:style-name="gr7" draw:text-style-name="P8" draw:layer="layout" svg:width="1.886cm" svg:height="0.31cm" svg:x="13.606cm" svg:y="17.988cm">
          <draw:text-box>
            <text:p text:style-name="P1"><text:span text:style-name="T6">_____________ </text:span></text:p>
          </draw:text-box>
        </draw:frame>
        <draw:frame draw:style-name="gr7" draw:text-style-name="P8" draw:layer="layout" svg:width="1.001cm" svg:height="0.31cm" svg:x="16.146cm" svg:y="17.988cm">
          <draw:text-box>
            <text:p text:style-name="P1"><text:span text:style-name="T6">_____% </text:span></text:p>
          </draw:text-box>
        </draw:frame>
        <draw:frame draw:style-name="gr7" draw:text-style-name="P8" draw:layer="layout" svg:width="2.445cm" svg:height="0.31cm" svg:x="17.89cm" svg:y="17.988cm">
          <draw:text-box>
            <text:p text:style-name="P1"><text:span text:style-name="T6">_________________ </text:span></text:p>
          </draw:text-box>
        </draw:frame>
        <draw:frame draw:style-name="gr7" draw:text-style-name="P8" draw:layer="layout" svg:width="1.886cm" svg:height="0.31cm" svg:x="13.606cm" svg:y="18.479cm">
          <draw:text-box>
            <text:p text:style-name="P1"><text:span text:style-name="T6">_____________ </text:span></text:p>
          </draw:text-box>
        </draw:frame>
        <draw:frame draw:style-name="gr7" draw:text-style-name="P8" draw:layer="layout" svg:width="1.001cm" svg:height="0.31cm" svg:x="16.146cm" svg:y="18.479cm">
          <draw:text-box>
            <text:p text:style-name="P1"><text:span text:style-name="T6">_____% </text:span></text:p>
          </draw:text-box>
        </draw:frame>
        <draw:frame draw:style-name="gr7" draw:text-style-name="P8" draw:layer="layout" svg:width="2.445cm" svg:height="0.31cm" svg:x="17.89cm" svg:y="18.479cm">
          <draw:text-box>
            <text:p text:style-name="P1"><text:span text:style-name="T6">_________________ </text:span></text:p>
          </draw:text-box>
        </draw:frame>
        <draw:frame draw:style-name="gr7" draw:text-style-name="P8" draw:layer="layout" svg:width="0.278cm" svg:height="0.31cm" svg:x="13.606cm" svg:y="18.96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278cm" svg:height="0.31cm" svg:x="2.286cm" svg:y="19.453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2.91cm" svg:height="0.357cm" svg:x="9.779cm" svg:y="19.932cm">
          <draw:text-box>
            <text:p text:style-name="P1"><text:span text:style-name="T3">Character Description </text:span></text:p>
          </draw:text-box>
        </draw:frame>
        <draw:frame draw:style-name="gr1" draw:text-style-name="P2" draw:layer="layout" svg:width="2.394cm" svg:height="0.357cm" svg:x="2.286cm" svg:y="20.304cm">
          <draw:text-box>
            <text:p text:style-name="P1"><text:span text:style-name="T1">Front Appearance </text:span></text:p>
          </draw:text-box>
        </draw:frame>
        <draw:frame draw:style-name="gr1" draw:text-style-name="P2" draw:layer="layout" svg:width="15.687cm" svg:height="0.357cm" svg:x="4.919cm" svg:y="20.304cm">
          <draw:text-box>
            <text:p text:style-name="P1"><text:span text:style-name="T1">____________________</text:span><text:span text:style-name="T1">____________________</text:span><text:span text:style-name="T1">____________________</text:span><text:span text:style-name="T1">____________________</text:span><text:span text:style-name="T1">_________________ </text:span></text:p>
          </draw:text-box>
        </draw:frame>
        <draw:frame draw:style-name="gr1" draw:text-style-name="P2" draw:layer="layout" svg:width="2.216cm" svg:height="0.357cm" svg:x="2.286cm" svg:y="20.668cm">
          <draw:text-box>
            <text:p text:style-name="P1"><text:span text:style-name="T1">Rear appearance </text:span></text:p>
          </draw:text-box>
        </draw:frame>
        <draw:frame draw:style-name="gr1" draw:text-style-name="P2" draw:layer="layout" svg:width="15.526cm" svg:height="0.357cm" svg:x="5.08cm" svg:y="20.668cm">
          <draw:text-box>
            <text:p text:style-name="P1"><text:span text:style-name="T1">____________________</text:span><text:span text:style-name="T1">____________________</text:span><text:span text:style-name="T1">____________________</text:span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1.67cm" svg:height="0.357cm" svg:x="2.286cm" svg:y="21.032cm">
          <draw:text-box>
            <text:p text:style-name="P1"><text:span text:style-name="T1">Mannerisms </text:span></text:p>
          </draw:text-box>
        </draw:frame>
        <draw:frame draw:style-name="gr1" draw:text-style-name="P2" draw:layer="layout" svg:width="16.008cm" svg:height="0.357cm" svg:x="4.597cm" svg:y="21.032cm">
          <draw:text-box>
            <text:p text:style-name="P1"><text:span text:style-name="T1">____________________</text:span><text:span text:style-name="T1">____________________</text:span><text:span text:style-name="T1">____________________</text:span><text:span text:style-name="T1">____________________</text:span><text:span text:style-name="T1">___________________ </text:span></text:p>
          </draw:text-box>
        </draw:frame>
        <draw:frame draw:style-name="gr1" draw:text-style-name="P2" draw:layer="layout" svg:width="9.167cm" svg:height="0.357cm" svg:x="2.286cm" svg:y="21.396cm">
          <draw:text-box>
            <text:p text:style-name="P1"><text:span text:style-name="T1">Father </text:span><text:span text:style-name="T1">____________________</text:span><text:span text:style-name="T1">_ <text:s text:c="2"/>Mother </text:span><text:span text:style-name="T1">____________________</text:span><text:span text:style-name="T1">__ </text:span></text:p>
          </draw:text-box>
        </draw:frame>
        <draw:frame draw:style-name="gr1" draw:text-style-name="P2" draw:layer="layout" svg:width="9.019cm" svg:height="0.357cm" svg:x="11.489cm" svg:y="21.396cm">
          <draw:text-box>
            <text:p text:style-name="P1"><text:span text:style-name="T1">Siblings_____________</text:span><text:span text:style-name="T1">____________________</text:span><text:span text:style-name="T1">________________ </text:span></text:p>
          </draw:text-box>
        </draw:frame>
        <draw:frame draw:style-name="gr1" draw:text-style-name="P2" draw:layer="layout" svg:width="11.512cm" svg:height="0.357cm" svg:x="2.286cm" svg:y="21.761cm">
          <draw:text-box>
            <text:p text:style-name="P1"><text:span text:style-name="T1">Deity </text:span><text:span text:style-name="T1">____________________</text:span><text:span text:style-name="T1">_____ <text:s text:c="2"/>Standing </text:span><text:span text:style-name="T1">____________________</text:span><text:span text:style-name="T1">____________ </text:span></text:p>
          </draw:text-box>
        </draw:frame>
        <draw:frame draw:style-name="gr1" draw:text-style-name="P2" draw:layer="layout" svg:width="5.908cm" svg:height="0.357cm" svg:x="14.563cm" svg:y="21.761cm">
          <draw:text-box>
            <text:p text:style-name="P1"><text:span text:style-name="T1">Tithe________________</text:span><text:span text:style-name="T1">________________ </text:span></text:p>
          </draw:text-box>
        </draw:frame>
        <draw:frame draw:style-name="gr1" draw:text-style-name="P2" draw:layer="layout" svg:width="0.321cm" svg:height="0.357cm" svg:x="2.286cm" svg:y="22.1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73cm" svg:height="0.357cm" svg:x="10.533cm" svg:y="22.489cm">
          <draw:text-box>
            <text:p text:style-name="P1"><text:span text:style-name="T3">Final Notes </text:span></text:p>
          </draw:text-box>
        </draw:frame>
        <draw:polygon draw:style-name="gr5" draw:text-style-name="P6" draw:layer="layout" svg:width="0.017cm" svg:height="0.118cm" svg:x="2.277cm" svg:y="22.843cm" svg:viewBox="0 0 18 119" draw:points="0,119 18,119 18,0 0,0">
          <text:p/>
        </draw:polygon>
        <draw:polygon draw:style-name="gr5" draw:text-style-name="P6" draw:layer="layout" svg:width="0.017cm" svg:height="0.016cm" svg:x="2.277cm" svg:y="22.843cm" svg:viewBox="0 0 18 17" draw:points="0,17 18,17 18,0 0,0">
          <text:p/>
        </draw:polygon>
        <draw:polygon draw:style-name="gr5" draw:text-style-name="P6" draw:layer="layout" svg:width="18cm" svg:height="0.016cm" svg:x="2.294cm" svg:y="22.843cm" svg:viewBox="0 0 18001 17" draw:points="0,17 18001,17 18001,0 0,0">
          <text:p/>
        </draw:polygon>
        <draw:polygon draw:style-name="gr5" draw:text-style-name="P6" draw:layer="layout" svg:width="0.017cm" svg:height="0.118cm" svg:x="20.294cm" svg:y="22.843cm" svg:viewBox="0 0 18 119" draw:points="0,119 18,119 18,0 0,0">
          <text:p/>
        </draw:polygon>
        <draw:polygon draw:style-name="gr5" draw:text-style-name="P6" draw:layer="layout" svg:width="0.017cm" svg:height="0.016cm" svg:x="20.294cm" svg:y="22.843cm" svg:viewBox="0 0 18 17" draw:points="0,17 18,17 18,0 0,0">
          <text:p/>
        </draw:polygon>
        <draw:polygon draw:style-name="gr5" draw:text-style-name="P6" draw:layer="layout" svg:width="0.017cm" svg:height="0.584cm" svg:x="2.277cm" svg:y="22.961cm" svg:viewBox="0 0 18 585" draw:points="0,585 18,585 18,0 0,0">
          <text:p/>
        </draw:polygon>
        <draw:polygon draw:style-name="gr5" draw:text-style-name="P6" draw:layer="layout" svg:width="0.017cm" svg:height="0.584cm" svg:x="20.294cm" svg:y="22.961cm" svg:viewBox="0 0 18 585" draw:points="0,585 18,585 18,0 0,0">
          <text:p/>
        </draw:polygon>
        <draw:frame draw:style-name="gr9" draw:text-style-name="P12" draw:layer="layout" svg:width="0.422cm" svg:height="0.471cm" svg:x="2.379cm" svg:y="22.974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0.017cm" svg:height="0.093cm" svg:x="2.277cm" svg:y="23.545cm" svg:viewBox="0 0 18 94" draw:points="0,94 18,94 18,0 0,0">
          <text:p/>
        </draw:polygon>
        <draw:polygon draw:style-name="gr5" draw:text-style-name="P6" draw:layer="layout" svg:width="18cm" svg:height="0.017cm" svg:x="2.294cm" svg:y="23.545cm" svg:viewBox="0 0 18001 18" draw:points="0,18 18001,18 18001,0 0,0">
          <text:p/>
        </draw:polygon>
        <draw:polygon draw:style-name="gr5" draw:text-style-name="P6" draw:layer="layout" svg:width="0.017cm" svg:height="0.093cm" svg:x="20.294cm" svg:y="23.545cm" svg:viewBox="0 0 18 94" draw:points="0,94 18,94 18,0 0,0">
          <text:p/>
        </draw:polygon>
        <draw:polygon draw:style-name="gr5" draw:text-style-name="P6" draw:layer="layout" svg:width="0.017cm" svg:height="0.585cm" svg:x="2.277cm" svg:y="23.638cm" svg:viewBox="0 0 18 586" draw:points="0,586 18,586 18,0 0,0">
          <text:p/>
        </draw:polygon>
        <draw:polygon draw:style-name="gr5" draw:text-style-name="P6" draw:layer="layout" svg:width="0.017cm" svg:height="0.585cm" svg:x="20.294cm" svg:y="23.638cm" svg:viewBox="0 0 18 586" draw:points="0,586 18,586 18,0 0,0">
          <text:p/>
        </draw:polygon>
        <draw:frame draw:style-name="gr9" draw:text-style-name="P12" draw:layer="layout" svg:width="0.422cm" svg:height="0.471cm" svg:x="2.379cm" svg:y="23.651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0.017cm" svg:height="0.093cm" svg:x="2.277cm" svg:y="24.223cm" svg:viewBox="0 0 18 94" draw:points="0,94 18,94 18,0 0,0">
          <text:p/>
        </draw:polygon>
        <draw:polygon draw:style-name="gr5" draw:text-style-name="P6" draw:layer="layout" svg:width="18cm" svg:height="0.017cm" svg:x="2.294cm" svg:y="24.223cm" svg:viewBox="0 0 18001 18" draw:points="0,18 18001,18 18001,0 0,0">
          <text:p/>
        </draw:polygon>
        <draw:polygon draw:style-name="gr5" draw:text-style-name="P6" draw:layer="layout" svg:width="0.017cm" svg:height="0.093cm" svg:x="20.294cm" svg:y="24.223cm" svg:viewBox="0 0 18 94" draw:points="0,94 18,94 18,0 0,0">
          <text:p/>
        </draw:polygon>
        <draw:polygon draw:style-name="gr5" draw:text-style-name="P6" draw:layer="layout" svg:width="0.017cm" svg:height="0.592cm" svg:x="2.277cm" svg:y="24.316cm" svg:viewBox="0 0 18 593" draw:points="0,593 18,593 18,0 0,0">
          <text:p/>
        </draw:polygon>
        <draw:polygon draw:style-name="gr5" draw:text-style-name="P6" draw:layer="layout" svg:width="0.017cm" svg:height="0.592cm" svg:x="20.294cm" svg:y="24.316cm" svg:viewBox="0 0 18 593" draw:points="0,593 18,593 18,0 0,0">
          <text:p/>
        </draw:polygon>
        <draw:frame draw:style-name="gr9" draw:text-style-name="P12" draw:layer="layout" svg:width="0.422cm" svg:height="0.471cm" svg:x="2.379cm" svg:y="24.337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0.017cm" svg:height="0.094cm" svg:x="2.277cm" svg:y="24.908cm" svg:viewBox="0 0 18 95" draw:points="0,95 18,95 18,0 0,0">
          <text:p/>
        </draw:polygon>
        <draw:polygon draw:style-name="gr5" draw:text-style-name="P6" draw:layer="layout" svg:width="18cm" svg:height="0.017cm" svg:x="2.294cm" svg:y="24.908cm" svg:viewBox="0 0 18001 18" draw:points="0,18 18001,18 18001,0 0,0">
          <text:p/>
        </draw:polygon>
        <draw:polygon draw:style-name="gr5" draw:text-style-name="P6" draw:layer="layout" svg:width="0.017cm" svg:height="0.094cm" svg:x="20.294cm" svg:y="24.908cm" svg:viewBox="0 0 18 95" draw:points="0,95 18,95 18,0 0,0">
          <text:p/>
        </draw:polygon>
        <draw:polygon draw:style-name="gr5" draw:text-style-name="P6" draw:layer="layout" svg:width="0.017cm" svg:height="0.584cm" svg:x="2.277cm" svg:y="25.002cm" svg:viewBox="0 0 18 585" draw:points="0,585 18,585 18,0 0,0">
          <text:p/>
        </draw:polygon>
        <draw:polygon draw:style-name="gr5" draw:text-style-name="P6" draw:layer="layout" svg:width="0.017cm" svg:height="0.017cm" svg:x="2.277cm" svg:y="25.586cm" svg:viewBox="0 0 18 18" draw:points="0,18 18,18 18,0 0,0">
          <text:p/>
        </draw:polygon>
        <draw:polygon draw:style-name="gr5" draw:text-style-name="P6" draw:layer="layout" svg:width="0.017cm" svg:height="0.017cm" svg:x="2.277cm" svg:y="25.586cm" svg:viewBox="0 0 18 18" draw:points="0,18 18,18 18,0 0,0">
          <text:p/>
        </draw:polygon>
        <draw:polygon draw:style-name="gr5" draw:text-style-name="P6" draw:layer="layout" svg:width="18cm" svg:height="0.017cm" svg:x="2.294cm" svg:y="25.586cm" svg:viewBox="0 0 18001 18" draw:points="0,18 18001,18 18001,0 0,0">
          <text:p/>
        </draw:polygon>
        <draw:polygon draw:style-name="gr5" draw:text-style-name="P6" draw:layer="layout" svg:width="0.017cm" svg:height="0.584cm" svg:x="20.294cm" svg:y="25.002cm" svg:viewBox="0 0 18 585" draw:points="0,585 18,585 18,0 0,0">
          <text:p/>
        </draw:polygon>
        <draw:polygon draw:style-name="gr5" draw:text-style-name="P6" draw:layer="layout" svg:width="0.017cm" svg:height="0.017cm" svg:x="20.294cm" svg:y="25.586cm" svg:viewBox="0 0 18 18" draw:points="0,18 18,18 18,0 0,0">
          <text:p/>
        </draw:polygon>
        <draw:polygon draw:style-name="gr5" draw:text-style-name="P6" draw:layer="layout" svg:width="0.017cm" svg:height="0.017cm" svg:x="20.294cm" svg:y="25.586cm" svg:viewBox="0 0 18 18" draw:points="0,18 18,18 18,0 0,0">
          <text:p/>
        </draw:polygon>
        <draw:frame draw:style-name="gr9" draw:text-style-name="P12" draw:layer="layout" svg:width="0.422cm" svg:height="0.471cm" svg:x="2.379cm" svg:y="25.014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0.025cm" svg:height="3.505cm" svg:x="7.078cm" svg:y="11.311cm" svg:viewBox="0 0 26 3506" draw:points="0,3506 26,3506 26,0 0,0">
          <text:p/>
        </draw:polygon>
        <draw:polygon draw:style-name="gr5" draw:text-style-name="P6" draw:layer="layout" svg:width="0.026cm" svg:height="3.505cm" svg:x="13.843cm" svg:y="11.311cm" svg:viewBox="0 0 27 3506" draw:points="0,3506 27,3506 27,0 0,0">
          <text:p/>
        </draw:polygon>
        <draw:frame draw:style-name="gr1" draw:text-style-name="P2" draw:layer="layout" svg:width="0.321cm" svg:height="0.357cm" svg:x="2.286cm" svg:y="25.613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Bol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, Bo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2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 draw:protected="true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9T13:01:45.199939780</dc:date>
    <meta:editing-duration>PT1H13M59S</meta:editing-duration>
    <meta:editing-cycles>16</meta:editing-cycles>
    <meta:generator>LibreOffice/24.2.7.2$Linux_X86_64 LibreOffice_project/420$Build-2</meta:generator>
    <meta:print-date>2026-04-09T12:56:45.035696667</meta:print-date>
    <meta:printed-by>PDF files</meta:printed-by>
    <meta:document-statistic meta:object-count="820"/>
  </office:meta>
</office:document-meta>
</file>