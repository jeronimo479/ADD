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Bol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1" svg:font-family="'Times New Roman', Bol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6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0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01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fo:borde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76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71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33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7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65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1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43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6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4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90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7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7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2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5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35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40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4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6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62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2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8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6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0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8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6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9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3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8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3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5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3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9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3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64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5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66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2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71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3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558cm" fo:min-width="0.32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3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7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8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9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0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6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1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5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3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2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41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9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3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8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solid" draw:fill-color="#000000" loext:decorative="false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17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1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89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0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861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34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5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2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9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6.461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196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78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56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4.4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209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55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925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27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04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908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61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69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891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83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03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705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658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187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565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297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09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187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74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91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06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497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5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53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5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9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47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8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6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75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87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4.836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536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52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06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1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973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048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513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39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5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18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9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517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71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26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6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306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374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8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001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445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1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87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16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526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008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167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19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512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908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73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loext:graphic-properties draw:fill="none"/>
      <style:paragraph-properties fo:text-align="start"/>
      <style:text-properties fo:font-size="9.10000038146973pt" style:font-size-asian="9.10000038146973pt" style:font-size-complex="9.10000038146973pt"/>
    </style:style>
    <style:style style:name="P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loext:graphic-properties draw:fill="none"/>
      <style:paragraph-properties fo:text-align="start"/>
      <style:text-properties fo:font-size="7.90000009536743pt" style:font-size-asian="7.90000009536743pt" style:font-size-complex="7.90000009536743pt"/>
    </style:style>
    <style:style style:name="P10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end"/>
      <style:text-properties style:text-line-through-style="none" style:text-line-through-type="none" fo:font-style="normal" style:text-underline-style="none"/>
    </style:style>
    <style:style style:name="P12" style:family="paragraph">
      <loext:graphic-properties draw:fill="none"/>
      <style:text-properties fo:font-size="5pt" style:font-size-asian="5pt" style:font-size-complex="5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Times New Roman" fo:font-size="9.10000038146973pt" fo:font-weight="normal" style:font-name-asian="Times New Roman" style:font-size-asian="9.10000038146973pt" style:font-weight-asian="normal" style:font-name-complex="Times New Roman" style:font-size-complex="9.10000038146973pt" style:font-weight-complex="normal"/>
    </style:style>
    <style:style style:name="T2" style:family="text">
      <style:text-properties fo:color="#000000" loext:opacity="100%" style:font-name="Courier New" fo:font-size="9.10000038146973pt" fo:font-weight="normal" style:font-name-asian="Courier New" style:font-size-asian="9.10000038146973pt" style:font-weight-asian="normal" style:font-name-complex="Courier New" style:font-size-complex="9.10000038146973pt" style:font-weight-complex="normal"/>
    </style:style>
    <style:style style:name="T3" style:family="text">
      <style:text-properties fo:color="#000000" loext:opacity="100%" style:font-name="Times New Roman1" fo:font-size="9.10000038146973pt" fo:font-weight="normal" style:font-name-asian="Times New Roman1" style:font-size-asian="9.10000038146973pt" style:font-weight-asian="normal" style:font-name-complex="Times New Roman1" style:font-size-complex="9.10000038146973pt" style:font-weight-complex="normal"/>
    </style:style>
    <style:style style:name="T4" style:family="text">
      <style:text-properties fo:color="#000000" loext:opacity="100%" style:font-name="Times New Roman1" fo:font-size="10.1000003814697pt" fo:font-weight="normal" style:font-name-asian="Times New Roman1" style:font-size-asian="10.1000003814697pt" style:font-weight-asian="normal" style:font-name-complex="Times New Roman1" style:font-size-complex="10.1000003814697pt" style:font-weight-complex="normal"/>
    </style:style>
    <style:style style:name="T5" style:family="text">
      <style:text-properties fo:color="#000000" loext:opacity="100%" style:font-name="Times New Roman" fo:font-size="6pt" fo:font-weight="normal" style:font-name-asian="Times New Roman" style:font-size-asian="6pt" style:font-weight-asian="normal" style:font-name-complex="Times New Roman" style:font-size-complex="6pt" style:font-weight-complex="normal"/>
    </style:style>
    <style:style style:name="T6" style:family="text">
      <style:text-properties fo:color="#000000" loext:opacity="100%" style:font-name="Times New Roman" fo:font-size="7.90000009536743pt" fo:font-weight="normal" style:font-name-asian="Times New Roman" style:font-size-asian="7.90000009536743pt" style:font-weight-asian="normal" style:font-name-complex="Times New Roman" style:font-size-complex="7.90000009536743pt" style:font-weight-complex="normal"/>
    </style:style>
    <style:style style:name="T7" style:family="text">
      <style:text-properties fo:color="#000000" loext:opacity="100%" style:font-name="Times New Roman" fo:font-size="5pt" fo:font-weight="normal" style:font-name-asian="Times New Roman" style:font-size-asian="5pt" style:font-weight-asian="normal" style:font-name-complex="Times New Roman" style:font-size-complex="5pt" style:font-weight-complex="normal"/>
    </style:style>
    <style:style style:name="T8" style:family="text">
      <style:text-properties fo:color="#000000" loext:opacity="100%" style:font-name="Times New Roman1" fo:font-size="5pt" fo:font-weight="normal" style:font-name-asian="Times New Roman1" style:font-size-asian="5pt" style:font-weight-asian="normal" style:font-name-complex="Times New Roman1" style:font-size-complex="5pt" style:font-weight-complex="normal"/>
    </style:style>
    <style:style style:name="T9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Player's Name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2" form:id="control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Guise" form:control-implementation="ooo:com.sun.star.form.component.TextField" xml:id="control3" form:id="control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Character's Name"/>
                <form:property form:property-name="ObjIDinMSO" office:value-type="float" office:value="65535"/>
              </form:properties>
            </form:text>
            <form:text form:name="Mv" form:control-implementation="ooo:com.sun.star.form.component.TextField" xml:id="control4" form:id="control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Movement Rate"/>
                <form:property form:property-name="ObjIDinMSO" office:value-type="float" office:value="65535"/>
              </form:properties>
            </form:text>
            <form:text form:name="Vision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Normal, Infravision, or Ultravision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Left, Right, or Ambidextrous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75" form:id="control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76" form:id="control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77" form:id="control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78" form:id="control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79" form:id="control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80" form:id="control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control-implementation="ooo:com.sun.star.form.component.TextField" xml:id="control81" form:id="control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82" form:id="control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0.67cm" svg:height="0.357cm" svg:x="2.286cm" svg:y="0.772cm">
          <draw:text-box>
            <text:p text:style-name="P1"><text:span text:style-name="T1">v</text:span><text:span text:style-name="T1">: </text:span><text:span text:style-name="T1">X</text:span><text:span text:style-name="T1">X</text:span><text:span text:style-name="T1">V</text:span><text:span text:style-name="T1">I</text:span><text:span text:style-name="T1">I</text:span><text:span text:style-name="T1">I 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1">N</text:span><text:span text:style-name="T1">a</text:span><text:span text:style-name="T1">m</text:span><text:span text:style-name="T1">e</text:span><text:span text:style-name="T1">: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D</text:span><text:span text:style-name="T1">a</text:span><text:span text:style-name="T1">t</text:span><text:span text:style-name="T1">e</text:span><text:span text:style-name="T1">_</text:span><text:span text:style-name="T1">_</text:span><text:span text:style-name="T1">_</text:span><text:span text:style-name="T1">_</text:span><text:span text:style-name="T1">-</text:span><text:span text:style-name="T1">_</text:span><text:span text:style-name="T1">_</text:span><text:span text:style-name="T1">_</text:span><text:span text:style-name="T1">_</text:span><text:span text:style-name="T1">-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2" draw:text-style-name="P2" draw:layer="layout" svg:width="9.988cm" svg:height="0.357cm" svg:x="2.286cm" svg:y="1.491cm">
          <draw:text-box>
            <text:p text:style-name="P1"><text:span text:style-name="T1">G</text:span><text:span text:style-name="T1">u</text:span><text:span text:style-name="T1">i</text:span><text:span text:style-name="T1">s</text:span><text:span text:style-name="T1">e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 text:c="2"/></text:span><text:span text:style-name="T1">M</text:span><text:span text:style-name="T1">v</text:span><text:span text:style-name="T1">_</text:span><text:span text:style-name="T1">_</text:span><text:span text:style-name="T1">_</text:span><text:span text:style-name="T1">"</text:span><text:span text:style-name="T1"> <text:s/></text:span><text:span text:style-name="T1"><text:s text:c="2"/></text:span><text:span text:style-name="T1">V</text:span><text:span text:style-name="T1">i</text:span><text:span text:style-name="T1">s</text:span><text:span text:style-name="T1">i</text:span><text:span text:style-name="T1">o</text:span><text:span text:style-name="T1">n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" draw:text-style-name="P2" draw:layer="layout" svg:width="2.208cm" svg:height="0.357cm" svg:x="12.412cm" svg:y="1.491cm">
          <draw:text-box>
            <text:p text:style-name="P1"><text:span text:style-name="T1">H</text:span><text:span text:style-name="T1">a</text:span><text:span text:style-name="T1">n</text:span><text:span text:style-name="T1">d</text:span><text:span text:style-name="T1">e</text:span><text:span text:style-name="T1">d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4" draw:text-style-name="P2" draw:layer="layout" svg:width="10.018cm" svg:height="0.357cm" svg:x="2.286cm" svg:y="1.855cm">
          <draw:text-box>
            <text:p text:style-name="P1"><text:span text:style-name="T1">H</text:span><text:span text:style-name="T1">t</text:span><text:span text:style-name="T1">_</text:span><text:span text:style-name="T1">_</text:span><text:span text:style-name="T1">_</text:span><text:span text:style-name="T1">_</text:span><text:span text:style-name="T1">_</text:span><text:span text:style-name="T1">'</text:span><text:span text:style-name="T1">_</text:span><text:span text:style-name="T1">_</text:span><text:span text:style-name="T1">_</text:span><text:span text:style-name="T1">_</text:span><text:span text:style-name="T1">_</text:span><text:span text:style-name="T1">"</text:span><text:span text:style-name="T1"> <text:s/></text:span><text:span text:style-name="T1">W</text:span><text:span text:style-name="T1">t</text:span><text:span text:style-name="T1">_</text:span><text:span text:style-name="T1">_</text:span><text:span text:style-name="T1">_</text:span><text:span text:style-name="T1">_</text:span><text:span text:style-name="T1"> </text:span><text:span text:style-name="T1">l</text:span><text:span text:style-name="T1">b</text:span><text:span text:style-name="T1">s</text:span><text:span text:style-name="T1">. </text:span><text:span text:style-name="T1"><text:s/></text:span><text:span text:style-name="T1">A</text:span><text:span text:style-name="T1">g</text:span><text:span text:style-name="T1">e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-</text:span><text:span text:style-name="T1">_</text:span><text:span text:style-name="T1">_</text:span><text:span text:style-name="T1">_</text:span><text:span text:style-name="T1">_</text:span><text:span text:style-name="T1"> </text:span><text:span text:style-name="T1">(</text:span><text:span text:style-name="T1">m</text:span><text:span text:style-name="T1">a</text:span><text:span text:style-name="T1">x</text:span><text:span text:style-name="T1">_</text:span><text:span text:style-name="T1">_</text:span><text:span text:style-name="T1">_</text:span><text:span text:style-name="T1">_</text:span><text:span text:style-name="T1">_</text:span><text:span text:style-name="T1">) </text:span><text:span text:style-name="T1"><text:s/></text:span><text:span text:style-name="T1">H</text:span><text:span text:style-name="T1">a</text:span><text:span text:style-name="T1">i</text:span><text:span text:style-name="T1">r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" draw:text-style-name="P2" draw:layer="layout" svg:width="2.153cm" svg:height="0.357cm" svg:x="12.463cm" svg:y="1.855cm">
          <draw:text-box>
            <text:p text:style-name="P1"><text:span text:style-name="T1">E</text:span><text:span text:style-name="T1">y</text:span><text:span text:style-name="T1">e</text:span><text:span text:style-name="T1">s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control draw:style-name="gr6" draw:text-style-name="P3" draw:layer="controls" svg:width="4.392cm" svg:height="0.291cm" svg:x="5.516cm" svg:y="0.768cm" draw:control="control1"/>
        <draw:frame draw:style-name="gr7" draw:text-style-name="P2" draw:layer="layout" svg:width="10.767cm" svg:height="0.357cm" svg:x="2.286cm" svg:y="2.219cm">
          <draw:text-box>
            <text:p text:style-name="P1"><text:span text:style-name="T1">R</text:span><text:span text:style-name="T1">a</text:span><text:span text:style-name="T1">c</text:span><text:span text:style-name="T1">e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/></text:span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&amp;</text:span><text:span text:style-name="T1"> </text:span><text:span text:style-name="T1">L</text:span><text:span text:style-name="T1">e</text:span><text:span text:style-name="T1">v</text:span><text:span text:style-name="T1">e</text:span><text:span text:style-name="T1">l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8" draw:text-style-name="P2" draw:layer="layout" svg:width="1.53cm" svg:height="0.357cm" svg:x="13.081cm" svg:y="2.21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9" draw:text-style-name="P2" draw:layer="layout" svg:width="6.712cm" svg:height="0.357cm" svg:x="2.286cm" svg:y="2.592cm">
          <draw:text-box>
            <text:p text:style-name="P1"><text:span text:style-name="T1">A</text:span><text:span text:style-name="T1">l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/></text:span><text:span text:style-name="T1">L</text:span><text:span text:style-name="T1">u</text:span><text:span text:style-name="T1">c</text:span><text:span text:style-name="T1">k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/></text:span><text:span text:style-name="T1">W</text:span><text:span text:style-name="T1">i</text:span><text:span text:style-name="T1">l</text:span><text:span text:style-name="T1">l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0" draw:text-style-name="P2" draw:layer="layout" svg:width="4.333cm" svg:height="0.357cm" svg:x="10.312cm" svg:y="2.592cm">
          <draw:text-box>
            <text:p text:style-name="P1"><text:span text:style-name="T1">S</text:span><text:span text:style-name="T1">u</text:span><text:span text:style-name="T1">r</text:span><text:span text:style-name="T1">p</text:span><text:span text:style-name="T1">r</text:span><text:span text:style-name="T1">i</text:span><text:span text:style-name="T1">s</text:span><text:span text:style-name="T1">e</text:span><text:span text:style-name="T1">_</text:span><text:span text:style-name="T1">_</text:span><text:span text:style-name="T1">_</text:span><text:span text:style-name="T1">/</text:span><text:span text:style-name="T1">1</text:span><text:span text:style-name="T1">0</text:span><text:span text:style-name="T1"> <text:s/></text:span><text:span text:style-name="T1">S</text:span><text:span text:style-name="T1">u</text:span><text:span text:style-name="T1">r</text:span><text:span text:style-name="T1">p</text:span><text:span text:style-name="T1">r</text:span><text:span text:style-name="T1">i</text:span><text:span text:style-name="T1">s</text:span><text:span text:style-name="T1">e</text:span><text:span text:style-name="T1">d</text:span><text:span text:style-name="T1">_</text:span><text:span text:style-name="T1">_</text:span><text:span text:style-name="T1">_</text:span><text:span text:style-name="T1">/</text:span><text:span text:style-name="T1">1</text:span><text:span text:style-name="T1">0</text:span><text:span text:style-name="T1"> </text:span></text:p>
          </draw:text-box>
        </draw:frame>
        <draw:frame draw:style-name="gr11" draw:text-style-name="P2" draw:layer="layout" svg:width="0.321cm" svg:height="0.357cm" svg:x="2.286cm" svg:y="2.95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578cm" svg:height="0.365cm" svg:x="2.286cm" svg:y="3.339cm">
          <draw:text-box>
            <text:p text:style-name="P1"><text:span text:style-name="T2">S</text:span><text:span text:style-name="T2">T</text:span><text:span text:style-name="T2">R</text:span></text:p>
          </draw:text-box>
        </draw:frame>
        <draw:frame draw:style-name="gr13" draw:text-style-name="P2" draw:layer="layout" svg:width="7.652cm" svg:height="0.357cm" svg:x="2.862cm" svg:y="3.32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 </text:span><text:span text:style-name="T1">_</text:span><text:span text:style-name="T1">_</text:span><text:span text:style-name="T1">_</text:span><text:span text:style-name="T1">_</text:span><text:span text:style-name="T1">%</text:span><text:span text:style-name="T1"> <text:s/></text:span><text:span text:style-name="T1"><text:s/></text:span><text:span text:style-name="T1">h</text:span><text:span text:style-name="T1">i</text:span><text:span text:style-name="T1">t</text:span><text:span text:style-name="T1">_</text:span><text:span text:style-name="T1">_</text:span><text:span text:style-name="T1">_</text:span><text:span text:style-name="T1"> <text:s/></text:span><text:span text:style-name="T1">d</text:span><text:span text:style-name="T1">m</text:span><text:span text:style-name="T1">g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 text:c="2"/></text:span><text:span text:style-name="T1"><text:s/></text:span><text:span text:style-name="T1">o</text:span><text:span text:style-name="T1">p</text:span><text:span text:style-name="T1">e</text:span><text:span text:style-name="T1">n</text:span><text:span text:style-name="T1"> </text:span><text:span text:style-name="T1">d</text:span><text:span text:style-name="T1">o</text:span><text:span text:style-name="T1">o</text:span><text:span text:style-name="T1">r</text:span><text:span text:style-name="T1">s</text:span><text:span text:style-name="T1">_</text:span><text:span text:style-name="T1">_</text:span><text:span text:style-name="T1">_</text:span><text:span text:style-name="T1"> </text:span><text:span text:style-name="T1">(</text:span><text:span text:style-name="T1">_</text:span><text:span text:style-name="T1">_</text:span><text:span text:style-name="T1">_</text:span><text:span text:style-name="T1">)</text:span><text:span text:style-name="T1">/</text:span><text:span text:style-name="T1">2</text:span><text:span text:style-name="T1">0</text:span><text:span text:style-name="T1"> </text:span></text:p>
          </draw:text-box>
        </draw:frame>
        <draw:frame draw:style-name="gr14" draw:text-style-name="P2" draw:layer="layout" svg:width="3.511cm" svg:height="0.357cm" svg:x="11.125cm" svg:y="3.32cm">
          <draw:text-box>
            <text:p text:style-name="P1"><text:span text:style-name="T1">b</text:span><text:span text:style-name="T1">e</text:span><text:span text:style-name="T1">n</text:span><text:span text:style-name="T1">d</text:span><text:span text:style-name="T1"> </text:span><text:span text:style-name="T1">b</text:span><text:span text:style-name="T1">a</text:span><text:span text:style-name="T1">r</text:span><text:span text:style-name="T1">s</text:span><text:span text:style-name="T1">, </text:span><text:span text:style-name="T1">l</text:span><text:span text:style-name="T1">i</text:span><text:span text:style-name="T1">f</text:span><text:span text:style-name="T1">t </text:span><text:span text:style-name="T1">g</text:span><text:span text:style-name="T1">a</text:span><text:span text:style-name="T1">t</text:span><text:span text:style-name="T1">e</text:span><text:span text:style-name="T1">s</text:span><text:span text:style-name="T1">%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" draw:text-style-name="P2" draw:layer="layout" svg:width="0.578cm" svg:height="0.365cm" svg:x="2.286cm" svg:y="3.728cm">
          <draw:text-box>
            <text:p text:style-name="P1"><text:span text:style-name="T2">D</text:span><text:span text:style-name="T2">E</text:span><text:span text:style-name="T2">X</text:span></text:p>
          </draw:text-box>
        </draw:frame>
        <draw:frame draw:style-name="gr15" draw:text-style-name="P2" draw:layer="layout" svg:width="8.434cm" svg:height="0.357cm" svg:x="2.862cm" svg:y="3.71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 <text:s/></text:span><text:span text:style-name="T1">r</text:span><text:span text:style-name="T1">e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d</text:span><text:span text:style-name="T1">j</text:span><text:span text:style-name="T1">u</text:span><text:span text:style-name="T1">s</text:span><text:span text:style-name="T1">t</text:span><text:span text:style-name="T1">m</text:span><text:span text:style-name="T1">e</text:span><text:span text:style-name="T1">n</text:span><text:span text:style-name="T1">t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m</text:span><text:span text:style-name="T1">i</text:span><text:span text:style-name="T1">s</text:span><text:span text:style-name="T1">s</text:span><text:span text:style-name="T1">i</text:span><text:span text:style-name="T1">l</text:span><text:span text:style-name="T1">e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 </text:span><text:span text:style-name="T1">a</text:span><text:span text:style-name="T1">d</text:span><text:span text:style-name="T1">j</text:span><text:span text:style-name="T1">u</text:span><text:span text:style-name="T1">s</text:span><text:span text:style-name="T1">t</text:span><text:span text:style-name="T1">m</text:span><text:span text:style-name="T1">e</text:span><text:span text:style-name="T1">n</text:span><text:span text:style-name="T1">t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6" draw:text-style-name="P2" draw:layer="layout" svg:width="2.665cm" svg:height="0.357cm" svg:x="11.963cm" svg:y="3.71cm">
          <draw:text-box>
            <text:p text:style-name="P1"><text:span text:style-name="T1">A</text:span><text:span text:style-name="T1">C</text:span><text:span text:style-name="T1"> </text:span><text:span text:style-name="T1">a</text:span><text:span text:style-name="T1">d</text:span><text:span text:style-name="T1">j</text:span><text:span text:style-name="T1">u</text:span><text:span text:style-name="T1">s</text:span><text:span text:style-name="T1">t</text:span><text:span text:style-name="T1">m</text:span><text:span text:style-name="T1">e</text:span><text:span text:style-name="T1">n</text:span><text:span text:style-name="T1">t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" draw:text-style-name="P2" draw:layer="layout" svg:width="0.578cm" svg:height="0.365cm" svg:x="2.286cm" svg:y="4.118cm">
          <draw:text-box>
            <text:p text:style-name="P1"><text:span text:style-name="T2">C</text:span><text:span text:style-name="T2">O</text:span><text:span text:style-name="T2">N</text:span></text:p>
          </draw:text-box>
        </draw:frame>
        <draw:frame draw:style-name="gr17" draw:text-style-name="P2" draw:layer="layout" svg:width="10.141cm" svg:height="0.357cm" svg:x="2.862cm" svg:y="4.099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 <text:s/></text:span><text:span text:style-name="T1">h</text:span><text:span text:style-name="T1">i</text:span><text:span text:style-name="T1">t </text:span><text:span text:style-name="T1">p</text:span><text:span text:style-name="T1">o</text:span><text:span text:style-name="T1">i</text:span><text:span text:style-name="T1">n</text:span><text:span text:style-name="T1">t </text:span><text:span text:style-name="T1">b</text:span><text:span text:style-name="T1">o</text:span><text:span text:style-name="T1">n</text:span><text:span text:style-name="T1">u</text:span><text:span text:style-name="T1">s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s</text:span><text:span text:style-name="T1">h</text:span><text:span text:style-name="T1">o</text:span><text:span text:style-name="T1">c</text:span><text:span text:style-name="T1">k</text:span><text:span text:style-name="T1">%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r</text:span><text:span text:style-name="T1">e</text:span><text:span text:style-name="T1">s</text:span><text:span text:style-name="T1">u</text:span><text:span text:style-name="T1">r</text:span><text:span text:style-name="T1">r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u</text:span><text:span text:style-name="T1">r</text:span><text:span text:style-name="T1">v</text:span><text:span text:style-name="T1">i</text:span><text:span text:style-name="T1">v</text:span><text:span text:style-name="T1">a</text:span><text:span text:style-name="T1">l</text:span><text:span text:style-name="T1">%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8" draw:text-style-name="P2" draw:layer="layout" svg:width="1.42cm" svg:height="0.357cm" svg:x="13.191cm" svg:y="4.099cm">
          <draw:text-box>
            <text:p text:style-name="P1"><text:span text:style-name="T1">p</text:span><text:span text:style-name="T1">o</text:span><text:span text:style-name="T1">i</text:span><text:span text:style-name="T1">s</text:span><text:span text:style-name="T1">o</text:span><text:span text:style-name="T1">n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" draw:text-style-name="P2" draw:layer="layout" svg:width="0.578cm" svg:height="0.365cm" svg:x="2.286cm" svg:y="4.516cm">
          <draw:text-box>
            <text:p text:style-name="P1"><text:span text:style-name="T2">I</text:span><text:span text:style-name="T2">N</text:span><text:span text:style-name="T2">T</text:span></text:p>
          </draw:text-box>
        </draw:frame>
        <draw:frame draw:style-name="gr19" draw:text-style-name="P2" draw:layer="layout" svg:width="8.909cm" svg:height="0.357cm" svg:x="2.862cm" svg:y="4.497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 <text:s/></text:span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s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/></text:span><text:span text:style-name="T1">s</text:span><text:span text:style-name="T1">p</text:span><text:span text:style-name="T1">e</text:span><text:span text:style-name="T1">l</text:span><text:span text:style-name="T1">l </text:span><text:span text:style-name="T1">l</text:span><text:span text:style-name="T1">e</text:span><text:span text:style-name="T1">v</text:span><text:span text:style-name="T1">e</text:span><text:span text:style-name="T1">l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/></text:span><text:span text:style-name="T1">l</text:span><text:span text:style-name="T1">e</text:span><text:span text:style-name="T1">a</text:span><text:span text:style-name="T1">r</text:span><text:span text:style-name="T1">n</text:span><text:span text:style-name="T1"> </text:span><text:span text:style-name="T1">s</text:span><text:span text:style-name="T1">p</text:span><text:span text:style-name="T1">e</text:span><text:span text:style-name="T1">l</text:span><text:span text:style-name="T1">l</text:span><text:span text:style-name="T1">%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20" draw:text-style-name="P2" draw:layer="layout" svg:width="2.474cm" svg:height="0.357cm" svg:x="12.15cm" svg:y="4.497cm">
          <draw:text-box>
            <text:p text:style-name="P1"><text:span text:style-name="T1">m</text:span><text:span text:style-name="T1">a</text:span><text:span text:style-name="T1">x</text:span><text:span text:style-name="T1">#</text:span><text:span text:style-name="T1"> </text:span><text:span text:style-name="T1">p</text:span><text:span text:style-name="T1">e</text:span><text:span text:style-name="T1">r </text:span><text:span text:style-name="T1">l</text:span><text:span text:style-name="T1">e</text:span><text:span text:style-name="T1">v</text:span><text:span text:style-name="T1">e</text:span><text:span text:style-name="T1">l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" draw:text-style-name="P2" draw:layer="layout" svg:width="0.578cm" svg:height="0.365cm" svg:x="2.286cm" svg:y="4.905cm">
          <draw:text-box>
            <text:p text:style-name="P1"><text:span text:style-name="T2">W</text:span><text:span text:style-name="T2">I</text:span><text:span text:style-name="T2">S</text:span></text:p>
          </draw:text-box>
        </draw:frame>
        <draw:frame draw:style-name="gr21" draw:text-style-name="P2" draw:layer="layout" svg:width="8.773cm" svg:height="0.357cm" svg:x="2.862cm" svg:y="4.886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 <text:s/></text:span><text:span text:style-name="T1">m</text:span><text:span text:style-name="T1">a</text:span><text:span text:style-name="T1">g</text:span><text:span text:style-name="T1">i</text:span><text:span text:style-name="T1">c</text:span><text:span text:style-name="T1">a</text:span><text:span text:style-name="T1">l </text:span><text:span text:style-name="T1">d</text:span><text:span text:style-name="T1">e</text:span><text:span text:style-name="T1">f</text:span><text:span text:style-name="T1">e</text:span><text:span text:style-name="T1">n</text:span><text:span text:style-name="T1">s</text:span><text:span text:style-name="T1">e</text:span><text:span text:style-name="T1"> </text:span><text:span text:style-name="T1">a</text:span><text:span text:style-name="T1">d</text:span><text:span text:style-name="T1">j</text:span><text:span text:style-name="T1">u</text:span><text:span text:style-name="T1">s</text:span><text:span text:style-name="T1">t</text:span><text:span text:style-name="T1">m</text:span><text:span text:style-name="T1">e</text:span><text:span text:style-name="T1">n</text:span><text:span text:style-name="T1">t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b</text:span><text:span text:style-name="T1">o</text:span><text:span text:style-name="T1">n</text:span><text:span text:style-name="T1">u</text:span><text:span text:style-name="T1">s</text:span><text:span text:style-name="T1"> </text:span><text:span text:style-name="T1">s</text:span><text:span text:style-name="T1">p</text:span><text:span text:style-name="T1">e</text:span><text:span text:style-name="T1">l</text:span><text:span text:style-name="T1">l</text:span><text:span text:style-name="T1">s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/text:p>
          </draw:text-box>
        </draw:frame>
        <draw:frame draw:style-name="gr22" draw:text-style-name="P2" draw:layer="layout" svg:width="2.521cm" svg:height="0.357cm" svg:x="12.107cm" svg:y="4.886cm">
          <draw:text-box>
            <text:p text:style-name="P1"><text:span text:style-name="T1">s</text:span><text:span text:style-name="T1">p</text:span><text:span text:style-name="T1">e</text:span><text:span text:style-name="T1">l</text:span><text:span text:style-name="T1">l </text:span><text:span text:style-name="T1">f</text:span><text:span text:style-name="T1">a</text:span><text:span text:style-name="T1">i</text:span><text:span text:style-name="T1">l</text:span><text:span text:style-name="T1">u</text:span><text:span text:style-name="T1">r</text:span><text:span text:style-name="T1">e</text:span><text:span text:style-name="T1">%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" draw:text-style-name="P2" draw:layer="layout" svg:width="0.578cm" svg:height="0.365cm" svg:x="2.286cm" svg:y="5.295cm">
          <draw:text-box>
            <text:p text:style-name="P1"><text:span text:style-name="T2">C</text:span><text:span text:style-name="T2">H</text:span><text:span text:style-name="T2">R</text:span></text:p>
          </draw:text-box>
        </draw:frame>
        <draw:frame draw:style-name="gr23" draw:text-style-name="P2" draw:layer="layout" svg:width="8.24cm" svg:height="0.357cm" svg:x="2.862cm" svg:y="5.276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 <text:s/></text:span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h</text:span><text:span text:style-name="T1">e</text:span><text:span text:style-name="T1">n</text:span><text:span text:style-name="T1">c</text:span><text:span text:style-name="T1">h</text:span><text:span text:style-name="T1">m</text:span><text:span text:style-name="T1">e</text:span><text:span text:style-name="T1">n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/></text:span><text:span text:style-name="T1">l</text:span><text:span text:style-name="T1">o</text:span><text:span text:style-name="T1">y</text:span><text:span text:style-name="T1">a</text:span><text:span text:style-name="T1">l</text:span><text:span text:style-name="T1">t</text:span><text:span text:style-name="T1">y</text:span><text:span text:style-name="T1"> </text:span><text:span text:style-name="T1">b</text:span><text:span text:style-name="T1">a</text:span><text:span text:style-name="T1">s</text:span><text:span text:style-name="T1">e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24" draw:text-style-name="P2" draw:layer="layout" svg:width="3.253cm" svg:height="0.357cm" svg:x="11.379cm" svg:y="5.276cm">
          <draw:text-box>
            <text:p text:style-name="P1"><text:span text:style-name="T1">r</text:span><text:span text:style-name="T1">e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d</text:span><text:span text:style-name="T1">j</text:span><text:span text:style-name="T1">u</text:span><text:span text:style-name="T1">s</text:span><text:span text:style-name="T1">t</text:span><text:span text:style-name="T1">m</text:span><text:span text:style-name="T1">e</text:span><text:span text:style-name="T1">n</text:span><text:span text:style-name="T1">t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8.568cm" svg:y="5.665cm">
          <draw:text-box>
            <text:p text:style-name="P1"><text:span text:style-name="T1"><text:s/></text:span></text:p>
          </draw:text-box>
        </draw:frame>
        <draw:frame draw:style-name="gr25" draw:text-style-name="P2" draw:layer="layout" svg:width="6.352cm" svg:height="0.357cm" svg:x="2.286cm" svg:y="6.038cm">
          <draw:text-box>
            <text:p text:style-name="P1"><text:span text:style-name="T3">(</text:span><text:span text:style-name="T3">_</text:span><text:span text:style-name="T3">_</text:span><text:span text:style-name="T3">_</text:span><text:span text:style-name="T3">_</text:span><text:span text:style-name="T3">_</text:span><text:span text:style-name="T3">)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text:span text:style-name="T3">A</text:span><text:span text:style-name="T3">r</text:span><text:span text:style-name="T3">m</text:span><text:span text:style-name="T3">o</text:span><text:span text:style-name="T3">r </text:span><text:span text:style-name="T3">C</text:span><text:span text:style-name="T3">l</text:span><text:span text:style-name="T3">a</text:span><text:span text:style-name="T3">s</text:span><text:span text:style-name="T3">s</text:span><text:span text:style-name="T3"> <text:s/></text:span><text:span text:style-name="T3"><text:s text:c="2"/></text:span><text:span text:style-name="T3"><text:s text:c="2"/></text:span><text:span text:style-name="T3"><text:s/></text:span><text:span text:style-name="T1">(</text:span><text:span text:style-name="T1">_</text:span><text:span text:style-name="T1">_</text:span><text:span text:style-name="T1">_</text:span><text:span text:style-name="T1">_</text:span><text:span text:style-name="T1">)</text:span><text:span text:style-name="T1">R</text:span><text:span text:style-name="T1">e</text:span><text:span text:style-name="T1">a</text:span><text:span text:style-name="T1">r </text:span><text:span text:style-name="T1">A</text:span><text:span text:style-name="T1">C</text:span><text:span text:style-name="T1"> </text:span></text:p>
          </draw:text-box>
        </draw:frame>
        <draw:frame draw:style-name="gr26" draw:text-style-name="P2" draw:layer="layout" svg:width="5.361cm" svg:height="0.357cm" svg:x="9.296cm" svg:y="6.038cm">
          <draw:text-box>
            <text:p text:style-name="P1"><text:span text:style-name="T1">(</text:span><text:span text:style-name="T1">_</text:span><text:span text:style-name="T1">_</text:span><text:span text:style-name="T1">_</text:span><text:span text:style-name="T1">_</text:span><text:span text:style-name="T1">_</text:span><text:span text:style-name="T1">)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27" draw:text-style-name="P2" draw:layer="layout" svg:width="10.403cm" svg:height="0.357cm" svg:x="2.286cm" svg:y="6.58cm">
          <draw:text-box>
            <text:p text:style-name="P1"><text:span text:style-name="T1">(</text:span><text:span text:style-name="T1">_</text:span><text:span text:style-name="T1">_</text:span><text:span text:style-name="T1">_</text:span><text:span text:style-name="T1">_</text:span><text:span text:style-name="T1">_</text:span><text:span text:style-name="T1">)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/></text:span><text:span text:style-name="T1">(</text:span><text:span text:style-name="T1">_</text:span><text:span text:style-name="T1">_</text:span><text:span text:style-name="T1">_</text:span><text:span text:style-name="T1">_</text:span><text:span text:style-name="T1">_</text:span><text:span text:style-name="T1">)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28" draw:text-style-name="P2" draw:layer="layout" svg:width="1.75cm" svg:height="0.357cm" svg:x="12.861cm" svg:y="6.58cm">
          <draw:text-box>
            <text:p text:style-name="P1"><text:span text:style-name="T1">W</text:span><text:span text:style-name="T1">e</text:span><text:span text:style-name="T1">i</text:span><text:span text:style-name="T1">g</text:span><text:span text:style-name="T1">h</text:span><text:span text:style-name="T1">t 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29" draw:text-style-name="P2" draw:layer="layout" svg:width="4.709cm" svg:height="0.357cm" svg:x="2.286cm" svg:y="7.13cm">
          <draw:text-box>
            <text:p text:style-name="P1"><text:span text:style-name="T1">(</text:span><text:span text:style-name="T1">_</text:span><text:span text:style-name="T1">_</text:span><text:span text:style-name="T1">_</text:span><text:span text:style-name="T1">)</text:span><text:span text:style-name="T1">S</text:span><text:span text:style-name="T1">l</text:span><text:span text:style-name="T1">a</text:span><text:span text:style-name="T1">s</text:span><text:span text:style-name="T1">h</text:span><text:span text:style-name="T1"> <text:s/></text:span><text:span text:style-name="T1">(</text:span><text:span text:style-name="T1">_</text:span><text:span text:style-name="T1">_</text:span><text:span text:style-name="T1">_</text:span><text:span text:style-name="T1">)</text:span><text:span text:style-name="T1">P</text:span><text:span text:style-name="T1">i</text:span><text:span text:style-name="T1">e</text:span><text:span text:style-name="T1">r</text:span><text:span text:style-name="T1">c</text:span><text:span text:style-name="T1">e</text:span><text:span text:style-name="T1"> <text:s/></text:span><text:span text:style-name="T1">(</text:span><text:span text:style-name="T1">_</text:span><text:span text:style-name="T1">_</text:span><text:span text:style-name="T1">_</text:span><text:span text:style-name="T1">)</text:span><text:span text:style-name="T1">B</text:span><text:span text:style-name="T1">l</text:span><text:span text:style-name="T1">u</text:span><text:span text:style-name="T1">n</text:span><text:span text:style-name="T1">t </text:span></text:p>
          </draw:text-box>
        </draw:frame>
        <draw:frame draw:style-name="gr30" draw:text-style-name="P2" draw:layer="layout" svg:width="7.3cm" svg:height="0.357cm" svg:x="7.391cm" svg:y="7.13cm">
          <draw:text-box>
            <text:p text:style-name="P1"><text:span text:style-name="T1">A</text:span><text:span text:style-name="T1">r</text:span><text:span text:style-name="T1">m</text:span><text:span text:style-name="T1">o</text:span><text:span text:style-name="T1">r </text:span><text:span text:style-name="T1">W</text:span><text:span text:style-name="T1">o</text:span><text:span text:style-name="T1">r</text:span><text:span text:style-name="T1">n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1" draw:text-style-name="P2" draw:layer="layout" svg:width="3.541cm" svg:height="0.357cm" svg:x="16.366cm" svg:y="1.491cm">
          <draw:text-box>
            <text:p text:style-name="P1"><text:span text:style-name="T1">*</text:span><text:span text:style-name="T1">*</text:span><text:span text:style-name="T1"> </text:span><text:span text:style-name="T3">S</text:span><text:span text:style-name="T3">A</text:span><text:span text:style-name="T3">V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R</text:span><text:span text:style-name="T3">O</text:span><text:span text:style-name="T3">W</text:span><text:span text:style-name="T3">S</text:span><text:span text:style-name="T3"> </text:span><text:span text:style-name="T1">*</text:span><text:span text:style-name="T1">*</text:span><text:span text:style-name="T1"> </text:span></text:p>
          </draw:text-box>
        </draw:frame>
        <draw:frame draw:style-name="gr32" draw:text-style-name="P2" draw:layer="layout" svg:width="0.565cm" svg:height="0.357cm" svg:x="15.993cm" svg:y="2.042cm">
          <draw:text-box>
            <text:p text:style-name="P1"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6.789cm" svg:y="2.04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2" draw:text-style-name="P2" draw:layer="layout" svg:width="0.565cm" svg:height="0.357cm" svg:x="15.993cm" svg:y="2.592cm">
          <draw:text-box>
            <text:p text:style-name="P1"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6.789cm" svg:y="2.5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2" draw:text-style-name="P2" draw:layer="layout" svg:width="0.565cm" svg:height="0.357cm" svg:x="15.993cm" svg:y="3.134cm">
          <draw:text-box>
            <text:p text:style-name="P1"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6.789cm" svg:y="3.13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2" draw:text-style-name="P2" draw:layer="layout" svg:width="0.565cm" svg:height="0.357cm" svg:x="15.993cm" svg:y="3.684cm">
          <draw:text-box>
            <text:p text:style-name="P1"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6.789cm" svg:y="3.68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2" draw:text-style-name="P2" draw:layer="layout" svg:width="0.565cm" svg:height="0.357cm" svg:x="15.993cm" svg:y="4.235cm">
          <draw:text-box>
            <text:p text:style-name="P1"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6.789cm" svg:y="4.23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4" draw:text-style-name="P2" draw:layer="layout" svg:width="2.724cm" svg:height="0.357cm" svg:x="15.994cm" svg:y="4.776cm">
          <draw:text-box>
            <text:p text:style-name="P1"><text:span text:style-name="T1">P</text:span><text:span text:style-name="T1">a</text:span><text:span text:style-name="T1">r</text:span><text:span text:style-name="T1">a</text:span><text:span text:style-name="T1">l</text:span><text:span text:style-name="T1">y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, </text:span><text:span text:style-name="T1">P</text:span><text:span text:style-name="T1">o</text:span><text:span text:style-name="T1">i</text:span><text:span text:style-name="T1">s</text:span><text:span text:style-name="T1">o</text:span><text:span text:style-name="T1">n</text:span><text:span text:style-name="T1"> </text:span></text:p>
          </draw:text-box>
        </draw:frame>
        <draw:frame draw:style-name="gr35" draw:text-style-name="P2" draw:layer="layout" svg:width="0.887cm" svg:height="0.357cm" svg:x="19.482cm" svg:y="4.77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6" draw:text-style-name="P2" draw:layer="layout" svg:width="3.262cm" svg:height="0.357cm" svg:x="15.994cm" svg:y="5.327cm">
          <draw:text-box>
            <text:p text:style-name="P1"><text:span text:style-name="T1">P</text:span><text:span text:style-name="T1">e</text:span><text:span text:style-name="T1">t</text:span><text:span text:style-name="T1">r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, </text:span><text:span text:style-name="T1">P</text:span><text:span text:style-name="T1">o</text:span><text:span text:style-name="T1">l</text:span><text:span text:style-name="T1">y</text:span><text:span text:style-name="T1">m</text:span><text:span text:style-name="T1">o</text:span><text:span text:style-name="T1">r</text:span><text:span text:style-name="T1">p</text:span><text:span text:style-name="T1">h</text:span><text:span text:style-name="T1"> </text:span></text:p>
          </draw:text-box>
        </draw:frame>
        <draw:frame draw:style-name="gr35" draw:text-style-name="P2" draw:layer="layout" svg:width="0.887cm" svg:height="0.357cm" svg:x="19.482cm" svg:y="5.32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7" draw:text-style-name="P2" draw:layer="layout" svg:width="2.601cm" svg:height="0.357cm" svg:x="15.994cm" svg:y="5.877cm">
          <draw:text-box>
            <text:p text:style-name="P1"><text:span text:style-name="T1">R</text:span><text:span text:style-name="T1">o</text:span><text:span text:style-name="T1">d</text:span><text:span text:style-name="T1">, </text:span><text:span text:style-name="T1">S</text:span><text:span text:style-name="T1">t</text:span><text:span text:style-name="T1">a</text:span><text:span text:style-name="T1">f</text:span><text:span text:style-name="T1">f </text:span><text:span text:style-name="T1">o</text:span><text:span text:style-name="T1">r </text:span><text:span text:style-name="T1">W</text:span><text:span text:style-name="T1">a</text:span><text:span text:style-name="T1">n</text:span><text:span text:style-name="T1">d</text:span><text:span text:style-name="T1"> </text:span></text:p>
          </draw:text-box>
        </draw:frame>
        <draw:frame draw:style-name="gr35" draw:text-style-name="P2" draw:layer="layout" svg:width="0.887cm" svg:height="0.357cm" svg:x="19.482cm" svg:y="5.87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8" draw:text-style-name="P2" draw:layer="layout" svg:width="2.089cm" svg:height="0.357cm" svg:x="15.994cm" svg:y="6.419cm">
          <draw:text-box>
            <text:p text:style-name="P1"><text:span text:style-name="T1">B</text:span><text:span text:style-name="T1">r</text:span><text:span text:style-name="T1">e</text:span><text:span text:style-name="T1">a</text:span><text:span text:style-name="T1">t</text:span><text:span text:style-name="T1">h</text:span><text:span text:style-name="T1"> </text:span><text:span text:style-name="T1">W</text:span><text:span text:style-name="T1">e</text:span><text:span text:style-name="T1">a</text:span><text:span text:style-name="T1">p</text:span><text:span text:style-name="T1">o</text:span><text:span text:style-name="T1">n</text:span><text:span text:style-name="T1"> </text:span></text:p>
          </draw:text-box>
        </draw:frame>
        <draw:frame draw:style-name="gr35" draw:text-style-name="P2" draw:layer="layout" svg:width="0.887cm" svg:height="0.357cm" svg:x="19.482cm" svg:y="6.41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9" draw:text-style-name="P2" draw:layer="layout" svg:width="0.866cm" svg:height="0.357cm" svg:x="15.994cm" svg:y="6.969cm">
          <draw:text-box>
            <text:p text:style-name="P1"><text:span text:style-name="T1">S</text:span><text:span text:style-name="T1">p</text:span><text:span text:style-name="T1">e</text:span><text:span text:style-name="T1">l</text:span><text:span text:style-name="T1">l</text:span><text:span text:style-name="T1">s</text:span><text:span text:style-name="T1"> </text:span></text:p>
          </draw:text-box>
        </draw:frame>
        <draw:frame draw:style-name="gr35" draw:text-style-name="P2" draw:layer="layout" svg:width="0.887cm" svg:height="0.357cm" svg:x="19.482cm" svg:y="6.96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18.136cm" svg:y="7.52cm">
          <draw:text-box>
            <text:p text:style-name="P1"><text:span text:style-name="T1"><text:s/></text:span></text:p>
          </draw:text-box>
        </draw:frame>
        <draw:frame draw:style-name="gr40" draw:text-style-name="P2" draw:layer="layout" svg:width="2.394cm" svg:height="0.357cm" svg:x="2.286cm" svg:y="8.222cm">
          <draw:text-box>
            <text:p text:style-name="P1"><text:span text:style-name="T3">(</text:span><text:span text:style-name="T3">_</text:span><text:span text:style-name="T3">_</text:span><text:span text:style-name="T3">_</text:span><text:span text:style-name="T3">_</text:span><text:span text:style-name="T3">_</text:span><text:span text:style-name="T3">)</text:span><text:span text:style-name="T3">H</text:span><text:span text:style-name="T3">i</text:span><text:span text:style-name="T3">t </text:span><text:span text:style-name="T3">P</text:span><text:span text:style-name="T3">o</text:span><text:span text:style-name="T3">i</text:span><text:span text:style-name="T3">n</text:span><text:span text:style-name="T3">t</text:span><text:span text:style-name="T3">s</text:span><text:span text:style-name="T3"> </text:span></text:p>
          </draw:text-box>
        </draw:frame>
        <draw:frame draw:style-name="gr41" draw:text-style-name="P2" draw:layer="layout" svg:width="4.434cm" svg:height="0.357cm" svg:x="6.079cm" svg:y="8.222cm">
          <draw:text-box>
            <text:p text:style-name="P1"><text:span text:style-name="T1">H</text:span><text:span text:style-name="T1">i</text:span><text:span text:style-name="T1">t </text:span><text:span text:style-name="T1">D</text:span><text:span text:style-name="T1">i</text:span><text:span text:style-name="T1">e</text:span><text:span text:style-name="T1"> </text:span><text:span text:style-name="T1">T</text:span><text:span text:style-name="T1">y</text:span><text:span text:style-name="T1">p</text:span><text:span text:style-name="T1">e</text:span><text:span text:style-name="T1"> </text:span><text:span text:style-name="T1">d</text:span><text:span text:style-name="T1">_</text:span><text:span text:style-name="T1">_</text:span><text:span text:style-name="T1">_</text:span><text:span text:style-name="T1">_</text:span><text:span text:style-name="T1"> </text:span><text:span text:style-name="T1">d</text:span><text:span text:style-name="T1">_</text:span><text:span text:style-name="T1">_</text:span><text:span text:style-name="T1">_</text:span><text:span text:style-name="T1">_</text:span><text:span text:style-name="T1"> </text:span><text:span text:style-name="T1">d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42" draw:text-style-name="P2" draw:layer="layout" svg:width="2.385cm" svg:height="0.357cm" svg:x="2.286cm" svg:y="8.586cm">
          <draw:text-box>
            <text:p text:style-name="P1"><text:span text:style-name="T1">H</text:span><text:span text:style-name="T1">i</text:span><text:span text:style-name="T1">t </text:span><text:span text:style-name="T1">p</text:span><text:span text:style-name="T1">o</text:span><text:span text:style-name="T1">i</text:span><text:span text:style-name="T1">n</text:span><text:span text:style-name="T1">t</text:span><text:span text:style-name="T1">s</text:span><text:span text:style-name="T1"> </text:span><text:span text:style-name="T1">g</text:span><text:span text:style-name="T1">a</text:span><text:span text:style-name="T1">i</text:span><text:span text:style-name="T1">n</text:span><text:span text:style-name="T1">e</text:span><text:span text:style-name="T1">d</text:span><text:span text:style-name="T1">: </text:span></text:p>
          </draw:text-box>
        </draw:frame>
        <draw:frame draw:style-name="gr43" draw:text-style-name="P2" draw:layer="layout" svg:width="5.632cm" svg:height="0.357cm" svg:x="4.894cm" svg:y="8.586cm">
          <draw:text-box>
            <text:p text:style-name="P1"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text:span text:style-name="T1">_</text:span><text:span text:style-name="T1">_</text:span><text:span text:style-name="T1"> </text:span></text:p>
          </draw:text-box>
        </draw:frame>
        <draw:frame draw:style-name="gr44" draw:text-style-name="P2" draw:layer="layout" svg:width="8.257cm" svg:height="0.357cm" svg:x="2.286cm" svg:y="8.959cm">
          <draw:text-box>
            <text:p text:style-name="P1"><text:span text:style-name="T1">S</text:span><text:span text:style-name="T1">c</text:span><text:span text:style-name="T1">a</text:span><text:span text:style-name="T1">r</text:span><text:span text:style-name="T1">s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9.323cm">
          <draw:text-box>
            <text:p text:style-name="P1"><text:span text:style-name="T1"><text:s/></text:span></text:p>
          </draw:text-box>
        </draw:frame>
        <draw:frame draw:style-name="gr45" draw:text-style-name="P2" draw:layer="layout" svg:width="6.038cm" svg:height="0.357cm" svg:x="11.93cm" svg:y="8.222cm">
          <draw:text-box>
            <text:p text:style-name="P1"><text:span text:style-name="T3">P</text:span><text:span text:style-name="T3">s</text:span><text:span text:style-name="T3">i</text:span><text:span text:style-name="T3">o</text:span><text:span text:style-name="T3">n</text:span><text:span text:style-name="T3">i</text:span><text:span text:style-name="T3">c</text:span><text:span text:style-name="T3">s</text:span><text:span text:style-name="T3"> </text:span><text:span text:style-name="T1">(</text:span><text:span text:style-name="T1">_</text:span><text:span text:style-name="T1">_</text:span><text:span text:style-name="T1">_</text:span><text:span text:style-name="T1">_</text:span><text:span text:style-name="T1">) </text:span><text:span text:style-name="T1"><text:s/>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 </text:span><text:span text:style-name="T1">(</text:span><text:span text:style-name="T1">_</text:span><text:span text:style-name="T1">_</text:span><text:span text:style-name="T1">_</text:span><text:span text:style-name="T1">_</text:span><text:span text:style-name="T1">) </text:span><text:span text:style-name="T1"><text:s/></text:span><text:span text:style-name="T1">d</text:span><text:span text:style-name="T1">e</text:span><text:span text:style-name="T1">f</text:span><text:span text:style-name="T1">e</text:span><text:span text:style-name="T1">n</text:span><text:span text:style-name="T1">s</text:span><text:span text:style-name="T1">e</text:span><text:span text:style-name="T1"> </text:span><text:span text:style-name="T1">(</text:span><text:span text:style-name="T1">_</text:span><text:span text:style-name="T1">_</text:span><text:span text:style-name="T1">_</text:span><text:span text:style-name="T1">_</text:span><text:span text:style-name="T1">) </text:span></text:p>
          </draw:text-box>
        </draw:frame>
        <draw:frame draw:style-name="gr46" draw:text-style-name="P2" draw:layer="layout" svg:width="2.296cm" svg:height="0.357cm" svg:x="18.136cm" svg:y="8.222cm">
          <draw:text-box>
            <text:p text:style-name="P1"><text:span text:style-name="T1">m</text:span><text:span text:style-name="T1">o</text:span><text:span text:style-name="T1">d</text:span><text:span text:style-name="T1">e</text:span><text:span text:style-name="T1">s</text:span><text:span text:style-name="T1">: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47" draw:text-style-name="P2" draw:layer="layout" svg:width="0.832cm" svg:height="0.357cm" svg:x="11.93cm" svg:y="8.586cm">
          <draw:text-box>
            <text:p text:style-name="P1"><text:span text:style-name="T1">m</text:span><text:span text:style-name="T1">a</text:span><text:span text:style-name="T1">j</text:span><text:span text:style-name="T1">o</text:span><text:span text:style-name="T1">r </text:span></text:p>
          </draw:text-box>
        </draw:frame>
        <draw:frame draw:style-name="gr48" draw:text-style-name="P2" draw:layer="layout" svg:width="7.643cm" svg:height="0.357cm" svg:x="12.861cm" svg:y="8.58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49" draw:text-style-name="P2" draw:layer="layout" svg:width="8.57cm" svg:height="0.357cm" svg:x="11.93cm" svg:y="8.959cm">
          <draw:text-box>
            <text:p text:style-name="P1"><text:span text:style-name="T1">m</text:span><text:span text:style-name="T1">i</text:span><text:span text:style-name="T1">n</text:span><text:span text:style-name="T1">o</text:span><text:span text:style-name="T1">r </text:span><text:span text:style-name="T1">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11.93cm" svg:y="9.32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286cm" svg:y="10.051cm">
          <draw:text-box>
            <text:p text:style-name="P1"><text:span text:style-name="T1"><text:s/></text:span></text:p>
          </draw:text-box>
        </draw:frame>
        <draw:frame draw:style-name="gr50" draw:text-style-name="P2" draw:layer="layout" svg:width="3.664cm" svg:height="0.357cm" svg:x="2.286cm" svg:y="10.415cm">
          <draw:text-box>
            <text:p text:style-name="P1"><text:span text:style-name="T3">N</text:span><text:span text:style-name="T3">o</text:span><text:span text:style-name="T3">n</text:span><text:span text:style-name="T3">-</text:span><text:span text:style-name="T3">W</text:span><text:span text:style-name="T3">e</text:span><text:span text:style-name="T3">a</text:span><text:span text:style-name="T3">p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c</text:span><text:span text:style-name="T3">i</text:span><text:span text:style-name="T3">e</text:span><text:span text:style-name="T3">s</text:span><text:span text:style-name="T3">: </text:span></text:p>
          </draw:text-box>
        </draw:frame>
        <draw:frame draw:style-name="gr33" draw:text-style-name="P2" draw:layer="layout" svg:width="3.622cm" svg:height="0.357cm" svg:x="2.286cm" svg:y="10.77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6.096cm" svg:y="10.77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7.044cm" svg:y="10.779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2.286cm" svg:y="11.14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6.096cm" svg:y="11.14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7.044cm" svg:y="11.143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2.286cm" svg:y="11.50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6.096cm" svg:y="11.50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7.044cm" svg:y="11.507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2.286cm" svg:y="11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6.096cm" svg:y="11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7.044cm" svg:y="11.871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2.286cm" svg:y="12.2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6.096cm" svg:y="12.2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7.044cm" svg:y="12.244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12.60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36cm" svg:y="10.051cm">
          <draw:text-box>
            <text:p text:style-name="P1"><text:span text:style-name="T1"><text:s/></text:span></text:p>
          </draw:text-box>
        </draw:frame>
        <draw:frame draw:style-name="gr53" draw:text-style-name="P2" draw:layer="layout" svg:width="1.137cm" svg:height="0.357cm" svg:x="8.636cm" svg:y="10.415cm">
          <draw:text-box>
            <text:p text:style-name="P1"><text:span text:style-name="T1">N</text:span><text:span text:style-name="T1">u</text:span><text:span text:style-name="T1">m</text:span><text:span text:style-name="T1">b</text:span><text:span text:style-name="T1">e</text:span><text:span text:style-name="T1">r </text:span></text:p>
          </draw:text-box>
        </draw:frame>
        <draw:frame draw:style-name="gr51" draw:text-style-name="P2" draw:layer="layout" svg:width="0.726cm" svg:height="0.357cm" svg:x="9.957cm" svg:y="10.41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4" draw:text-style-name="P4" draw:layer="layout" svg:width="0.321cm" svg:height="1.558cm" svg:x="10.871cm" svg:y="9.21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142cm" svg:y="10.415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422cm" svg:y="10.415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693cm" svg:y="10.415cm">
          <draw:text-box>
            <text:p text:style-name="P1"><text:span text:style-name="T1"><text:s/></text:span></text:p>
          </draw:text-box>
        </draw:frame>
        <draw:frame draw:style-name="gr55" draw:text-style-name="P2" draw:layer="layout" svg:width="0.938cm" svg:height="0.357cm" svg:x="11.972cm" svg:y="10.415cm">
          <draw:text-box>
            <text:p text:style-name="P1"><text:span text:style-name="T1">g</text:span><text:span text:style-name="T1">a</text:span><text:span text:style-name="T1">i</text:span><text:span text:style-name="T1">n</text:span><text:span text:style-name="T1">e</text:span><text:span text:style-name="T1">d</text:span><text:span text:style-name="T1"> </text:span></text:p>
          </draw:text-box>
        </draw:frame>
        <draw:frame draw:style-name="gr56" draw:text-style-name="P2" draw:layer="layout" svg:width="0.976cm" svg:height="0.357cm" svg:x="13.09cm" svg:y="10.415cm">
          <draw:text-box>
            <text:p text:style-name="P1"><text:span text:style-name="T1">1</text:span><text:span text:style-name="T1">/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8.636cm" svg:y="10.77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2.446cm" svg:y="10.77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3.394cm" svg:y="10.779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8.636cm" svg:y="11.14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2.446cm" svg:y="11.14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3.394cm" svg:y="11.143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8.636cm" svg:y="11.50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2.446cm" svg:y="11.50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3.394cm" svg:y="11.507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8.636cm" svg:y="11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2.446cm" svg:y="11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3.394cm" svg:y="11.871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8.636cm" svg:y="12.2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2.446cm" svg:y="12.2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3.394cm" svg:y="12.244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8.636cm" svg:y="12.60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4.986cm" svg:y="10.051cm">
          <draw:text-box>
            <text:p text:style-name="P1"><text:span text:style-name="T1"><text:s/></text:span></text:p>
          </draw:text-box>
        </draw:frame>
        <draw:frame draw:style-name="gr57" draw:text-style-name="P2" draw:layer="layout" svg:width="0.688cm" svg:height="0.357cm" svg:x="14.986cm" svg:y="10.415cm">
          <draw:text-box>
            <text:p text:style-name="P1"><text:span text:style-name="T1">S</text:span><text:span text:style-name="T1">k</text:span><text:span text:style-name="T1">i</text:span><text:span text:style-name="T1">l</text:span><text:span text:style-name="T1">l </text:span></text:p>
          </draw:text-box>
        </draw:frame>
        <draw:frame draw:style-name="gr58" draw:text-style-name="P2" draw:layer="layout" svg:width="0.993cm" svg:height="0.357cm" svg:x="18.534cm" svg:y="10.415cm">
          <draw:text-box>
            <text:p text:style-name="P1"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/text:p>
          </draw:text-box>
        </draw:frame>
        <draw:frame draw:style-name="gr57" draw:text-style-name="P2" draw:layer="layout" svg:width="0.688cm" svg:height="0.357cm" svg:x="19.719cm" svg:y="10.415cm">
          <draw:text-box>
            <text:p text:style-name="P1"><text:span text:style-name="T1">M</text:span><text:span text:style-name="T1">o</text:span><text:span text:style-name="T1">d</text:span><text:span text:style-name="T1"> </text:span></text:p>
          </draw:text-box>
        </draw:frame>
        <draw:frame draw:style-name="gr33" draw:text-style-name="P2" draw:layer="layout" svg:width="3.622cm" svg:height="0.357cm" svg:x="14.986cm" svg:y="10.77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8.796cm" svg:y="10.77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9.744cm" svg:y="10.779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4.986cm" svg:y="11.14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8.796cm" svg:y="11.14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9.744cm" svg:y="11.143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4.986cm" svg:y="11.50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8.796cm" svg:y="11.50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9.744cm" svg:y="11.507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4.986cm" svg:y="11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8.796cm" svg:y="11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9.744cm" svg:y="11.871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3" draw:text-style-name="P2" draw:layer="layout" svg:width="3.622cm" svg:height="0.357cm" svg:x="14.986cm" svg:y="12.2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8.796cm" svg:y="12.2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19.744cm" svg:y="12.244cm">
          <draw:text-box>
            <text:p text:style-name="P1"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14.986cm" svg:y="12.608cm">
          <draw:text-box>
            <text:p text:style-name="P1"><text:span text:style-name="T1"><text:s/></text:span></text:p>
          </draw:text-box>
        </draw:frame>
        <draw:frame draw:style-name="gr59" draw:text-style-name="P2" draw:layer="layout" svg:width="2.906cm" svg:height="0.357cm" svg:x="2.286cm" svg:y="13.336cm">
          <draw:text-box>
            <text:p text:style-name="P1"><text:span text:style-name="T3">S</text:span><text:span text:style-name="T3">k</text:span><text:span text:style-name="T3">i</text:span><text:span text:style-name="T3">l</text:span><text:span text:style-name="T3">l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t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: </text:span></text:p>
          </draw:text-box>
        </draw:frame>
        <draw:frame draw:style-name="gr60" draw:text-style-name="P2" draw:layer="layout" svg:width="8.769cm" svg:height="0.357cm" svg:x="2.286cm" svg:y="13.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0" draw:text-style-name="P2" draw:layer="layout" svg:width="8.769cm" svg:height="0.357cm" svg:x="2.286cm" svg:y="14.06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0" draw:text-style-name="P2" draw:layer="layout" svg:width="8.769cm" svg:height="0.357cm" svg:x="2.286cm" svg:y="14.42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1" draw:text-style-name="P2" draw:layer="layout" svg:width="9.01cm" svg:height="0.357cm" svg:x="11.498cm" svg:y="13.336cm">
          <draw:text-box>
            <text:p text:style-name="P1"><text:span text:style-name="T1">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1" draw:text-style-name="P2" draw:layer="layout" svg:width="9.01cm" svg:height="0.357cm" svg:x="11.498cm" svg:y="13.7cm">
          <draw:text-box>
            <text:p text:style-name="P1"><text:span text:style-name="T1">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1" draw:text-style-name="P2" draw:layer="layout" svg:width="9.01cm" svg:height="0.357cm" svg:x="11.498cm" svg:y="14.064cm">
          <draw:text-box>
            <text:p text:style-name="P1"><text:span text:style-name="T1">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1" draw:text-style-name="P2" draw:layer="layout" svg:width="9.01cm" svg:height="0.357cm" svg:x="11.498cm" svg:y="14.428cm">
          <draw:text-box>
            <text:p text:style-name="P1"><text:span text:style-name="T1">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14.792cm">
          <draw:text-box>
            <text:p text:style-name="P1"><text:span text:style-name="T1"><text:s/></text:span></text:p>
          </draw:text-box>
        </draw:frame>
        <draw:frame draw:style-name="gr62" draw:text-style-name="P5" draw:layer="layout" svg:width="1.412cm" svg:height="0.395cm" svg:x="2.286cm" svg:y="15.169cm">
          <draw:text-box>
            <text:p text:style-name="P1"><text:span text:style-name="T4">W</text:span><text:span text:style-name="T4">e</text:span><text:span text:style-name="T4">a</text:span><text:span text:style-name="T4">p</text:span><text:span text:style-name="T4">o</text:span><text:span text:style-name="T4">n</text:span><text:span text:style-name="T4">s</text:span><text:span text:style-name="T4"> </text:span></text:p>
          </draw:text-box>
        </draw:frame>
        <draw:frame draw:style-name="gr63" draw:text-style-name="P2" draw:layer="layout" svg:width="7.453cm" svg:height="0.357cm" svg:x="3.768cm" svg:y="15.199cm">
          <draw:text-box>
            <text:p text:style-name="P1"><text:span text:style-name="T1"><text:s text:c="2"/></text:span><text:span text:style-name="T1"><text:s text:c="2"/></text:span><text:span text:style-name="T1"><text:s/></text:span><text:span text:style-name="T1">p</text:span><text:span text:style-name="T1">r</text:span><text:span text:style-name="T1">o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 </text:span><text:span text:style-name="T1">#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1">g</text:span><text:span text:style-name="T1">a</text:span><text:span text:style-name="T1">i</text:span><text:span text:style-name="T1">n</text:span><text:span text:style-name="T1"> </text:span><text:span text:style-name="T1">1</text:span><text:span text:style-name="T1">/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1">p</text:span><text:span text:style-name="T1">e</text:span><text:span text:style-name="T1">n</text:span><text:span text:style-name="T1">a</text:span><text:span text:style-name="T1">l</text:span><text:span text:style-name="T1">t</text:span><text:span text:style-name="T1">y</text:span><text:span text:style-name="T1">-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4" draw:text-style-name="P2" draw:layer="layout" svg:width="2.538cm" svg:height="0.357cm" svg:x="12.023cm" svg:y="15.199cm">
          <draw:text-box>
            <text:p text:style-name="P1"><text:span text:style-name="T1">#</text:span><text:span text:style-name="T1">o</text:span><text:span text:style-name="T1">f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s</text:span><text:span text:style-name="T1">_</text:span><text:span text:style-name="T1">_</text:span><text:span text:style-name="T1">_</text:span><text:span text:style-name="T1">/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5" draw:text-style-name="P2" draw:layer="layout" svg:width="9.629cm" svg:height="0.357cm" svg:x="2.286cm" svg:y="15.571cm">
          <draw:text-box>
            <text:p text:style-name="P1"><text:span text:style-name="T1">s</text:span><text:span text:style-name="T1">p</text:span><text:span text:style-name="T1">e</text:span><text:span text:style-name="T1">c</text:span><text:span text:style-name="T1">i</text:span><text:span text:style-name="T1">a</text:span><text:span text:style-name="T1">l</text:span><text:span text:style-name="T1">i</text:span><text:span text:style-name="T1">z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h</text:span><text:span text:style-name="T1">i</text:span><text:span text:style-name="T1">t</text:span><text:span text:style-name="T1">+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d</text:span><text:span text:style-name="T1">m</text:span><text:span text:style-name="T1">g</text:span><text:span text:style-name="T1">+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4" draw:text-style-name="P2" draw:layer="layout" svg:width="2.538cm" svg:height="0.357cm" svg:x="12.023cm" svg:y="15.571cm">
          <draw:text-box>
            <text:p text:style-name="P1"><text:span text:style-name="T1">#</text:span><text:span text:style-name="T1">o</text:span><text:span text:style-name="T1">f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s</text:span><text:span text:style-name="T1">_</text:span><text:span text:style-name="T1">_</text:span><text:span text:style-name="T1">_</text:span><text:span text:style-name="T1">/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66" draw:text-style-name="P2" draw:layer="layout" svg:width="12.414cm" svg:height="0.357cm" svg:x="2.286cm" svg:y="15.935cm">
          <draw:text-box>
            <text:p text:style-name="P1"><text:span text:style-name="T1">w</text:span><text:span text:style-name="T1">e</text:span><text:span text:style-name="T1">a</text:span><text:span text:style-name="T1">p</text:span><text:span text:style-name="T1">o</text:span><text:span text:style-name="T1">n</text:span><text:span text:style-name="T1">s</text:span><text:span text:style-name="T1"> </text:span><text:span text:style-name="T1">u</text:span><text:span text:style-name="T1">s</text:span><text:span text:style-name="T1">e</text:span><text:span text:style-name="T1">d</text:span><text:span text:style-name="T1"> <text:s/></text:span><text:span text:style-name="T1">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16.3cm">
          <draw:text-box>
            <text:p text:style-name="P1"><text:span text:style-name="T1"><text:s/></text:span></text:p>
          </draw:text-box>
        </draw:frame>
        <draw:frame draw:style-name="gr67" draw:text-style-name="P2" draw:layer="layout" svg:width="2.593cm" svg:height="0.357cm" svg:x="2.286cm" svg:y="16.664cm">
          <draw:text-box>
            <text:p text:style-name="P1"><text:span text:style-name="T1">w</text:span><text:span text:style-name="T1">e</text:span><text:span text:style-name="T1">a</text:span><text:span text:style-name="T1">p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/text:p>
          </draw:text-box>
        </draw:frame>
        <draw:frame draw:style-name="gr68" draw:text-style-name="P2" draw:layer="layout" svg:width="2.33cm" svg:height="0.357cm" svg:x="7.976cm" svg:y="16.664cm">
          <draw:text-box>
            <text:p text:style-name="P1"><text:span text:style-name="T1">+</text:span><text:span text:style-name="T1">h</text:span><text:span text:style-name="T1">i</text:span><text:span text:style-name="T1">t </text:span><text:span text:style-name="T1"><text:s/></text:span><text:span text:style-name="T1">+</text:span><text:span text:style-name="T1">d</text:span><text:span text:style-name="T1">m</text:span><text:span text:style-name="T1">g</text:span><text:span text:style-name="T1"> </text:span><text:span text:style-name="T1">s</text:span><text:span text:style-name="T1">p</text:span><text:span text:style-name="T1">e</text:span><text:span text:style-name="T1">e</text:span><text:span text:style-name="T1">d</text:span><text:span text:style-name="T1"> </text:span></text:p>
          </draw:text-box>
        </draw:frame>
        <draw:frame draw:style-name="gr69" draw:text-style-name="P2" draw:layer="layout" svg:width="0.883cm" svg:height="0.357cm" svg:x="10.541cm" svg:y="16.664cm">
          <draw:text-box>
            <text:p text:style-name="P1"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/text:p>
          </draw:text-box>
        </draw:frame>
        <draw:frame draw:style-name="gr70" draw:text-style-name="P2" draw:layer="layout" svg:width="1.67cm" svg:height="0.357cm" svg:x="11.692cm" svg:y="16.664cm">
          <draw:text-box>
            <text:p text:style-name="P1"><text:span text:style-name="T1">t</text:span><text:span text:style-name="T1">y</text:span><text:span text:style-name="T1">p</text:span><text:span text:style-name="T1">e</text:span><text:span text:style-name="T1"> <text:s/></text:span><text:span text:style-name="T1">S</text:span><text:span text:style-name="T1"> </text:span><text:span text:style-name="T1">&amp;</text:span><text:span text:style-name="T1"> </text:span><text:span text:style-name="T1">M</text:span><text:span text:style-name="T1"> </text:span></text:p>
          </draw:text-box>
        </draw:frame>
        <draw:frame draw:style-name="gr47" draw:text-style-name="P2" draw:layer="layout" svg:width="0.832cm" svg:height="0.357cm" svg:x="13.589cm" svg:y="16.664cm">
          <draw:text-box>
            <text:p text:style-name="P1"><text:span text:style-name="T1">L</text:span><text:span text:style-name="T1">a</text:span><text:span text:style-name="T1">r</text:span><text:span text:style-name="T1">g</text:span><text:span text:style-name="T1">e</text:span><text:span text:style-name="T1"> </text:span></text:p>
          </draw:text-box>
        </draw:frame>
        <draw:frame draw:style-name="gr11" draw:text-style-name="P2" draw:layer="layout" svg:width="0.321cm" svg:height="0.357cm" svg:x="2.337cm" svg:y="17.087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7.891cm" svg:y="17.087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87cm" svg:y="17.087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9.483cm" svg:y="17.087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0.279cm" svg:y="17.087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701cm" svg:y="17.087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2.336cm" svg:y="17.087cm">
          <draw:text-box>
            <text:p text:style-name="P1"><text:span text:style-name="T1"><text:s/></text:span></text:p>
          </draw:text-box>
        </draw:frame>
        <draw:polygon draw:style-name="gr71" draw:text-style-name="P6" draw:layer="layout" svg:width="0.009cm" svg:height="0.059cm" svg:x="2.277cm" svg:y="17.018cm" svg:viewBox="0 0 10 60" draw:points="0,60 10,60 10,0 0,0">
          <text:p/>
        </draw:polygon>
        <draw:polygon draw:style-name="gr71" draw:text-style-name="P6" draw:layer="layout" svg:width="0.009cm" svg:height="0.008cm" svg:x="2.277cm" svg:y="17.018cm" svg:viewBox="0 0 10 9" draw:points="0,9 10,9 10,0 0,0">
          <text:p/>
        </draw:polygon>
        <draw:polygon draw:style-name="gr71" draw:text-style-name="P6" draw:layer="layout" svg:width="0.008cm" svg:height="0.008cm" svg:x="2.286cm" svg:y="17.018cm" svg:viewBox="0 0 9 9" draw:points="0,9 9,9 9,0 0,0">
          <text:p/>
        </draw:polygon>
        <draw:polygon draw:style-name="gr71" draw:text-style-name="P6" draw:layer="layout" svg:width="5.537cm" svg:height="0.008cm" svg:x="2.294cm" svg:y="17.018cm" svg:viewBox="0 0 5538 9" draw:points="0,9 5538,9 5538,0 0,0">
          <text:p/>
        </draw:polygon>
        <draw:polygon draw:style-name="gr71" draw:text-style-name="P6" draw:layer="layout" svg:width="0.009cm" svg:height="0.051cm" svg:x="7.831cm" svg:y="17.026cm" svg:viewBox="0 0 10 52" draw:points="0,52 10,52 10,0 0,0">
          <text:p/>
        </draw:polygon>
        <draw:polygon draw:style-name="gr71" draw:text-style-name="P6" draw:layer="layout" svg:width="0.009cm" svg:height="0.008cm" svg:x="7.831cm" svg:y="17.018cm" svg:viewBox="0 0 10 9" draw:points="0,9 10,9 10,0 0,0">
          <text:p/>
        </draw:polygon>
        <draw:polygon draw:style-name="gr71" draw:text-style-name="P6" draw:layer="layout" svg:width="0.008cm" svg:height="0.008cm" svg:x="7.84cm" svg:y="17.018cm" svg:viewBox="0 0 9 9" draw:points="0,9 9,9 9,0 0,0">
          <text:p/>
        </draw:polygon>
        <draw:polygon draw:style-name="gr71" draw:text-style-name="P6" draw:layer="layout" svg:width="0.779cm" svg:height="0.008cm" svg:x="7.848cm" svg:y="17.018cm" svg:viewBox="0 0 780 9" draw:points="0,9 780,9 780,0 0,0">
          <text:p/>
        </draw:polygon>
        <draw:polygon draw:style-name="gr71" draw:text-style-name="P6" draw:layer="layout" svg:width="0.01cm" svg:height="0.051cm" svg:x="8.627cm" svg:y="17.026cm" svg:viewBox="0 0 11 52" draw:points="0,52 11,52 11,0 0,0">
          <text:p/>
        </draw:polygon>
        <draw:polygon draw:style-name="gr71" draw:text-style-name="P6" draw:layer="layout" svg:width="0.01cm" svg:height="0.008cm" svg:x="8.627cm" svg:y="17.018cm" svg:viewBox="0 0 11 9" draw:points="0,9 11,9 11,0 0,0">
          <text:p/>
        </draw:polygon>
        <draw:polygon draw:style-name="gr71" draw:text-style-name="P6" draw:layer="layout" svg:width="0.008cm" svg:height="0.008cm" svg:x="8.636cm" svg:y="17.018cm" svg:viewBox="0 0 9 9" draw:points="0,9 9,9 9,0 0,0">
          <text:p/>
        </draw:polygon>
        <draw:polygon draw:style-name="gr71" draw:text-style-name="P6" draw:layer="layout" svg:width="0.779cm" svg:height="0.008cm" svg:x="8.644cm" svg:y="17.018cm" svg:viewBox="0 0 780 9" draw:points="0,9 780,9 780,0 0,0">
          <text:p/>
        </draw:polygon>
        <draw:polygon draw:style-name="gr71" draw:text-style-name="P6" draw:layer="layout" svg:width="0.008cm" svg:height="0.051cm" svg:x="9.423cm" svg:y="17.026cm" svg:viewBox="0 0 9 52" draw:points="0,52 9,52 9,0 0,0">
          <text:p/>
        </draw:polygon>
        <draw:polygon draw:style-name="gr71" draw:text-style-name="P6" draw:layer="layout" svg:width="0.008cm" svg:height="0.008cm" svg:x="9.423cm" svg:y="17.018cm" svg:viewBox="0 0 9 9" draw:points="0,9 9,9 9,0 0,0">
          <text:p/>
        </draw:polygon>
        <draw:polygon draw:style-name="gr71" draw:text-style-name="P6" draw:layer="layout" svg:width="0.009cm" svg:height="0.008cm" svg:x="9.431cm" svg:y="17.018cm" svg:viewBox="0 0 10 9" draw:points="0,9 10,9 10,0 0,0">
          <text:p/>
        </draw:polygon>
        <draw:polygon draw:style-name="gr71" draw:text-style-name="P6" draw:layer="layout" svg:width="0.779cm" svg:height="0.008cm" svg:x="9.44cm" svg:y="17.018cm" svg:viewBox="0 0 780 9" draw:points="0,9 780,9 780,0 0,0">
          <text:p/>
        </draw:polygon>
        <draw:polygon draw:style-name="gr71" draw:text-style-name="P6" draw:layer="layout" svg:width="0.008cm" svg:height="0.051cm" svg:x="10.219cm" svg:y="17.026cm" svg:viewBox="0 0 9 52" draw:points="0,52 9,52 9,0 0,0">
          <text:p/>
        </draw:polygon>
        <draw:polygon draw:style-name="gr71" draw:text-style-name="P6" draw:layer="layout" svg:width="0.008cm" svg:height="0.008cm" svg:x="10.219cm" svg:y="17.018cm" svg:viewBox="0 0 9 9" draw:points="0,9 9,9 9,0 0,0">
          <text:p/>
        </draw:polygon>
        <draw:polygon draw:style-name="gr71" draw:text-style-name="P6" draw:layer="layout" svg:width="0.01cm" svg:height="0.008cm" svg:x="10.227cm" svg:y="17.018cm" svg:viewBox="0 0 11 9" draw:points="0,9 11,9 11,0 0,0">
          <text:p/>
        </draw:polygon>
        <draw:polygon draw:style-name="gr71" draw:text-style-name="P6" draw:layer="layout" svg:width="1.405cm" svg:height="0.008cm" svg:x="10.236cm" svg:y="17.018cm" svg:viewBox="0 0 1406 9" draw:points="0,9 1406,9 1406,0 0,0">
          <text:p/>
        </draw:polygon>
        <draw:polygon draw:style-name="gr71" draw:text-style-name="P6" draw:layer="layout" svg:width="0.009cm" svg:height="0.051cm" svg:x="11.641cm" svg:y="17.026cm" svg:viewBox="0 0 10 52" draw:points="0,52 10,52 10,0 0,0">
          <text:p/>
        </draw:polygon>
        <draw:polygon draw:style-name="gr71" draw:text-style-name="P6" draw:layer="layout" svg:width="0.009cm" svg:height="0.008cm" svg:x="11.641cm" svg:y="17.018cm" svg:viewBox="0 0 10 9" draw:points="0,9 10,9 10,0 0,0">
          <text:p/>
        </draw:polygon>
        <draw:polygon draw:style-name="gr71" draw:text-style-name="P6" draw:layer="layout" svg:width="0.008cm" svg:height="0.008cm" svg:x="11.65cm" svg:y="17.018cm" svg:viewBox="0 0 9 9" draw:points="0,9 9,9 9,0 0,0">
          <text:p/>
        </draw:polygon>
        <draw:polygon draw:style-name="gr71" draw:text-style-name="P6" draw:layer="layout" svg:width="0.618cm" svg:height="0.008cm" svg:x="11.658cm" svg:y="17.018cm" svg:viewBox="0 0 619 9" draw:points="0,9 619,9 619,0 0,0">
          <text:p/>
        </draw:polygon>
        <draw:polygon draw:style-name="gr71" draw:text-style-name="P6" draw:layer="layout" svg:width="0.009cm" svg:height="0.051cm" svg:x="12.276cm" svg:y="17.026cm" svg:viewBox="0 0 10 52" draw:points="0,52 10,52 10,0 0,0">
          <text:p/>
        </draw:polygon>
        <draw:polygon draw:style-name="gr71" draw:text-style-name="P6" draw:layer="layout" svg:width="0.009cm" svg:height="0.008cm" svg:x="12.276cm" svg:y="17.018cm" svg:viewBox="0 0 10 9" draw:points="0,9 10,9 10,0 0,0">
          <text:p/>
        </draw:polygon>
        <draw:polygon draw:style-name="gr71" draw:text-style-name="P6" draw:layer="layout" svg:width="0.008cm" svg:height="0.008cm" svg:x="12.285cm" svg:y="17.018cm" svg:viewBox="0 0 9 9" draw:points="0,9 9,9 9,0 0,0">
          <text:p/>
        </draw:polygon>
        <draw:polygon draw:style-name="gr71" draw:text-style-name="P6" draw:layer="layout" svg:width="1.101cm" svg:height="0.008cm" svg:x="12.293cm" svg:y="17.018cm" svg:viewBox="0 0 1102 9" draw:points="0,9 1102,9 1102,0 0,0">
          <text:p/>
        </draw:polygon>
        <draw:polygon draw:style-name="gr71" draw:text-style-name="P6" draw:layer="layout" svg:width="0.008cm" svg:height="0.051cm" svg:x="13.394cm" svg:y="17.026cm" svg:viewBox="0 0 9 52" draw:points="0,52 9,52 9,0 0,0">
          <text:p/>
        </draw:polygon>
        <draw:polygon draw:style-name="gr71" draw:text-style-name="P6" draw:layer="layout" svg:width="0.008cm" svg:height="0.008cm" svg:x="13.394cm" svg:y="17.018cm" svg:viewBox="0 0 9 9" draw:points="0,9 9,9 9,0 0,0">
          <text:p/>
        </draw:polygon>
        <draw:polygon draw:style-name="gr71" draw:text-style-name="P6" draw:layer="layout" svg:width="0.009cm" svg:height="0.008cm" svg:x="13.402cm" svg:y="17.018cm" svg:viewBox="0 0 10 9" draw:points="0,9 10,9 10,0 0,0">
          <text:p/>
        </draw:polygon>
        <draw:polygon draw:style-name="gr71" draw:text-style-name="P6" draw:layer="layout" svg:width="1.092cm" svg:height="0.008cm" svg:x="13.411cm" svg:y="17.018cm" svg:viewBox="0 0 1093 9" draw:points="0,9 1093,9 1093,0 0,0">
          <text:p/>
        </draw:polygon>
        <draw:polygon draw:style-name="gr71" draw:text-style-name="P6" draw:layer="layout" svg:width="0.008cm" svg:height="0.059cm" svg:x="14.503cm" svg:y="17.018cm" svg:viewBox="0 0 9 60" draw:points="0,60 9,60 9,0 0,0">
          <text:p/>
        </draw:polygon>
        <draw:polygon draw:style-name="gr71" draw:text-style-name="P6" draw:layer="layout" svg:width="0.008cm" svg:height="0.008cm" svg:x="14.503cm" svg:y="17.018cm" svg:viewBox="0 0 9 9" draw:points="0,9 9,9 9,0 0,0">
          <text:p/>
        </draw:polygon>
        <draw:polygon draw:style-name="gr71" draw:text-style-name="P6" draw:layer="layout" svg:width="0.009cm" svg:height="0.415cm" svg:x="2.277cm" svg:y="17.077cm" svg:viewBox="0 0 10 416" draw:points="0,416 10,416 10,0 0,0">
          <text:p/>
        </draw:polygon>
        <draw:polygon draw:style-name="gr71" draw:text-style-name="P6" draw:layer="layout" svg:width="0.009cm" svg:height="0.415cm" svg:x="7.831cm" svg:y="17.077cm" svg:viewBox="0 0 10 416" draw:points="0,416 10,416 10,0 0,0">
          <text:p/>
        </draw:polygon>
        <draw:polygon draw:style-name="gr71" draw:text-style-name="P6" draw:layer="layout" svg:width="0.01cm" svg:height="0.415cm" svg:x="8.627cm" svg:y="17.077cm" svg:viewBox="0 0 11 416" draw:points="0,416 11,416 11,0 0,0">
          <text:p/>
        </draw:polygon>
        <draw:polygon draw:style-name="gr71" draw:text-style-name="P6" draw:layer="layout" svg:width="0.008cm" svg:height="0.415cm" svg:x="9.423cm" svg:y="17.077cm" svg:viewBox="0 0 9 416" draw:points="0,416 9,416 9,0 0,0">
          <text:p/>
        </draw:polygon>
        <draw:polygon draw:style-name="gr71" draw:text-style-name="P6" draw:layer="layout" svg:width="0.008cm" svg:height="0.415cm" svg:x="10.219cm" svg:y="17.077cm" svg:viewBox="0 0 9 416" draw:points="0,416 9,416 9,0 0,0">
          <text:p/>
        </draw:polygon>
        <draw:polygon draw:style-name="gr71" draw:text-style-name="P6" draw:layer="layout" svg:width="0.009cm" svg:height="0.415cm" svg:x="11.641cm" svg:y="17.077cm" svg:viewBox="0 0 10 416" draw:points="0,416 10,416 10,0 0,0">
          <text:p/>
        </draw:polygon>
        <draw:polygon draw:style-name="gr71" draw:text-style-name="P6" draw:layer="layout" svg:width="0.009cm" svg:height="0.415cm" svg:x="12.276cm" svg:y="17.077cm" svg:viewBox="0 0 10 416" draw:points="0,416 10,416 10,0 0,0">
          <text:p/>
        </draw:polygon>
        <draw:polygon draw:style-name="gr71" draw:text-style-name="P6" draw:layer="layout" svg:width="0.008cm" svg:height="0.415cm" svg:x="13.394cm" svg:y="17.077cm" svg:viewBox="0 0 9 416" draw:points="0,416 9,416 9,0 0,0">
          <text:p/>
        </draw:polygon>
        <draw:polygon draw:style-name="gr71" draw:text-style-name="P6" draw:layer="layout" svg:width="0.008cm" svg:height="0.415cm" svg:x="14.503cm" svg:y="17.077cm" svg:viewBox="0 0 9 416" draw:points="0,416 9,416 9,0 0,0">
          <text:p/>
        </draw:polygon>
        <draw:frame draw:style-name="gr11" draw:text-style-name="P2" draw:layer="layout" svg:width="0.321cm" svg:height="0.357cm" svg:x="13.454cm" svg:y="17.087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337cm" svg:y="17.55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7.891cm" svg:y="17.55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87cm" svg:y="17.55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9.483cm" svg:y="17.55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0.279cm" svg:y="17.55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701cm" svg:y="17.55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2.336cm" svg:y="17.553cm">
          <draw:text-box>
            <text:p text:style-name="P1"><text:span text:style-name="T1"><text:s/></text:span></text:p>
          </draw:text-box>
        </draw:frame>
        <draw:polygon draw:style-name="gr71" draw:text-style-name="P6" draw:layer="layout" svg:width="0.009cm" svg:height="0.05cm" svg:x="2.277cm" svg:y="17.492cm" svg:viewBox="0 0 10 51" draw:points="0,51 10,51 10,0 0,0">
          <text:p/>
        </draw:polygon>
        <draw:polygon draw:style-name="gr71" draw:text-style-name="P6" draw:layer="layout" svg:width="5.545cm" svg:height="0.008cm" svg:x="2.286cm" svg:y="17.492cm" svg:viewBox="0 0 5546 9" draw:points="0,9 5546,9 5546,0 0,0">
          <text:p/>
        </draw:polygon>
        <draw:polygon draw:style-name="gr71" draw:text-style-name="P6" draw:layer="layout" svg:width="0.009cm" svg:height="0.05cm" svg:x="7.831cm" svg:y="17.492cm" svg:viewBox="0 0 10 51" draw:points="0,51 10,51 10,0 0,0">
          <text:p/>
        </draw:polygon>
        <draw:polygon draw:style-name="gr71" draw:text-style-name="P6" draw:layer="layout" svg:width="0.787cm" svg:height="0.008cm" svg:x="7.84cm" svg:y="17.492cm" svg:viewBox="0 0 788 9" draw:points="0,9 788,9 788,0 0,0">
          <text:p/>
        </draw:polygon>
        <draw:polygon draw:style-name="gr71" draw:text-style-name="P6" draw:layer="layout" svg:width="0.01cm" svg:height="0.05cm" svg:x="8.627cm" svg:y="17.492cm" svg:viewBox="0 0 11 51" draw:points="0,51 11,51 11,0 0,0">
          <text:p/>
        </draw:polygon>
        <draw:polygon draw:style-name="gr71" draw:text-style-name="P6" draw:layer="layout" svg:width="0.787cm" svg:height="0.008cm" svg:x="8.636cm" svg:y="17.492cm" svg:viewBox="0 0 788 9" draw:points="0,9 788,9 788,0 0,0">
          <text:p/>
        </draw:polygon>
        <draw:polygon draw:style-name="gr71" draw:text-style-name="P6" draw:layer="layout" svg:width="0.008cm" svg:height="0.05cm" svg:x="9.423cm" svg:y="17.492cm" svg:viewBox="0 0 9 51" draw:points="0,51 9,51 9,0 0,0">
          <text:p/>
        </draw:polygon>
        <draw:polygon draw:style-name="gr71" draw:text-style-name="P6" draw:layer="layout" svg:width="0.788cm" svg:height="0.008cm" svg:x="9.431cm" svg:y="17.492cm" svg:viewBox="0 0 789 9" draw:points="0,9 789,9 789,0 0,0">
          <text:p/>
        </draw:polygon>
        <draw:polygon draw:style-name="gr71" draw:text-style-name="P6" draw:layer="layout" svg:width="0.008cm" svg:height="0.05cm" svg:x="10.219cm" svg:y="17.492cm" svg:viewBox="0 0 9 51" draw:points="0,51 9,51 9,0 0,0">
          <text:p/>
        </draw:polygon>
        <draw:polygon draw:style-name="gr71" draw:text-style-name="P6" draw:layer="layout" svg:width="1.414cm" svg:height="0.008cm" svg:x="10.227cm" svg:y="17.492cm" svg:viewBox="0 0 1415 9" draw:points="0,9 1415,9 1415,0 0,0">
          <text:p/>
        </draw:polygon>
        <draw:polygon draw:style-name="gr71" draw:text-style-name="P6" draw:layer="layout" svg:width="0.009cm" svg:height="0.05cm" svg:x="11.641cm" svg:y="17.492cm" svg:viewBox="0 0 10 51" draw:points="0,51 10,51 10,0 0,0">
          <text:p/>
        </draw:polygon>
        <draw:polygon draw:style-name="gr71" draw:text-style-name="P6" draw:layer="layout" svg:width="0.626cm" svg:height="0.008cm" svg:x="11.65cm" svg:y="17.492cm" svg:viewBox="0 0 627 9" draw:points="0,9 627,9 627,0 0,0">
          <text:p/>
        </draw:polygon>
        <draw:polygon draw:style-name="gr71" draw:text-style-name="P6" draw:layer="layout" svg:width="0.009cm" svg:height="0.05cm" svg:x="12.276cm" svg:y="17.492cm" svg:viewBox="0 0 10 51" draw:points="0,51 10,51 10,0 0,0">
          <text:p/>
        </draw:polygon>
        <draw:polygon draw:style-name="gr71" draw:text-style-name="P6" draw:layer="layout" svg:width="1.109cm" svg:height="0.008cm" svg:x="12.285cm" svg:y="17.492cm" svg:viewBox="0 0 1110 9" draw:points="0,9 1110,9 1110,0 0,0">
          <text:p/>
        </draw:polygon>
        <draw:polygon draw:style-name="gr71" draw:text-style-name="P6" draw:layer="layout" svg:width="0.008cm" svg:height="0.05cm" svg:x="13.394cm" svg:y="17.492cm" svg:viewBox="0 0 9 51" draw:points="0,51 9,51 9,0 0,0">
          <text:p/>
        </draw:polygon>
        <draw:polygon draw:style-name="gr71" draw:text-style-name="P6" draw:layer="layout" svg:width="1.101cm" svg:height="0.008cm" svg:x="13.402cm" svg:y="17.492cm" svg:viewBox="0 0 1102 9" draw:points="0,9 1102,9 1102,0 0,0">
          <text:p/>
        </draw:polygon>
        <draw:polygon draw:style-name="gr71" draw:text-style-name="P6" draw:layer="layout" svg:width="0.008cm" svg:height="0.05cm" svg:x="14.503cm" svg:y="17.492cm" svg:viewBox="0 0 9 51" draw:points="0,51 9,51 9,0 0,0">
          <text:p/>
        </draw:polygon>
        <draw:polygon draw:style-name="gr71" draw:text-style-name="P6" draw:layer="layout" svg:width="0.009cm" svg:height="0.415cm" svg:x="2.277cm" svg:y="17.542cm" svg:viewBox="0 0 10 416" draw:points="0,416 10,416 10,0 0,0">
          <text:p/>
        </draw:polygon>
        <draw:polygon draw:style-name="gr71" draw:text-style-name="P6" draw:layer="layout" svg:width="0.009cm" svg:height="0.415cm" svg:x="7.831cm" svg:y="17.542cm" svg:viewBox="0 0 10 416" draw:points="0,416 10,416 10,0 0,0">
          <text:p/>
        </draw:polygon>
        <draw:polygon draw:style-name="gr71" draw:text-style-name="P6" draw:layer="layout" svg:width="0.01cm" svg:height="0.415cm" svg:x="8.627cm" svg:y="17.542cm" svg:viewBox="0 0 11 416" draw:points="0,416 11,416 11,0 0,0">
          <text:p/>
        </draw:polygon>
        <draw:polygon draw:style-name="gr71" draw:text-style-name="P6" draw:layer="layout" svg:width="0.008cm" svg:height="0.415cm" svg:x="9.423cm" svg:y="17.542cm" svg:viewBox="0 0 9 416" draw:points="0,416 9,416 9,0 0,0">
          <text:p/>
        </draw:polygon>
        <draw:polygon draw:style-name="gr71" draw:text-style-name="P6" draw:layer="layout" svg:width="0.008cm" svg:height="0.415cm" svg:x="10.219cm" svg:y="17.542cm" svg:viewBox="0 0 9 416" draw:points="0,416 9,416 9,0 0,0">
          <text:p/>
        </draw:polygon>
        <draw:polygon draw:style-name="gr71" draw:text-style-name="P6" draw:layer="layout" svg:width="0.009cm" svg:height="0.415cm" svg:x="11.641cm" svg:y="17.542cm" svg:viewBox="0 0 10 416" draw:points="0,416 10,416 10,0 0,0">
          <text:p/>
        </draw:polygon>
        <draw:polygon draw:style-name="gr71" draw:text-style-name="P6" draw:layer="layout" svg:width="0.009cm" svg:height="0.415cm" svg:x="12.276cm" svg:y="17.542cm" svg:viewBox="0 0 10 416" draw:points="0,416 10,416 10,0 0,0">
          <text:p/>
        </draw:polygon>
        <draw:polygon draw:style-name="gr71" draw:text-style-name="P6" draw:layer="layout" svg:width="0.008cm" svg:height="0.415cm" svg:x="13.394cm" svg:y="17.542cm" svg:viewBox="0 0 9 416" draw:points="0,416 9,416 9,0 0,0">
          <text:p/>
        </draw:polygon>
        <draw:polygon draw:style-name="gr71" draw:text-style-name="P6" draw:layer="layout" svg:width="0.008cm" svg:height="0.415cm" svg:x="14.503cm" svg:y="17.542cm" svg:viewBox="0 0 9 416" draw:points="0,416 9,416 9,0 0,0">
          <text:p/>
        </draw:polygon>
        <draw:frame draw:style-name="gr11" draw:text-style-name="P2" draw:layer="layout" svg:width="0.321cm" svg:height="0.357cm" svg:x="13.454cm" svg:y="17.55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337cm" svg:y="18.01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7.891cm" svg:y="18.01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87cm" svg:y="18.01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9.483cm" svg:y="18.01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0.279cm" svg:y="18.01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701cm" svg:y="18.01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2.336cm" svg:y="18.018cm">
          <draw:text-box>
            <text:p text:style-name="P1"><text:span text:style-name="T1"><text:s/></text:span></text:p>
          </draw:text-box>
        </draw:frame>
        <draw:polygon draw:style-name="gr71" draw:text-style-name="P6" draw:layer="layout" svg:width="0.009cm" svg:height="0.051cm" svg:x="2.277cm" svg:y="17.957cm" svg:viewBox="0 0 10 52" draw:points="0,52 10,52 10,0 0,0">
          <text:p/>
        </draw:polygon>
        <draw:polygon draw:style-name="gr71" draw:text-style-name="P6" draw:layer="layout" svg:width="5.545cm" svg:height="0.009cm" svg:x="2.286cm" svg:y="17.957cm" svg:viewBox="0 0 5546 10" draw:points="0,10 5546,10 5546,0 0,0">
          <text:p/>
        </draw:polygon>
        <draw:polygon draw:style-name="gr71" draw:text-style-name="P6" draw:layer="layout" svg:width="0.009cm" svg:height="0.051cm" svg:x="7.831cm" svg:y="17.957cm" svg:viewBox="0 0 10 52" draw:points="0,52 10,52 10,0 0,0">
          <text:p/>
        </draw:polygon>
        <draw:polygon draw:style-name="gr71" draw:text-style-name="P6" draw:layer="layout" svg:width="0.787cm" svg:height="0.009cm" svg:x="7.84cm" svg:y="17.957cm" svg:viewBox="0 0 788 10" draw:points="0,10 788,10 788,0 0,0">
          <text:p/>
        </draw:polygon>
        <draw:polygon draw:style-name="gr71" draw:text-style-name="P6" draw:layer="layout" svg:width="0.01cm" svg:height="0.051cm" svg:x="8.627cm" svg:y="17.957cm" svg:viewBox="0 0 11 52" draw:points="0,52 11,52 11,0 0,0">
          <text:p/>
        </draw:polygon>
        <draw:polygon draw:style-name="gr71" draw:text-style-name="P6" draw:layer="layout" svg:width="0.787cm" svg:height="0.009cm" svg:x="8.636cm" svg:y="17.957cm" svg:viewBox="0 0 788 10" draw:points="0,10 788,10 788,0 0,0">
          <text:p/>
        </draw:polygon>
        <draw:polygon draw:style-name="gr71" draw:text-style-name="P6" draw:layer="layout" svg:width="0.008cm" svg:height="0.051cm" svg:x="9.423cm" svg:y="17.957cm" svg:viewBox="0 0 9 52" draw:points="0,52 9,52 9,0 0,0">
          <text:p/>
        </draw:polygon>
        <draw:polygon draw:style-name="gr71" draw:text-style-name="P6" draw:layer="layout" svg:width="0.788cm" svg:height="0.009cm" svg:x="9.431cm" svg:y="17.957cm" svg:viewBox="0 0 789 10" draw:points="0,10 789,10 789,0 0,0">
          <text:p/>
        </draw:polygon>
        <draw:polygon draw:style-name="gr71" draw:text-style-name="P6" draw:layer="layout" svg:width="0.008cm" svg:height="0.051cm" svg:x="10.219cm" svg:y="17.957cm" svg:viewBox="0 0 9 52" draw:points="0,52 9,52 9,0 0,0">
          <text:p/>
        </draw:polygon>
        <draw:polygon draw:style-name="gr71" draw:text-style-name="P6" draw:layer="layout" svg:width="1.414cm" svg:height="0.009cm" svg:x="10.227cm" svg:y="17.957cm" svg:viewBox="0 0 1415 10" draw:points="0,10 1415,10 1415,0 0,0">
          <text:p/>
        </draw:polygon>
        <draw:polygon draw:style-name="gr71" draw:text-style-name="P6" draw:layer="layout" svg:width="0.009cm" svg:height="0.051cm" svg:x="11.641cm" svg:y="17.957cm" svg:viewBox="0 0 10 52" draw:points="0,52 10,52 10,0 0,0">
          <text:p/>
        </draw:polygon>
        <draw:polygon draw:style-name="gr71" draw:text-style-name="P6" draw:layer="layout" svg:width="0.626cm" svg:height="0.009cm" svg:x="11.65cm" svg:y="17.957cm" svg:viewBox="0 0 627 10" draw:points="0,10 627,10 627,0 0,0">
          <text:p/>
        </draw:polygon>
        <draw:polygon draw:style-name="gr71" draw:text-style-name="P6" draw:layer="layout" svg:width="0.009cm" svg:height="0.051cm" svg:x="12.276cm" svg:y="17.957cm" svg:viewBox="0 0 10 52" draw:points="0,52 10,52 10,0 0,0">
          <text:p/>
        </draw:polygon>
        <draw:polygon draw:style-name="gr71" draw:text-style-name="P6" draw:layer="layout" svg:width="1.109cm" svg:height="0.009cm" svg:x="12.285cm" svg:y="17.957cm" svg:viewBox="0 0 1110 10" draw:points="0,10 1110,10 1110,0 0,0">
          <text:p/>
        </draw:polygon>
        <draw:polygon draw:style-name="gr71" draw:text-style-name="P6" draw:layer="layout" svg:width="0.008cm" svg:height="0.051cm" svg:x="13.394cm" svg:y="17.957cm" svg:viewBox="0 0 9 52" draw:points="0,52 9,52 9,0 0,0">
          <text:p/>
        </draw:polygon>
        <draw:polygon draw:style-name="gr71" draw:text-style-name="P6" draw:layer="layout" svg:width="1.101cm" svg:height="0.009cm" svg:x="13.402cm" svg:y="17.957cm" svg:viewBox="0 0 1102 10" draw:points="0,10 1102,10 1102,0 0,0">
          <text:p/>
        </draw:polygon>
        <draw:polygon draw:style-name="gr71" draw:text-style-name="P6" draw:layer="layout" svg:width="0.008cm" svg:height="0.051cm" svg:x="14.503cm" svg:y="17.957cm" svg:viewBox="0 0 9 52" draw:points="0,52 9,52 9,0 0,0">
          <text:p/>
        </draw:polygon>
        <draw:polygon draw:style-name="gr71" draw:text-style-name="P6" draw:layer="layout" svg:width="0.009cm" svg:height="0.423cm" svg:x="2.277cm" svg:y="18.008cm" svg:viewBox="0 0 10 424" draw:points="0,424 10,424 10,0 0,0">
          <text:p/>
        </draw:polygon>
        <draw:polygon draw:style-name="gr71" draw:text-style-name="P6" draw:layer="layout" svg:width="0.009cm" svg:height="0.423cm" svg:x="7.831cm" svg:y="18.008cm" svg:viewBox="0 0 10 424" draw:points="0,424 10,424 10,0 0,0">
          <text:p/>
        </draw:polygon>
        <draw:polygon draw:style-name="gr71" draw:text-style-name="P6" draw:layer="layout" svg:width="0.01cm" svg:height="0.423cm" svg:x="8.627cm" svg:y="18.008cm" svg:viewBox="0 0 11 424" draw:points="0,424 11,424 11,0 0,0">
          <text:p/>
        </draw:polygon>
        <draw:polygon draw:style-name="gr71" draw:text-style-name="P6" draw:layer="layout" svg:width="0.008cm" svg:height="0.423cm" svg:x="9.423cm" svg:y="18.008cm" svg:viewBox="0 0 9 424" draw:points="0,424 9,424 9,0 0,0">
          <text:p/>
        </draw:polygon>
        <draw:polygon draw:style-name="gr71" draw:text-style-name="P6" draw:layer="layout" svg:width="0.008cm" svg:height="0.423cm" svg:x="10.219cm" svg:y="18.008cm" svg:viewBox="0 0 9 424" draw:points="0,424 9,424 9,0 0,0">
          <text:p/>
        </draw:polygon>
        <draw:polygon draw:style-name="gr71" draw:text-style-name="P6" draw:layer="layout" svg:width="0.009cm" svg:height="0.423cm" svg:x="11.641cm" svg:y="18.008cm" svg:viewBox="0 0 10 424" draw:points="0,424 10,424 10,0 0,0">
          <text:p/>
        </draw:polygon>
        <draw:polygon draw:style-name="gr71" draw:text-style-name="P6" draw:layer="layout" svg:width="0.009cm" svg:height="0.423cm" svg:x="12.276cm" svg:y="18.008cm" svg:viewBox="0 0 10 424" draw:points="0,424 10,424 10,0 0,0">
          <text:p/>
        </draw:polygon>
        <draw:polygon draw:style-name="gr71" draw:text-style-name="P6" draw:layer="layout" svg:width="0.008cm" svg:height="0.423cm" svg:x="13.394cm" svg:y="18.008cm" svg:viewBox="0 0 9 424" draw:points="0,424 9,424 9,0 0,0">
          <text:p/>
        </draw:polygon>
        <draw:polygon draw:style-name="gr71" draw:text-style-name="P6" draw:layer="layout" svg:width="0.008cm" svg:height="0.423cm" svg:x="14.503cm" svg:y="18.008cm" svg:viewBox="0 0 9 424" draw:points="0,424 9,424 9,0 0,0">
          <text:p/>
        </draw:polygon>
        <draw:frame draw:style-name="gr11" draw:text-style-name="P2" draw:layer="layout" svg:width="0.321cm" svg:height="0.357cm" svg:x="13.454cm" svg:y="18.01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337cm" svg:y="18.492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7.891cm" svg:y="18.492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87cm" svg:y="18.492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9.483cm" svg:y="18.492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0.279cm" svg:y="18.492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701cm" svg:y="18.492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2.336cm" svg:y="18.492cm">
          <draw:text-box>
            <text:p text:style-name="P1"><text:span text:style-name="T1"><text:s/></text:span></text:p>
          </draw:text-box>
        </draw:frame>
        <draw:polygon draw:style-name="gr71" draw:text-style-name="P6" draw:layer="layout" svg:width="0.009cm" svg:height="0.051cm" svg:x="2.277cm" svg:y="18.431cm" svg:viewBox="0 0 10 52" draw:points="0,52 10,52 10,0 0,0">
          <text:p/>
        </draw:polygon>
        <draw:polygon draw:style-name="gr71" draw:text-style-name="P6" draw:layer="layout" svg:width="5.545cm" svg:height="0.009cm" svg:x="2.286cm" svg:y="18.431cm" svg:viewBox="0 0 5546 10" draw:points="0,10 5546,10 5546,0 0,0">
          <text:p/>
        </draw:polygon>
        <draw:polygon draw:style-name="gr71" draw:text-style-name="P6" draw:layer="layout" svg:width="0.009cm" svg:height="0.051cm" svg:x="7.831cm" svg:y="18.431cm" svg:viewBox="0 0 10 52" draw:points="0,52 10,52 10,0 0,0">
          <text:p/>
        </draw:polygon>
        <draw:polygon draw:style-name="gr71" draw:text-style-name="P6" draw:layer="layout" svg:width="0.787cm" svg:height="0.009cm" svg:x="7.84cm" svg:y="18.431cm" svg:viewBox="0 0 788 10" draw:points="0,10 788,10 788,0 0,0">
          <text:p/>
        </draw:polygon>
        <draw:polygon draw:style-name="gr71" draw:text-style-name="P6" draw:layer="layout" svg:width="0.01cm" svg:height="0.051cm" svg:x="8.627cm" svg:y="18.431cm" svg:viewBox="0 0 11 52" draw:points="0,52 11,52 11,0 0,0">
          <text:p/>
        </draw:polygon>
        <draw:polygon draw:style-name="gr71" draw:text-style-name="P6" draw:layer="layout" svg:width="0.787cm" svg:height="0.009cm" svg:x="8.636cm" svg:y="18.431cm" svg:viewBox="0 0 788 10" draw:points="0,10 788,10 788,0 0,0">
          <text:p/>
        </draw:polygon>
        <draw:polygon draw:style-name="gr71" draw:text-style-name="P6" draw:layer="layout" svg:width="0.008cm" svg:height="0.051cm" svg:x="9.423cm" svg:y="18.431cm" svg:viewBox="0 0 9 52" draw:points="0,52 9,52 9,0 0,0">
          <text:p/>
        </draw:polygon>
        <draw:polygon draw:style-name="gr71" draw:text-style-name="P6" draw:layer="layout" svg:width="0.788cm" svg:height="0.009cm" svg:x="9.431cm" svg:y="18.431cm" svg:viewBox="0 0 789 10" draw:points="0,10 789,10 789,0 0,0">
          <text:p/>
        </draw:polygon>
        <draw:polygon draw:style-name="gr71" draw:text-style-name="P6" draw:layer="layout" svg:width="0.008cm" svg:height="0.051cm" svg:x="10.219cm" svg:y="18.431cm" svg:viewBox="0 0 9 52" draw:points="0,52 9,52 9,0 0,0">
          <text:p/>
        </draw:polygon>
        <draw:polygon draw:style-name="gr71" draw:text-style-name="P6" draw:layer="layout" svg:width="1.414cm" svg:height="0.009cm" svg:x="10.227cm" svg:y="18.431cm" svg:viewBox="0 0 1415 10" draw:points="0,10 1415,10 1415,0 0,0">
          <text:p/>
        </draw:polygon>
        <draw:polygon draw:style-name="gr71" draw:text-style-name="P6" draw:layer="layout" svg:width="0.009cm" svg:height="0.051cm" svg:x="11.641cm" svg:y="18.431cm" svg:viewBox="0 0 10 52" draw:points="0,52 10,52 10,0 0,0">
          <text:p/>
        </draw:polygon>
        <draw:polygon draw:style-name="gr71" draw:text-style-name="P6" draw:layer="layout" svg:width="0.626cm" svg:height="0.009cm" svg:x="11.65cm" svg:y="18.431cm" svg:viewBox="0 0 627 10" draw:points="0,10 627,10 627,0 0,0">
          <text:p/>
        </draw:polygon>
        <draw:polygon draw:style-name="gr71" draw:text-style-name="P6" draw:layer="layout" svg:width="0.009cm" svg:height="0.051cm" svg:x="12.276cm" svg:y="18.431cm" svg:viewBox="0 0 10 52" draw:points="0,52 10,52 10,0 0,0">
          <text:p/>
        </draw:polygon>
        <draw:polygon draw:style-name="gr71" draw:text-style-name="P6" draw:layer="layout" svg:width="1.109cm" svg:height="0.009cm" svg:x="12.285cm" svg:y="18.431cm" svg:viewBox="0 0 1110 10" draw:points="0,10 1110,10 1110,0 0,0">
          <text:p/>
        </draw:polygon>
        <draw:polygon draw:style-name="gr71" draw:text-style-name="P6" draw:layer="layout" svg:width="0.008cm" svg:height="0.051cm" svg:x="13.394cm" svg:y="18.431cm" svg:viewBox="0 0 9 52" draw:points="0,52 9,52 9,0 0,0">
          <text:p/>
        </draw:polygon>
        <draw:polygon draw:style-name="gr71" draw:text-style-name="P6" draw:layer="layout" svg:width="1.101cm" svg:height="0.009cm" svg:x="13.402cm" svg:y="18.431cm" svg:viewBox="0 0 1102 10" draw:points="0,10 1102,10 1102,0 0,0">
          <text:p/>
        </draw:polygon>
        <draw:polygon draw:style-name="gr71" draw:text-style-name="P6" draw:layer="layout" svg:width="0.008cm" svg:height="0.051cm" svg:x="14.503cm" svg:y="18.431cm" svg:viewBox="0 0 9 52" draw:points="0,52 9,52 9,0 0,0">
          <text:p/>
        </draw:polygon>
        <draw:polygon draw:style-name="gr71" draw:text-style-name="P6" draw:layer="layout" svg:width="0.009cm" svg:height="0.415cm" svg:x="2.277cm" svg:y="18.482cm" svg:viewBox="0 0 10 416" draw:points="0,416 10,416 10,0 0,0">
          <text:p/>
        </draw:polygon>
        <draw:polygon draw:style-name="gr71" draw:text-style-name="P6" draw:layer="layout" svg:width="0.009cm" svg:height="0.415cm" svg:x="7.831cm" svg:y="18.482cm" svg:viewBox="0 0 10 416" draw:points="0,416 10,416 10,0 0,0">
          <text:p/>
        </draw:polygon>
        <draw:polygon draw:style-name="gr71" draw:text-style-name="P6" draw:layer="layout" svg:width="0.01cm" svg:height="0.415cm" svg:x="8.627cm" svg:y="18.482cm" svg:viewBox="0 0 11 416" draw:points="0,416 11,416 11,0 0,0">
          <text:p/>
        </draw:polygon>
        <draw:polygon draw:style-name="gr71" draw:text-style-name="P6" draw:layer="layout" svg:width="0.008cm" svg:height="0.415cm" svg:x="9.423cm" svg:y="18.482cm" svg:viewBox="0 0 9 416" draw:points="0,416 9,416 9,0 0,0">
          <text:p/>
        </draw:polygon>
        <draw:polygon draw:style-name="gr71" draw:text-style-name="P6" draw:layer="layout" svg:width="0.008cm" svg:height="0.415cm" svg:x="10.219cm" svg:y="18.482cm" svg:viewBox="0 0 9 416" draw:points="0,416 9,416 9,0 0,0">
          <text:p/>
        </draw:polygon>
        <draw:polygon draw:style-name="gr71" draw:text-style-name="P6" draw:layer="layout" svg:width="0.009cm" svg:height="0.415cm" svg:x="11.641cm" svg:y="18.482cm" svg:viewBox="0 0 10 416" draw:points="0,416 10,416 10,0 0,0">
          <text:p/>
        </draw:polygon>
        <draw:polygon draw:style-name="gr71" draw:text-style-name="P6" draw:layer="layout" svg:width="0.009cm" svg:height="0.415cm" svg:x="12.276cm" svg:y="18.482cm" svg:viewBox="0 0 10 416" draw:points="0,416 10,416 10,0 0,0">
          <text:p/>
        </draw:polygon>
        <draw:polygon draw:style-name="gr71" draw:text-style-name="P6" draw:layer="layout" svg:width="0.008cm" svg:height="0.415cm" svg:x="13.394cm" svg:y="18.482cm" svg:viewBox="0 0 9 416" draw:points="0,416 9,416 9,0 0,0">
          <text:p/>
        </draw:polygon>
        <draw:polygon draw:style-name="gr71" draw:text-style-name="P6" draw:layer="layout" svg:width="0.008cm" svg:height="0.415cm" svg:x="14.503cm" svg:y="18.482cm" svg:viewBox="0 0 9 416" draw:points="0,416 9,416 9,0 0,0">
          <text:p/>
        </draw:polygon>
        <draw:frame draw:style-name="gr11" draw:text-style-name="P2" draw:layer="layout" svg:width="0.321cm" svg:height="0.357cm" svg:x="13.454cm" svg:y="18.492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337cm" svg:y="18.95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7.891cm" svg:y="18.95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87cm" svg:y="18.95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9.483cm" svg:y="18.95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0.279cm" svg:y="18.95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701cm" svg:y="18.95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2.336cm" svg:y="18.958cm">
          <draw:text-box>
            <text:p text:style-name="P1"><text:span text:style-name="T1"><text:s/></text:span></text:p>
          </draw:text-box>
        </draw:frame>
        <draw:polygon draw:style-name="gr71" draw:text-style-name="P6" draw:layer="layout" svg:width="0.009cm" svg:height="0.051cm" svg:x="2.277cm" svg:y="18.897cm" svg:viewBox="0 0 10 52" draw:points="0,52 10,52 10,0 0,0">
          <text:p/>
        </draw:polygon>
        <draw:polygon draw:style-name="gr71" draw:text-style-name="P6" draw:layer="layout" svg:width="5.545cm" svg:height="0.009cm" svg:x="2.286cm" svg:y="18.897cm" svg:viewBox="0 0 5546 10" draw:points="0,10 5546,10 5546,0 0,0">
          <text:p/>
        </draw:polygon>
        <draw:polygon draw:style-name="gr71" draw:text-style-name="P6" draw:layer="layout" svg:width="0.009cm" svg:height="0.051cm" svg:x="7.831cm" svg:y="18.897cm" svg:viewBox="0 0 10 52" draw:points="0,52 10,52 10,0 0,0">
          <text:p/>
        </draw:polygon>
        <draw:polygon draw:style-name="gr71" draw:text-style-name="P6" draw:layer="layout" svg:width="0.787cm" svg:height="0.009cm" svg:x="7.84cm" svg:y="18.897cm" svg:viewBox="0 0 788 10" draw:points="0,10 788,10 788,0 0,0">
          <text:p/>
        </draw:polygon>
        <draw:polygon draw:style-name="gr71" draw:text-style-name="P6" draw:layer="layout" svg:width="0.01cm" svg:height="0.051cm" svg:x="8.627cm" svg:y="18.897cm" svg:viewBox="0 0 11 52" draw:points="0,52 11,52 11,0 0,0">
          <text:p/>
        </draw:polygon>
        <draw:polygon draw:style-name="gr71" draw:text-style-name="P6" draw:layer="layout" svg:width="0.787cm" svg:height="0.009cm" svg:x="8.636cm" svg:y="18.897cm" svg:viewBox="0 0 788 10" draw:points="0,10 788,10 788,0 0,0">
          <text:p/>
        </draw:polygon>
        <draw:polygon draw:style-name="gr71" draw:text-style-name="P6" draw:layer="layout" svg:width="0.008cm" svg:height="0.051cm" svg:x="9.423cm" svg:y="18.897cm" svg:viewBox="0 0 9 52" draw:points="0,52 9,52 9,0 0,0">
          <text:p/>
        </draw:polygon>
        <draw:polygon draw:style-name="gr71" draw:text-style-name="P6" draw:layer="layout" svg:width="0.788cm" svg:height="0.009cm" svg:x="9.431cm" svg:y="18.897cm" svg:viewBox="0 0 789 10" draw:points="0,10 789,10 789,0 0,0">
          <text:p/>
        </draw:polygon>
        <draw:polygon draw:style-name="gr71" draw:text-style-name="P6" draw:layer="layout" svg:width="0.008cm" svg:height="0.051cm" svg:x="10.219cm" svg:y="18.897cm" svg:viewBox="0 0 9 52" draw:points="0,52 9,52 9,0 0,0">
          <text:p/>
        </draw:polygon>
        <draw:polygon draw:style-name="gr71" draw:text-style-name="P6" draw:layer="layout" svg:width="1.414cm" svg:height="0.009cm" svg:x="10.227cm" svg:y="18.897cm" svg:viewBox="0 0 1415 10" draw:points="0,10 1415,10 1415,0 0,0">
          <text:p/>
        </draw:polygon>
        <draw:polygon draw:style-name="gr71" draw:text-style-name="P6" draw:layer="layout" svg:width="0.009cm" svg:height="0.051cm" svg:x="11.641cm" svg:y="18.897cm" svg:viewBox="0 0 10 52" draw:points="0,52 10,52 10,0 0,0">
          <text:p/>
        </draw:polygon>
        <draw:polygon draw:style-name="gr71" draw:text-style-name="P6" draw:layer="layout" svg:width="0.626cm" svg:height="0.009cm" svg:x="11.65cm" svg:y="18.897cm" svg:viewBox="0 0 627 10" draw:points="0,10 627,10 627,0 0,0">
          <text:p/>
        </draw:polygon>
        <draw:polygon draw:style-name="gr71" draw:text-style-name="P6" draw:layer="layout" svg:width="0.009cm" svg:height="0.051cm" svg:x="12.276cm" svg:y="18.897cm" svg:viewBox="0 0 10 52" draw:points="0,52 10,52 10,0 0,0">
          <text:p/>
        </draw:polygon>
        <draw:polygon draw:style-name="gr71" draw:text-style-name="P6" draw:layer="layout" svg:width="1.109cm" svg:height="0.009cm" svg:x="12.285cm" svg:y="18.897cm" svg:viewBox="0 0 1110 10" draw:points="0,10 1110,10 1110,0 0,0">
          <text:p/>
        </draw:polygon>
        <draw:polygon draw:style-name="gr71" draw:text-style-name="P6" draw:layer="layout" svg:width="0.008cm" svg:height="0.051cm" svg:x="13.394cm" svg:y="18.897cm" svg:viewBox="0 0 9 52" draw:points="0,52 9,52 9,0 0,0">
          <text:p/>
        </draw:polygon>
        <draw:polygon draw:style-name="gr71" draw:text-style-name="P6" draw:layer="layout" svg:width="1.101cm" svg:height="0.009cm" svg:x="13.402cm" svg:y="18.897cm" svg:viewBox="0 0 1102 10" draw:points="0,10 1102,10 1102,0 0,0">
          <text:p/>
        </draw:polygon>
        <draw:polygon draw:style-name="gr71" draw:text-style-name="P6" draw:layer="layout" svg:width="0.008cm" svg:height="0.051cm" svg:x="14.503cm" svg:y="18.897cm" svg:viewBox="0 0 9 52" draw:points="0,52 9,52 9,0 0,0">
          <text:p/>
        </draw:polygon>
        <draw:polygon draw:style-name="gr71" draw:text-style-name="P6" draw:layer="layout" svg:width="0.009cm" svg:height="0.415cm" svg:x="2.277cm" svg:y="18.948cm" svg:viewBox="0 0 10 416" draw:points="0,416 10,416 10,0 0,0">
          <text:p/>
        </draw:polygon>
        <draw:polygon draw:style-name="gr71" draw:text-style-name="P6" draw:layer="layout" svg:width="0.009cm" svg:height="0.415cm" svg:x="7.831cm" svg:y="18.948cm" svg:viewBox="0 0 10 416" draw:points="0,416 10,416 10,0 0,0">
          <text:p/>
        </draw:polygon>
        <draw:polygon draw:style-name="gr71" draw:text-style-name="P6" draw:layer="layout" svg:width="0.01cm" svg:height="0.415cm" svg:x="8.627cm" svg:y="18.948cm" svg:viewBox="0 0 11 416" draw:points="0,416 11,416 11,0 0,0">
          <text:p/>
        </draw:polygon>
        <draw:polygon draw:style-name="gr71" draw:text-style-name="P6" draw:layer="layout" svg:width="0.008cm" svg:height="0.415cm" svg:x="9.423cm" svg:y="18.948cm" svg:viewBox="0 0 9 416" draw:points="0,416 9,416 9,0 0,0">
          <text:p/>
        </draw:polygon>
        <draw:polygon draw:style-name="gr71" draw:text-style-name="P6" draw:layer="layout" svg:width="0.008cm" svg:height="0.415cm" svg:x="10.219cm" svg:y="18.948cm" svg:viewBox="0 0 9 416" draw:points="0,416 9,416 9,0 0,0">
          <text:p/>
        </draw:polygon>
        <draw:polygon draw:style-name="gr71" draw:text-style-name="P6" draw:layer="layout" svg:width="0.009cm" svg:height="0.415cm" svg:x="11.641cm" svg:y="18.948cm" svg:viewBox="0 0 10 416" draw:points="0,416 10,416 10,0 0,0">
          <text:p/>
        </draw:polygon>
        <draw:polygon draw:style-name="gr71" draw:text-style-name="P6" draw:layer="layout" svg:width="0.009cm" svg:height="0.415cm" svg:x="12.276cm" svg:y="18.948cm" svg:viewBox="0 0 10 416" draw:points="0,416 10,416 10,0 0,0">
          <text:p/>
        </draw:polygon>
        <draw:polygon draw:style-name="gr71" draw:text-style-name="P6" draw:layer="layout" svg:width="0.008cm" svg:height="0.415cm" svg:x="13.394cm" svg:y="18.948cm" svg:viewBox="0 0 9 416" draw:points="0,416 9,416 9,0 0,0">
          <text:p/>
        </draw:polygon>
        <draw:polygon draw:style-name="gr71" draw:text-style-name="P6" draw:layer="layout" svg:width="0.008cm" svg:height="0.415cm" svg:x="14.503cm" svg:y="18.948cm" svg:viewBox="0 0 9 416" draw:points="0,416 9,416 9,0 0,0">
          <text:p/>
        </draw:polygon>
        <draw:frame draw:style-name="gr11" draw:text-style-name="P2" draw:layer="layout" svg:width="0.321cm" svg:height="0.357cm" svg:x="13.454cm" svg:y="18.958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337cm" svg:y="19.42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7.891cm" svg:y="19.42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87cm" svg:y="19.42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9.483cm" svg:y="19.42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0.279cm" svg:y="19.42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701cm" svg:y="19.42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2.336cm" svg:y="19.424cm">
          <draw:text-box>
            <text:p text:style-name="P1"><text:span text:style-name="T1"><text:s/></text:span></text:p>
          </draw:text-box>
        </draw:frame>
        <draw:polygon draw:style-name="gr71" draw:text-style-name="P6" draw:layer="layout" svg:width="0.009cm" svg:height="0.051cm" svg:x="2.277cm" svg:y="19.363cm" svg:viewBox="0 0 10 52" draw:points="0,52 10,52 10,0 0,0">
          <text:p/>
        </draw:polygon>
        <draw:polygon draw:style-name="gr71" draw:text-style-name="P6" draw:layer="layout" svg:width="5.545cm" svg:height="0.008cm" svg:x="2.286cm" svg:y="19.363cm" svg:viewBox="0 0 5546 9" draw:points="0,9 5546,9 5546,0 0,0">
          <text:p/>
        </draw:polygon>
        <draw:polygon draw:style-name="gr71" draw:text-style-name="P6" draw:layer="layout" svg:width="0.009cm" svg:height="0.051cm" svg:x="7.831cm" svg:y="19.363cm" svg:viewBox="0 0 10 52" draw:points="0,52 10,52 10,0 0,0">
          <text:p/>
        </draw:polygon>
        <draw:polygon draw:style-name="gr71" draw:text-style-name="P6" draw:layer="layout" svg:width="0.787cm" svg:height="0.008cm" svg:x="7.84cm" svg:y="19.363cm" svg:viewBox="0 0 788 9" draw:points="0,9 788,9 788,0 0,0">
          <text:p/>
        </draw:polygon>
        <draw:polygon draw:style-name="gr71" draw:text-style-name="P6" draw:layer="layout" svg:width="0.01cm" svg:height="0.051cm" svg:x="8.627cm" svg:y="19.363cm" svg:viewBox="0 0 11 52" draw:points="0,52 11,52 11,0 0,0">
          <text:p/>
        </draw:polygon>
        <draw:polygon draw:style-name="gr71" draw:text-style-name="P6" draw:layer="layout" svg:width="0.787cm" svg:height="0.008cm" svg:x="8.636cm" svg:y="19.363cm" svg:viewBox="0 0 788 9" draw:points="0,9 788,9 788,0 0,0">
          <text:p/>
        </draw:polygon>
        <draw:polygon draw:style-name="gr71" draw:text-style-name="P6" draw:layer="layout" svg:width="0.008cm" svg:height="0.051cm" svg:x="9.423cm" svg:y="19.363cm" svg:viewBox="0 0 9 52" draw:points="0,52 9,52 9,0 0,0">
          <text:p/>
        </draw:polygon>
        <draw:polygon draw:style-name="gr71" draw:text-style-name="P6" draw:layer="layout" svg:width="0.788cm" svg:height="0.008cm" svg:x="9.431cm" svg:y="19.363cm" svg:viewBox="0 0 789 9" draw:points="0,9 789,9 789,0 0,0">
          <text:p/>
        </draw:polygon>
        <draw:polygon draw:style-name="gr71" draw:text-style-name="P6" draw:layer="layout" svg:width="0.008cm" svg:height="0.051cm" svg:x="10.219cm" svg:y="19.363cm" svg:viewBox="0 0 9 52" draw:points="0,52 9,52 9,0 0,0">
          <text:p/>
        </draw:polygon>
        <draw:polygon draw:style-name="gr71" draw:text-style-name="P6" draw:layer="layout" svg:width="1.414cm" svg:height="0.008cm" svg:x="10.227cm" svg:y="19.363cm" svg:viewBox="0 0 1415 9" draw:points="0,9 1415,9 1415,0 0,0">
          <text:p/>
        </draw:polygon>
        <draw:polygon draw:style-name="gr71" draw:text-style-name="P6" draw:layer="layout" svg:width="0.009cm" svg:height="0.051cm" svg:x="11.641cm" svg:y="19.363cm" svg:viewBox="0 0 10 52" draw:points="0,52 10,52 10,0 0,0">
          <text:p/>
        </draw:polygon>
        <draw:polygon draw:style-name="gr71" draw:text-style-name="P6" draw:layer="layout" svg:width="0.626cm" svg:height="0.008cm" svg:x="11.65cm" svg:y="19.363cm" svg:viewBox="0 0 627 9" draw:points="0,9 627,9 627,0 0,0">
          <text:p/>
        </draw:polygon>
        <draw:polygon draw:style-name="gr71" draw:text-style-name="P6" draw:layer="layout" svg:width="0.009cm" svg:height="0.051cm" svg:x="12.276cm" svg:y="19.363cm" svg:viewBox="0 0 10 52" draw:points="0,52 10,52 10,0 0,0">
          <text:p/>
        </draw:polygon>
        <draw:polygon draw:style-name="gr71" draw:text-style-name="P6" draw:layer="layout" svg:width="1.109cm" svg:height="0.008cm" svg:x="12.285cm" svg:y="19.363cm" svg:viewBox="0 0 1110 9" draw:points="0,9 1110,9 1110,0 0,0">
          <text:p/>
        </draw:polygon>
        <draw:polygon draw:style-name="gr71" draw:text-style-name="P6" draw:layer="layout" svg:width="0.008cm" svg:height="0.051cm" svg:x="13.394cm" svg:y="19.363cm" svg:viewBox="0 0 9 52" draw:points="0,52 9,52 9,0 0,0">
          <text:p/>
        </draw:polygon>
        <draw:polygon draw:style-name="gr71" draw:text-style-name="P6" draw:layer="layout" svg:width="1.101cm" svg:height="0.008cm" svg:x="13.402cm" svg:y="19.363cm" svg:viewBox="0 0 1102 9" draw:points="0,9 1102,9 1102,0 0,0">
          <text:p/>
        </draw:polygon>
        <draw:polygon draw:style-name="gr71" draw:text-style-name="P6" draw:layer="layout" svg:width="0.008cm" svg:height="0.051cm" svg:x="14.503cm" svg:y="19.363cm" svg:viewBox="0 0 9 52" draw:points="0,52 9,52 9,0 0,0">
          <text:p/>
        </draw:polygon>
        <draw:polygon draw:style-name="gr71" draw:text-style-name="P6" draw:layer="layout" svg:width="0.009cm" svg:height="0.414cm" svg:x="2.277cm" svg:y="19.414cm" svg:viewBox="0 0 10 415" draw:points="0,415 10,415 10,0 0,0">
          <text:p/>
        </draw:polygon>
        <draw:polygon draw:style-name="gr71" draw:text-style-name="P6" draw:layer="layout" svg:width="0.009cm" svg:height="0.414cm" svg:x="7.831cm" svg:y="19.414cm" svg:viewBox="0 0 10 415" draw:points="0,415 10,415 10,0 0,0">
          <text:p/>
        </draw:polygon>
        <draw:polygon draw:style-name="gr71" draw:text-style-name="P6" draw:layer="layout" svg:width="0.01cm" svg:height="0.414cm" svg:x="8.627cm" svg:y="19.414cm" svg:viewBox="0 0 11 415" draw:points="0,415 11,415 11,0 0,0">
          <text:p/>
        </draw:polygon>
        <draw:polygon draw:style-name="gr71" draw:text-style-name="P6" draw:layer="layout" svg:width="0.008cm" svg:height="0.414cm" svg:x="9.423cm" svg:y="19.414cm" svg:viewBox="0 0 9 415" draw:points="0,415 9,415 9,0 0,0">
          <text:p/>
        </draw:polygon>
        <draw:polygon draw:style-name="gr71" draw:text-style-name="P6" draw:layer="layout" svg:width="0.008cm" svg:height="0.414cm" svg:x="10.219cm" svg:y="19.414cm" svg:viewBox="0 0 9 415" draw:points="0,415 9,415 9,0 0,0">
          <text:p/>
        </draw:polygon>
        <draw:polygon draw:style-name="gr71" draw:text-style-name="P6" draw:layer="layout" svg:width="0.009cm" svg:height="0.414cm" svg:x="11.641cm" svg:y="19.414cm" svg:viewBox="0 0 10 415" draw:points="0,415 10,415 10,0 0,0">
          <text:p/>
        </draw:polygon>
        <draw:polygon draw:style-name="gr71" draw:text-style-name="P6" draw:layer="layout" svg:width="0.009cm" svg:height="0.414cm" svg:x="12.276cm" svg:y="19.414cm" svg:viewBox="0 0 10 415" draw:points="0,415 10,415 10,0 0,0">
          <text:p/>
        </draw:polygon>
        <draw:polygon draw:style-name="gr71" draw:text-style-name="P6" draw:layer="layout" svg:width="0.008cm" svg:height="0.414cm" svg:x="13.394cm" svg:y="19.414cm" svg:viewBox="0 0 9 415" draw:points="0,415 9,415 9,0 0,0">
          <text:p/>
        </draw:polygon>
        <draw:polygon draw:style-name="gr71" draw:text-style-name="P6" draw:layer="layout" svg:width="0.008cm" svg:height="0.414cm" svg:x="14.503cm" svg:y="19.414cm" svg:viewBox="0 0 9 415" draw:points="0,415 9,415 9,0 0,0">
          <text:p/>
        </draw:polygon>
        <draw:frame draw:style-name="gr11" draw:text-style-name="P2" draw:layer="layout" svg:width="0.321cm" svg:height="0.357cm" svg:x="13.454cm" svg:y="19.42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337cm" svg:y="19.88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7.891cm" svg:y="19.88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87cm" svg:y="19.88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9.483cm" svg:y="19.88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0.279cm" svg:y="19.88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1.701cm" svg:y="19.88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2.336cm" svg:y="19.889cm">
          <draw:text-box>
            <text:p text:style-name="P1"><text:span text:style-name="T1"><text:s/></text:span></text:p>
          </draw:text-box>
        </draw:frame>
        <draw:polygon draw:style-name="gr71" draw:text-style-name="P6" draw:layer="layout" svg:width="0.009cm" svg:height="0.051cm" svg:x="2.277cm" svg:y="19.828cm" svg:viewBox="0 0 10 52" draw:points="0,52 10,52 10,0 0,0">
          <text:p/>
        </draw:polygon>
        <draw:polygon draw:style-name="gr71" draw:text-style-name="P6" draw:layer="layout" svg:width="5.545cm" svg:height="0.009cm" svg:x="2.286cm" svg:y="19.828cm" svg:viewBox="0 0 5546 10" draw:points="0,10 5546,10 5546,0 0,0">
          <text:p/>
        </draw:polygon>
        <draw:polygon draw:style-name="gr71" draw:text-style-name="P6" draw:layer="layout" svg:width="0.009cm" svg:height="0.051cm" svg:x="7.831cm" svg:y="19.828cm" svg:viewBox="0 0 10 52" draw:points="0,52 10,52 10,0 0,0">
          <text:p/>
        </draw:polygon>
        <draw:polygon draw:style-name="gr71" draw:text-style-name="P6" draw:layer="layout" svg:width="0.787cm" svg:height="0.009cm" svg:x="7.84cm" svg:y="19.828cm" svg:viewBox="0 0 788 10" draw:points="0,10 788,10 788,0 0,0">
          <text:p/>
        </draw:polygon>
        <draw:polygon draw:style-name="gr71" draw:text-style-name="P6" draw:layer="layout" svg:width="0.01cm" svg:height="0.051cm" svg:x="8.627cm" svg:y="19.828cm" svg:viewBox="0 0 11 52" draw:points="0,52 11,52 11,0 0,0">
          <text:p/>
        </draw:polygon>
        <draw:polygon draw:style-name="gr71" draw:text-style-name="P6" draw:layer="layout" svg:width="0.787cm" svg:height="0.009cm" svg:x="8.636cm" svg:y="19.828cm" svg:viewBox="0 0 788 10" draw:points="0,10 788,10 788,0 0,0">
          <text:p/>
        </draw:polygon>
        <draw:polygon draw:style-name="gr71" draw:text-style-name="P6" draw:layer="layout" svg:width="0.008cm" svg:height="0.051cm" svg:x="9.423cm" svg:y="19.828cm" svg:viewBox="0 0 9 52" draw:points="0,52 9,52 9,0 0,0">
          <text:p/>
        </draw:polygon>
        <draw:polygon draw:style-name="gr71" draw:text-style-name="P6" draw:layer="layout" svg:width="0.788cm" svg:height="0.009cm" svg:x="9.431cm" svg:y="19.828cm" svg:viewBox="0 0 789 10" draw:points="0,10 789,10 789,0 0,0">
          <text:p/>
        </draw:polygon>
        <draw:polygon draw:style-name="gr71" draw:text-style-name="P6" draw:layer="layout" svg:width="0.008cm" svg:height="0.051cm" svg:x="10.219cm" svg:y="19.828cm" svg:viewBox="0 0 9 52" draw:points="0,52 9,52 9,0 0,0">
          <text:p/>
        </draw:polygon>
        <draw:polygon draw:style-name="gr71" draw:text-style-name="P6" draw:layer="layout" svg:width="1.414cm" svg:height="0.009cm" svg:x="10.227cm" svg:y="19.828cm" svg:viewBox="0 0 1415 10" draw:points="0,10 1415,10 1415,0 0,0">
          <text:p/>
        </draw:polygon>
        <draw:polygon draw:style-name="gr71" draw:text-style-name="P6" draw:layer="layout" svg:width="0.009cm" svg:height="0.051cm" svg:x="11.641cm" svg:y="19.828cm" svg:viewBox="0 0 10 52" draw:points="0,52 10,52 10,0 0,0">
          <text:p/>
        </draw:polygon>
        <draw:polygon draw:style-name="gr71" draw:text-style-name="P6" draw:layer="layout" svg:width="0.626cm" svg:height="0.009cm" svg:x="11.65cm" svg:y="19.828cm" svg:viewBox="0 0 627 10" draw:points="0,10 627,10 627,0 0,0">
          <text:p/>
        </draw:polygon>
        <draw:polygon draw:style-name="gr71" draw:text-style-name="P6" draw:layer="layout" svg:width="0.009cm" svg:height="0.051cm" svg:x="12.276cm" svg:y="19.828cm" svg:viewBox="0 0 10 52" draw:points="0,52 10,52 10,0 0,0">
          <text:p/>
        </draw:polygon>
        <draw:polygon draw:style-name="gr71" draw:text-style-name="P6" draw:layer="layout" svg:width="1.109cm" svg:height="0.009cm" svg:x="12.285cm" svg:y="19.828cm" svg:viewBox="0 0 1110 10" draw:points="0,10 1110,10 1110,0 0,0">
          <text:p/>
        </draw:polygon>
        <draw:polygon draw:style-name="gr71" draw:text-style-name="P6" draw:layer="layout" svg:width="0.008cm" svg:height="0.051cm" svg:x="13.394cm" svg:y="19.828cm" svg:viewBox="0 0 9 52" draw:points="0,52 9,52 9,0 0,0">
          <text:p/>
        </draw:polygon>
        <draw:polygon draw:style-name="gr71" draw:text-style-name="P6" draw:layer="layout" svg:width="1.101cm" svg:height="0.009cm" svg:x="13.402cm" svg:y="19.828cm" svg:viewBox="0 0 1102 10" draw:points="0,10 1102,10 1102,0 0,0">
          <text:p/>
        </draw:polygon>
        <draw:polygon draw:style-name="gr71" draw:text-style-name="P6" draw:layer="layout" svg:width="0.008cm" svg:height="0.051cm" svg:x="14.503cm" svg:y="19.828cm" svg:viewBox="0 0 9 52" draw:points="0,52 9,52 9,0 0,0">
          <text:p/>
        </draw:polygon>
        <draw:polygon draw:style-name="gr71" draw:text-style-name="P6" draw:layer="layout" svg:width="0.009cm" svg:height="0.415cm" svg:x="2.277cm" svg:y="19.879cm" svg:viewBox="0 0 10 416" draw:points="0,416 10,416 10,0 0,0">
          <text:p/>
        </draw:polygon>
        <draw:polygon draw:style-name="gr71" draw:text-style-name="P6" draw:layer="layout" svg:width="0.009cm" svg:height="0.415cm" svg:x="7.831cm" svg:y="19.879cm" svg:viewBox="0 0 10 416" draw:points="0,416 10,416 10,0 0,0">
          <text:p/>
        </draw:polygon>
        <draw:polygon draw:style-name="gr71" draw:text-style-name="P6" draw:layer="layout" svg:width="0.01cm" svg:height="0.415cm" svg:x="8.627cm" svg:y="19.879cm" svg:viewBox="0 0 11 416" draw:points="0,416 11,416 11,0 0,0">
          <text:p/>
        </draw:polygon>
        <draw:polygon draw:style-name="gr71" draw:text-style-name="P6" draw:layer="layout" svg:width="0.008cm" svg:height="0.415cm" svg:x="9.423cm" svg:y="19.879cm" svg:viewBox="0 0 9 416" draw:points="0,416 9,416 9,0 0,0">
          <text:p/>
        </draw:polygon>
        <draw:polygon draw:style-name="gr71" draw:text-style-name="P6" draw:layer="layout" svg:width="0.008cm" svg:height="0.415cm" svg:x="10.219cm" svg:y="19.879cm" svg:viewBox="0 0 9 416" draw:points="0,416 9,416 9,0 0,0">
          <text:p/>
        </draw:polygon>
        <draw:polygon draw:style-name="gr71" draw:text-style-name="P6" draw:layer="layout" svg:width="0.009cm" svg:height="0.415cm" svg:x="11.641cm" svg:y="19.879cm" svg:viewBox="0 0 10 416" draw:points="0,416 10,416 10,0 0,0">
          <text:p/>
        </draw:polygon>
        <draw:polygon draw:style-name="gr71" draw:text-style-name="P6" draw:layer="layout" svg:width="0.009cm" svg:height="0.415cm" svg:x="12.276cm" svg:y="19.879cm" svg:viewBox="0 0 10 416" draw:points="0,416 10,416 10,0 0,0">
          <text:p/>
        </draw:polygon>
        <draw:polygon draw:style-name="gr71" draw:text-style-name="P6" draw:layer="layout" svg:width="0.008cm" svg:height="0.415cm" svg:x="13.394cm" svg:y="19.879cm" svg:viewBox="0 0 9 416" draw:points="0,416 9,416 9,0 0,0">
          <text:p/>
        </draw:polygon>
        <draw:polygon draw:style-name="gr71" draw:text-style-name="P6" draw:layer="layout" svg:width="0.008cm" svg:height="0.415cm" svg:x="14.503cm" svg:y="19.879cm" svg:viewBox="0 0 9 416" draw:points="0,416 9,416 9,0 0,0">
          <text:p/>
        </draw:polygon>
        <draw:frame draw:style-name="gr11" draw:text-style-name="P2" draw:layer="layout" svg:width="0.321cm" svg:height="0.357cm" svg:x="13.454cm" svg:y="19.88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337cm" svg:y="20.36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7.891cm" svg:y="20.36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8.687cm" svg:y="20.36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9.483cm" svg:y="20.364cm">
          <draw:text-box>
            <text:p text:style-name="P1"><text:span text:style-name="T1"><text:s/></text:span></text:p>
          </draw:text-box>
        </draw:frame>
        <draw:frame draw:style-name="gr72" draw:text-style-name="P7" draw:layer="layout" svg:width="0.211cm" svg:height="0.239cm" svg:x="10.279cm" svg:y="20.36cm">
          <draw:text-box>
            <text:p text:style-name="P1"><text:span text:style-name="T5">s </text:span></text:p>
          </draw:text-box>
        </draw:frame>
        <draw:frame draw:style-name="gr73" draw:text-style-name="P7" draw:layer="layout" svg:width="0.218cm" svg:height="0.239cm" svg:x="10.914cm" svg:y="20.36cm">
          <draw:text-box>
            <text:p text:style-name="P1"><text:span text:style-name="T5">m </text:span></text:p>
          </draw:text-box>
        </draw:frame>
        <draw:frame draw:style-name="gr72" draw:text-style-name="P7" draw:layer="layout" svg:width="0.211cm" svg:height="0.239cm" svg:x="11.549cm" svg:y="20.36cm">
          <draw:text-box>
            <text:p text:style-name="P1"><text:span text:style-name="T5">l </text:span></text:p>
          </draw:text-box>
        </draw:frame>
        <draw:frame draw:style-name="gr11" draw:text-style-name="P2" draw:layer="layout" svg:width="0.321cm" svg:height="0.357cm" svg:x="12.336cm" svg:y="20.364cm">
          <draw:text-box>
            <text:p text:style-name="P1"><text:span text:style-name="T1"><text:s/></text:span></text:p>
          </draw:text-box>
        </draw:frame>
        <draw:polygon draw:style-name="gr71" draw:text-style-name="P6" draw:layer="layout" svg:width="0.009cm" svg:height="0.051cm" svg:x="2.277cm" svg:y="20.294cm" svg:viewBox="0 0 10 52" draw:points="0,52 10,52 10,0 0,0">
          <text:p/>
        </draw:polygon>
        <draw:polygon draw:style-name="gr71" draw:text-style-name="P6" draw:layer="layout" svg:width="5.545cm" svg:height="0.009cm" svg:x="2.286cm" svg:y="20.294cm" svg:viewBox="0 0 5546 10" draw:points="0,10 5546,10 5546,0 0,0">
          <text:p/>
        </draw:polygon>
        <draw:polygon draw:style-name="gr71" draw:text-style-name="P6" draw:layer="layout" svg:width="0.009cm" svg:height="0.051cm" svg:x="7.831cm" svg:y="20.294cm" svg:viewBox="0 0 10 52" draw:points="0,52 10,52 10,0 0,0">
          <text:p/>
        </draw:polygon>
        <draw:polygon draw:style-name="gr71" draw:text-style-name="P6" draw:layer="layout" svg:width="0.787cm" svg:height="0.009cm" svg:x="7.84cm" svg:y="20.294cm" svg:viewBox="0 0 788 10" draw:points="0,10 788,10 788,0 0,0">
          <text:p/>
        </draw:polygon>
        <draw:polygon draw:style-name="gr71" draw:text-style-name="P6" draw:layer="layout" svg:width="0.01cm" svg:height="0.051cm" svg:x="8.627cm" svg:y="20.294cm" svg:viewBox="0 0 11 52" draw:points="0,52 11,52 11,0 0,0">
          <text:p/>
        </draw:polygon>
        <draw:polygon draw:style-name="gr71" draw:text-style-name="P6" draw:layer="layout" svg:width="0.787cm" svg:height="0.009cm" svg:x="8.636cm" svg:y="20.294cm" svg:viewBox="0 0 788 10" draw:points="0,10 788,10 788,0 0,0">
          <text:p/>
        </draw:polygon>
        <draw:polygon draw:style-name="gr71" draw:text-style-name="P6" draw:layer="layout" svg:width="0.008cm" svg:height="0.051cm" svg:x="9.423cm" svg:y="20.294cm" svg:viewBox="0 0 9 52" draw:points="0,52 9,52 9,0 0,0">
          <text:p/>
        </draw:polygon>
        <draw:polygon draw:style-name="gr71" draw:text-style-name="P6" draw:layer="layout" svg:width="0.788cm" svg:height="0.009cm" svg:x="9.431cm" svg:y="20.294cm" svg:viewBox="0 0 789 10" draw:points="0,10 789,10 789,0 0,0">
          <text:p/>
        </draw:polygon>
        <draw:polygon draw:style-name="gr71" draw:text-style-name="P6" draw:layer="layout" svg:width="0.008cm" svg:height="0.051cm" svg:x="10.219cm" svg:y="20.294cm" svg:viewBox="0 0 9 52" draw:points="0,52 9,52 9,0 0,0">
          <text:p/>
        </draw:polygon>
        <draw:polygon draw:style-name="gr71" draw:text-style-name="P6" draw:layer="layout" svg:width="0.627cm" svg:height="0.009cm" svg:x="10.227cm" svg:y="20.294cm" svg:viewBox="0 0 628 10" draw:points="0,10 628,10 628,0 0,0">
          <text:p/>
        </draw:polygon>
        <draw:polygon draw:style-name="gr71" draw:text-style-name="P6" draw:layer="layout" svg:width="0.008cm" svg:height="0.042cm" svg:x="10.854cm" svg:y="20.303cm" svg:viewBox="0 0 9 43" draw:points="0,43 9,43 9,0 0,0">
          <text:p/>
        </draw:polygon>
        <draw:polygon draw:style-name="gr71" draw:text-style-name="P6" draw:layer="layout" svg:width="0.008cm" svg:height="0.009cm" svg:x="10.854cm" svg:y="20.294cm" svg:viewBox="0 0 9 10" draw:points="0,10 9,10 9,0 0,0">
          <text:p/>
        </draw:polygon>
        <draw:polygon draw:style-name="gr71" draw:text-style-name="P6" draw:layer="layout" svg:width="0.627cm" svg:height="0.009cm" svg:x="10.862cm" svg:y="20.294cm" svg:viewBox="0 0 628 10" draw:points="0,10 628,10 628,0 0,0">
          <text:p/>
        </draw:polygon>
        <draw:polygon draw:style-name="gr71" draw:text-style-name="P6" draw:layer="layout" svg:width="0.008cm" svg:height="0.042cm" svg:x="11.489cm" svg:y="20.303cm" svg:viewBox="0 0 9 43" draw:points="0,43 9,43 9,0 0,0">
          <text:p/>
        </draw:polygon>
        <draw:polygon draw:style-name="gr71" draw:text-style-name="P6" draw:layer="layout" svg:width="0.008cm" svg:height="0.009cm" svg:x="11.489cm" svg:y="20.294cm" svg:viewBox="0 0 9 10" draw:points="0,10 9,10 9,0 0,0">
          <text:p/>
        </draw:polygon>
        <draw:polygon draw:style-name="gr71" draw:text-style-name="P6" draw:layer="layout" svg:width="0.144cm" svg:height="0.009cm" svg:x="11.497cm" svg:y="20.294cm" svg:viewBox="0 0 145 10" draw:points="0,10 145,10 145,0 0,0">
          <text:p/>
        </draw:polygon>
        <draw:polygon draw:style-name="gr71" draw:text-style-name="P6" draw:layer="layout" svg:width="0.009cm" svg:height="0.009cm" svg:x="11.641cm" svg:y="20.294cm" svg:viewBox="0 0 10 10" draw:points="0,10 10,10 10,0 0,0">
          <text:p/>
        </draw:polygon>
        <draw:polygon draw:style-name="gr71" draw:text-style-name="P6" draw:layer="layout" svg:width="0.626cm" svg:height="0.009cm" svg:x="11.65cm" svg:y="20.294cm" svg:viewBox="0 0 627 10" draw:points="0,10 627,10 627,0 0,0">
          <text:p/>
        </draw:polygon>
        <draw:polygon draw:style-name="gr71" draw:text-style-name="P6" draw:layer="layout" svg:width="0.009cm" svg:height="0.051cm" svg:x="12.276cm" svg:y="20.294cm" svg:viewBox="0 0 10 52" draw:points="0,52 10,52 10,0 0,0">
          <text:p/>
        </draw:polygon>
        <draw:polygon draw:style-name="gr71" draw:text-style-name="P6" draw:layer="layout" svg:width="1.109cm" svg:height="0.009cm" svg:x="12.285cm" svg:y="20.294cm" svg:viewBox="0 0 1110 10" draw:points="0,10 1110,10 1110,0 0,0">
          <text:p/>
        </draw:polygon>
        <draw:polygon draw:style-name="gr71" draw:text-style-name="P6" draw:layer="layout" svg:width="0.008cm" svg:height="0.051cm" svg:x="13.394cm" svg:y="20.294cm" svg:viewBox="0 0 9 52" draw:points="0,52 9,52 9,0 0,0">
          <text:p/>
        </draw:polygon>
        <draw:polygon draw:style-name="gr71" draw:text-style-name="P6" draw:layer="layout" svg:width="1.101cm" svg:height="0.009cm" svg:x="13.402cm" svg:y="20.294cm" svg:viewBox="0 0 1102 10" draw:points="0,10 1102,10 1102,0 0,0">
          <text:p/>
        </draw:polygon>
        <draw:polygon draw:style-name="gr71" draw:text-style-name="P6" draw:layer="layout" svg:width="0.008cm" svg:height="0.051cm" svg:x="14.503cm" svg:y="20.294cm" svg:viewBox="0 0 9 52" draw:points="0,52 9,52 9,0 0,0">
          <text:p/>
        </draw:polygon>
        <draw:polygon draw:style-name="gr71" draw:text-style-name="P6" draw:layer="layout" svg:width="0.009cm" svg:height="0.423cm" svg:x="2.277cm" svg:y="20.345cm" svg:viewBox="0 0 10 424" draw:points="0,424 10,424 10,0 0,0">
          <text:p/>
        </draw:polygon>
        <draw:polygon draw:style-name="gr71" draw:text-style-name="P6" draw:layer="layout" svg:width="0.009cm" svg:height="0.009cm" svg:x="2.277cm" svg:y="20.768cm" svg:viewBox="0 0 10 10" draw:points="0,10 10,10 10,0 0,0">
          <text:p/>
        </draw:polygon>
        <draw:polygon draw:style-name="gr71" draw:text-style-name="P6" draw:layer="layout" svg:width="0.009cm" svg:height="0.009cm" svg:x="2.277cm" svg:y="20.768cm" svg:viewBox="0 0 10 10" draw:points="0,10 10,10 10,0 0,0">
          <text:p/>
        </draw:polygon>
        <draw:polygon draw:style-name="gr71" draw:text-style-name="P6" draw:layer="layout" svg:width="5.545cm" svg:height="0.009cm" svg:x="2.286cm" svg:y="20.768cm" svg:viewBox="0 0 5546 10" draw:points="0,10 5546,10 5546,0 0,0">
          <text:p/>
        </draw:polygon>
        <draw:polygon draw:style-name="gr71" draw:text-style-name="P6" draw:layer="layout" svg:width="0.009cm" svg:height="0.423cm" svg:x="7.831cm" svg:y="20.345cm" svg:viewBox="0 0 10 424" draw:points="0,424 10,424 10,0 0,0">
          <text:p/>
        </draw:polygon>
        <draw:polygon draw:style-name="gr71" draw:text-style-name="P6" draw:layer="layout" svg:width="0.009cm" svg:height="0.009cm" svg:x="7.831cm" svg:y="20.768cm" svg:viewBox="0 0 10 10" draw:points="0,10 10,10 10,0 0,0">
          <text:p/>
        </draw:polygon>
        <draw:polygon draw:style-name="gr71" draw:text-style-name="P6" draw:layer="layout" svg:width="0.787cm" svg:height="0.009cm" svg:x="7.84cm" svg:y="20.768cm" svg:viewBox="0 0 788 10" draw:points="0,10 788,10 788,0 0,0">
          <text:p/>
        </draw:polygon>
        <draw:polygon draw:style-name="gr71" draw:text-style-name="P6" draw:layer="layout" svg:width="0.01cm" svg:height="0.423cm" svg:x="8.627cm" svg:y="20.345cm" svg:viewBox="0 0 11 424" draw:points="0,424 11,424 11,0 0,0">
          <text:p/>
        </draw:polygon>
        <draw:polygon draw:style-name="gr71" draw:text-style-name="P6" draw:layer="layout" svg:width="0.01cm" svg:height="0.009cm" svg:x="8.627cm" svg:y="20.768cm" svg:viewBox="0 0 11 10" draw:points="0,10 11,10 11,0 0,0">
          <text:p/>
        </draw:polygon>
        <draw:polygon draw:style-name="gr71" draw:text-style-name="P6" draw:layer="layout" svg:width="0.787cm" svg:height="0.009cm" svg:x="8.636cm" svg:y="20.768cm" svg:viewBox="0 0 788 10" draw:points="0,10 788,10 788,0 0,0">
          <text:p/>
        </draw:polygon>
        <draw:polygon draw:style-name="gr71" draw:text-style-name="P6" draw:layer="layout" svg:width="0.008cm" svg:height="0.423cm" svg:x="9.423cm" svg:y="20.345cm" svg:viewBox="0 0 9 424" draw:points="0,424 9,424 9,0 0,0">
          <text:p/>
        </draw:polygon>
        <draw:polygon draw:style-name="gr71" draw:text-style-name="P6" draw:layer="layout" svg:width="0.008cm" svg:height="0.009cm" svg:x="9.423cm" svg:y="20.768cm" svg:viewBox="0 0 9 10" draw:points="0,10 9,10 9,0 0,0">
          <text:p/>
        </draw:polygon>
        <draw:polygon draw:style-name="gr71" draw:text-style-name="P6" draw:layer="layout" svg:width="0.788cm" svg:height="0.009cm" svg:x="9.431cm" svg:y="20.768cm" svg:viewBox="0 0 789 10" draw:points="0,10 789,10 789,0 0,0">
          <text:p/>
        </draw:polygon>
        <draw:polygon draw:style-name="gr71" draw:text-style-name="P6" draw:layer="layout" svg:width="0.008cm" svg:height="0.423cm" svg:x="10.219cm" svg:y="20.345cm" svg:viewBox="0 0 9 424" draw:points="0,424 9,424 9,0 0,0">
          <text:p/>
        </draw:polygon>
        <draw:polygon draw:style-name="gr71" draw:text-style-name="P6" draw:layer="layout" svg:width="0.008cm" svg:height="0.009cm" svg:x="10.219cm" svg:y="20.768cm" svg:viewBox="0 0 9 10" draw:points="0,10 9,10 9,0 0,0">
          <text:p/>
        </draw:polygon>
        <draw:polygon draw:style-name="gr71" draw:text-style-name="P6" draw:layer="layout" svg:width="0.627cm" svg:height="0.009cm" svg:x="10.227cm" svg:y="20.768cm" svg:viewBox="0 0 628 10" draw:points="0,10 628,10 628,0 0,0">
          <text:p/>
        </draw:polygon>
        <draw:polygon draw:style-name="gr71" draw:text-style-name="P6" draw:layer="layout" svg:width="0.008cm" svg:height="0.423cm" svg:x="10.854cm" svg:y="20.345cm" svg:viewBox="0 0 9 424" draw:points="0,424 9,424 9,0 0,0">
          <text:p/>
        </draw:polygon>
        <draw:polygon draw:style-name="gr71" draw:text-style-name="P6" draw:layer="layout" svg:width="0.008cm" svg:height="0.009cm" svg:x="10.854cm" svg:y="20.768cm" svg:viewBox="0 0 9 10" draw:points="0,10 9,10 9,0 0,0">
          <text:p/>
        </draw:polygon>
        <draw:polygon draw:style-name="gr71" draw:text-style-name="P6" draw:layer="layout" svg:width="0.627cm" svg:height="0.009cm" svg:x="10.862cm" svg:y="20.768cm" svg:viewBox="0 0 628 10" draw:points="0,10 628,10 628,0 0,0">
          <text:p/>
        </draw:polygon>
        <draw:polygon draw:style-name="gr71" draw:text-style-name="P6" draw:layer="layout" svg:width="0.008cm" svg:height="0.423cm" svg:x="11.489cm" svg:y="20.345cm" svg:viewBox="0 0 9 424" draw:points="0,424 9,424 9,0 0,0">
          <text:p/>
        </draw:polygon>
        <draw:polygon draw:style-name="gr71" draw:text-style-name="P6" draw:layer="layout" svg:width="0.008cm" svg:height="0.009cm" svg:x="11.489cm" svg:y="20.768cm" svg:viewBox="0 0 9 10" draw:points="0,10 9,10 9,0 0,0">
          <text:p/>
        </draw:polygon>
        <draw:polygon draw:style-name="gr71" draw:text-style-name="P6" draw:layer="layout" svg:width="0.779cm" svg:height="0.009cm" svg:x="11.497cm" svg:y="20.768cm" svg:viewBox="0 0 780 10" draw:points="0,10 780,10 780,0 0,0">
          <text:p/>
        </draw:polygon>
        <draw:polygon draw:style-name="gr71" draw:text-style-name="P6" draw:layer="layout" svg:width="0.009cm" svg:height="0.423cm" svg:x="12.276cm" svg:y="20.345cm" svg:viewBox="0 0 10 424" draw:points="0,424 10,424 10,0 0,0">
          <text:p/>
        </draw:polygon>
        <draw:polygon draw:style-name="gr71" draw:text-style-name="P6" draw:layer="layout" svg:width="0.009cm" svg:height="0.009cm" svg:x="12.276cm" svg:y="20.768cm" svg:viewBox="0 0 10 10" draw:points="0,10 10,10 10,0 0,0">
          <text:p/>
        </draw:polygon>
        <draw:polygon draw:style-name="gr71" draw:text-style-name="P6" draw:layer="layout" svg:width="1.109cm" svg:height="0.009cm" svg:x="12.285cm" svg:y="20.768cm" svg:viewBox="0 0 1110 10" draw:points="0,10 1110,10 1110,0 0,0">
          <text:p/>
        </draw:polygon>
        <draw:polygon draw:style-name="gr71" draw:text-style-name="P6" draw:layer="layout" svg:width="0.008cm" svg:height="0.423cm" svg:x="13.394cm" svg:y="20.345cm" svg:viewBox="0 0 9 424" draw:points="0,424 9,424 9,0 0,0">
          <text:p/>
        </draw:polygon>
        <draw:polygon draw:style-name="gr71" draw:text-style-name="P6" draw:layer="layout" svg:width="0.008cm" svg:height="0.009cm" svg:x="13.394cm" svg:y="20.768cm" svg:viewBox="0 0 9 10" draw:points="0,10 9,10 9,0 0,0">
          <text:p/>
        </draw:polygon>
        <draw:polygon draw:style-name="gr71" draw:text-style-name="P6" draw:layer="layout" svg:width="1.101cm" svg:height="0.009cm" svg:x="13.402cm" svg:y="20.768cm" svg:viewBox="0 0 1102 10" draw:points="0,10 1102,10 1102,0 0,0">
          <text:p/>
        </draw:polygon>
        <draw:polygon draw:style-name="gr71" draw:text-style-name="P6" draw:layer="layout" svg:width="0.008cm" svg:height="0.423cm" svg:x="14.503cm" svg:y="20.345cm" svg:viewBox="0 0 9 424" draw:points="0,424 9,424 9,0 0,0">
          <text:p/>
        </draw:polygon>
        <draw:polygon draw:style-name="gr71" draw:text-style-name="P6" draw:layer="layout" svg:width="0.008cm" svg:height="0.009cm" svg:x="14.503cm" svg:y="20.768cm" svg:viewBox="0 0 9 10" draw:points="0,10 9,10 9,0 0,0">
          <text:p/>
        </draw:polygon>
        <draw:polygon draw:style-name="gr71" draw:text-style-name="P6" draw:layer="layout" svg:width="0.008cm" svg:height="0.009cm" svg:x="14.503cm" svg:y="20.768cm" svg:viewBox="0 0 9 10" draw:points="0,10 9,10 9,0 0,0">
          <text:p/>
        </draw:polygon>
        <draw:frame draw:style-name="gr11" draw:text-style-name="P2" draw:layer="layout" svg:width="0.321cm" svg:height="0.357cm" svg:x="13.454cm" svg:y="20.364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5.155cm" svg:y="14.792cm">
          <draw:text-box>
            <text:p text:style-name="P1"><text:span text:style-name="T1"><text:s/></text:span></text:p>
          </draw:text-box>
        </draw:frame>
        <draw:frame draw:style-name="gr74" draw:text-style-name="P2" draw:layer="layout" svg:width="1.17cm" svg:height="0.357cm" svg:x="17.196cm" svg:y="15.165cm">
          <draw:text-box>
            <text:p text:style-name="P1"><text:span text:style-name="T1">F</text:span><text:span text:style-name="T1">a</text:span><text:span text:style-name="T1">m</text:span><text:span text:style-name="T1">i</text:span><text:span text:style-name="T1">l</text:span><text:span text:style-name="T1">i</text:span><text:span text:style-name="T1">a</text:span><text:span text:style-name="T1">r </text:span></text:p>
          </draw:text-box>
        </draw:frame>
        <draw:frame draw:style-name="gr75" draw:text-style-name="P2" draw:layer="layout" svg:width="5.171cm" svg:height="0.357cm" svg:x="15.155cm" svg:y="15.529cm">
          <draw:text-box>
            <text:p text:style-name="P1"><text:span text:style-name="T1">"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"</text:span><text:span text:style-name="T1"> </text:span></text:p>
          </draw:text-box>
        </draw:frame>
        <draw:frame draw:style-name="gr76" draw:text-style-name="P2" draw:layer="layout" svg:width="5.23cm" svg:height="0.357cm" svg:x="15.155cm" svg:y="15.89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h</text:span><text:span text:style-name="T1">p</text:span><text:span text:style-name="T1"> 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76" draw:text-style-name="P2" draw:layer="layout" svg:width="5.23cm" svg:height="0.357cm" svg:x="15.155cm" svg:y="16.25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76" draw:text-style-name="P2" draw:layer="layout" svg:width="5.23cm" svg:height="0.357cm" svg:x="15.155cm" svg:y="16.62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76" draw:text-style-name="P2" draw:layer="layout" svg:width="5.23cm" svg:height="0.357cm" svg:x="15.155cm" svg:y="16.98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15.155cm" svg:y="17.34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5.155cm" svg:y="17.713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15.155cm" svg:y="18.086cm">
          <draw:text-box>
            <text:p text:style-name="P1"><text:span text:style-name="T1"><text:s/></text:span></text:p>
          </draw:text-box>
        </draw:frame>
        <draw:frame draw:style-name="gr77" draw:text-style-name="P2" draw:layer="layout" svg:width="1.115cm" svg:height="0.357cm" svg:x="15.155cm" svg:y="18.45cm">
          <draw:text-box>
            <text:p text:style-name="P1"><text:span text:style-name="T1">missiles </text:span></text:p>
          </draw:text-box>
        </draw:frame>
        <draw:frame draw:style-name="gr78" draw:text-style-name="P2" draw:layer="layout" svg:width="0.51cm" svg:height="0.357cm" svg:x="19.6cm" svg:y="18.45cm">
          <draw:text-box>
            <text:p text:style-name="P1"><text:span text:style-name="T1">#</text:span><text:span text:style-name="T1">o</text:span><text:span text:style-name="T1">f </text:span></text:p>
          </draw:text-box>
        </draw:frame>
        <draw:frame draw:style-name="gr79" draw:text-style-name="P2" draw:layer="layout" svg:width="4.989cm" svg:height="0.357cm" svg:x="15.155cm" svg:y="18.81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79" draw:text-style-name="P2" draw:layer="layout" svg:width="4.989cm" svg:height="0.357cm" svg:x="15.155cm" svg:y="19.178cm">
          <draw:text-box>
            <text:p text:style-name="P1"><text:span text:style-name="T1">___________________________ ___ </text:span></text:p>
          </draw:text-box>
        </draw:frame>
        <draw:frame draw:style-name="gr79" draw:text-style-name="P2" draw:layer="layout" svg:width="4.989cm" svg:height="0.357cm" svg:x="15.155cm" svg:y="19.54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79" draw:text-style-name="P2" draw:layer="layout" svg:width="4.989cm" svg:height="0.357cm" svg:x="15.155cm" svg:y="19.90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79" draw:text-style-name="P2" draw:layer="layout" svg:width="4.989cm" svg:height="0.357cm" svg:x="15.155cm" svg:y="20.27cm">
          <draw:text-box>
            <text:p text:style-name="P1"><text:span text:style-name="T1">___________________________ ___ </text:span></text:p>
          </draw:text-box>
        </draw:frame>
        <draw:frame draw:style-name="gr11" draw:text-style-name="P2" draw:layer="layout" svg:width="0.321cm" svg:height="0.357cm" svg:x="15.155cm" svg:y="20.634cm">
          <draw:text-box>
            <text:p text:style-name="P1"><text:span text:style-name="T1"><text:s/></text:span></text:p>
          </draw:text-box>
        </draw:frame>
        <draw:frame draw:style-name="gr80" draw:text-style-name="P2" draw:layer="layout" svg:width="7.025cm" svg:height="0.357cm" svg:x="2.286cm" svg:y="21.151cm">
          <draw:text-box>
            <text:p text:style-name="P1"><text:span text:style-name="T1">**</text:span><text:span text:style-name="T1">Sp</text:span><text:span text:style-name="T1">eci</text:span><text:span text:style-name="T1">al </text:span><text:span text:style-name="T1">W</text:span><text:span text:style-name="T1">ea</text:span><text:span text:style-name="T1">po</text:span><text:span text:style-name="T1">n*</text:span><text:span text:style-name="T1">* </text:span><text:span text:style-name="T1">"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" </text:span></text:p>
          </draw:text-box>
        </draw:frame>
        <draw:frame draw:style-name="gr81" draw:text-style-name="P2" draw:layer="layout" svg:width="10.861cm" svg:height="0.357cm" svg:x="9.677cm" svg:y="21.151cm">
          <draw:text-box>
            <text:p text:style-name="P1"><text:span text:style-name="T1">___________________________________________________________________ </text:span></text:p>
          </draw:text-box>
        </draw:frame>
        <draw:frame draw:style-name="gr82" draw:text-style-name="P2" draw:layer="layout" svg:width="18.341cm" svg:height="0.357cm" svg:x="2.286cm" svg:y="21.515cm">
          <draw:text-box>
            <text:p text:style-name="P1"><text:span text:style-name="T1">_____________________________________________________ ____________________________________________________________ </text:span></text:p>
          </draw:text-box>
        </draw:frame>
        <draw:frame draw:style-name="gr11" draw:text-style-name="P2" draw:layer="layout" svg:width="0.321cm" svg:height="0.357cm" svg:x="2.286cm" svg:y="21.879cm">
          <draw:text-box>
            <text:p text:style-name="P1"><text:span text:style-name="T1"><text:s/></text:span></text:p>
          </draw:text-box>
        </draw:frame>
        <draw:frame draw:style-name="gr83" draw:text-style-name="P5" draw:layer="layout" svg:width="8.05cm" svg:height="0.395cm" svg:x="2.286cm" svg:y="22.247cm">
          <draw:text-box>
            <text:p text:style-name="P1"><text:span text:style-name="T4">Cleri</text:span><text:span text:style-name="T4">cal </text:span><text:span text:style-name="T4">Turn</text:span><text:span text:style-name="T4">ing <text:s text:c="3"/></text:span><text:span text:style-name="T4"><text:s text:c="9"/></text:span><text:span text:style-name="T4"><text:s text:c="9"/></text:span><text:span text:style-name="T4"><text:s text:c="9"/></text:span><text:span text:style-name="T4"><text:s text:c="9"/></text:span><text:span text:style-name="T4"><text:s text:c="9"/></text:span><text:span text:style-name="T4"><text:s text:c="9"/></text:span><text:span text:style-name="T4"><text:s text:c="6"/></text:span></text:p>
          </draw:text-box>
        </draw:frame>
        <draw:frame draw:style-name="gr84" draw:text-style-name="P2" draw:layer="layout" svg:width="3.423cm" svg:height="0.357cm" svg:x="10.473cm" svg:y="22.277cm">
          <draw:text-box>
            <text:p text:style-name="P1"><text:span text:style-name="T1">Spells Castable per level: <text:s/></text:span></text:p>
          </draw:text-box>
        </draw:frame>
        <draw:frame draw:style-name="gr85" draw:text-style-name="P2" draw:layer="layout" svg:width="6.195cm" svg:height="0.357cm" svg:x="14.283cm" svg:y="22.277cm">
          <draw:text-box>
            <text:p text:style-name="P1"><text:span text:style-name="T1">1____ 2____ 3____ 4____ 5____ 6____ 7____ </text:span></text:p>
          </draw:text-box>
        </draw:frame>
        <draw:frame draw:style-name="gr86" draw:text-style-name="P8" draw:layer="layout" svg:width="16.461cm" svg:height="0.31cm" svg:x="2.286cm" svg:y="22.653cm">
          <draw:text-box>
            <text:p text:style-name="P1"><text:span text:style-name="T6">s</text:span><text:span text:style-name="T6">k</text:span><text:span text:style-name="T6">e</text:span><text:span text:style-name="T6">l</text:span><text:span text:style-name="T6">e</text:span><text:span text:style-name="T6">t</text:span><text:span text:style-name="T6">o</text:span><text:span text:style-name="T6">n</text:span><text:span text:style-name="T6">_</text:span><text:span text:style-name="T6">_</text:span><text:span text:style-name="T6">_</text:span><text:span text:style-name="T6"> <text:s/></text:span><text:span text:style-name="T6"><text:s text:c="2"/></text:span><text:span text:style-name="T6">z</text:span><text:span text:style-name="T6">o</text:span><text:span text:style-name="T6">m</text:span><text:span text:style-name="T6">b</text:span><text:span text:style-name="T6">i</text:span><text:span text:style-name="T6">e</text:span><text:span text:style-name="T6">_</text:span><text:span text:style-name="T6">_</text:span><text:span text:style-name="T6">_</text:span><text:span text:style-name="T6"> <text:s/></text:span><text:span text:style-name="T6"><text:s text:c="2"/></text:span><text:span text:style-name="T6">g</text:span><text:span text:style-name="T6">h</text:span><text:span text:style-name="T6">o</text:span><text:span text:style-name="T6">u</text:span><text:span text:style-name="T6">l</text:span><text:span text:style-name="T6">_</text:span><text:span text:style-name="T6">_</text:span><text:span text:style-name="T6">_</text:span><text:span text:style-name="T6"> <text:s/></text:span><text:span text:style-name="T6"><text:s text:c="2"/></text:span><text:span text:style-name="T6">s</text:span><text:span text:style-name="T6">h</text:span><text:span text:style-name="T6">a</text:span><text:span text:style-name="T6">d</text:span><text:span text:style-name="T6">o</text:span><text:span text:style-name="T6">w</text:span><text:span text:style-name="T6">_</text:span><text:span text:style-name="T6">_</text:span><text:span text:style-name="T6">_</text:span><text:span text:style-name="T6"> <text:s/></text:span><text:span text:style-name="T6"><text:s/></text:span><text:span text:style-name="T6">w</text:span><text:span text:style-name="T6">i</text:span><text:span text:style-name="T6">g</text:span><text:span text:style-name="T6">h</text:span><text:span text:style-name="T6">t</text:span><text:span text:style-name="T6">_</text:span><text:span text:style-name="T6">_</text:span><text:span text:style-name="T6">_</text:span><text:span text:style-name="T6"> <text:s/></text:span><text:span text:style-name="T6"><text:s/></text:span><text:span text:style-name="T6">g</text:span><text:span text:style-name="T6">h</text:span><text:span text:style-name="T6">a</text:span><text:span text:style-name="T6">s</text:span><text:span text:style-name="T6">t</text:span><text:span text:style-name="T6">_</text:span><text:span text:style-name="T6">_</text:span><text:span text:style-name="T6">_</text:span><text:span text:style-name="T6"> <text:s/></text:span><text:span text:style-name="T6"><text:s/></text:span><text:span text:style-name="T6">w</text:span><text:span text:style-name="T6">r</text:span><text:span text:style-name="T6">a</text:span><text:span text:style-name="T6">i</text:span><text:span text:style-name="T6">t</text:span><text:span text:style-name="T6">h</text:span><text:span text:style-name="T6">_</text:span><text:span text:style-name="T6">_</text:span><text:span text:style-name="T6">_</text:span><text:span text:style-name="T6"> <text:s/></text:span><text:span text:style-name="T6"><text:s/></text:span><text:span text:style-name="T6">m</text:span><text:span text:style-name="T6">u</text:span><text:span text:style-name="T6">m</text:span><text:span text:style-name="T6">m</text:span><text:span text:style-name="T6">y</text:span><text:span text:style-name="T6">_</text:span><text:span text:style-name="T6">_</text:span><text:span text:style-name="T6">_</text:span><text:span text:style-name="T6"> <text:s/></text:span><text:span text:style-name="T6"><text:s/></text:span><text:span text:style-name="T6">s</text:span><text:span text:style-name="T6">p</text:span><text:span text:style-name="T6">e</text:span><text:span text:style-name="T6">c</text:span><text:span text:style-name="T6">t</text:span><text:span text:style-name="T6">r</text:span><text:span text:style-name="T6">e</text:span><text:span text:style-name="T6">_</text:span><text:span text:style-name="T6">_</text:span><text:span text:style-name="T6">_</text:span><text:span text:style-name="T6"> <text:s/></text:span><text:span text:style-name="T6"><text:s/></text:span><text:span text:style-name="T6">v</text:span><text:span text:style-name="T6">a</text:span><text:span text:style-name="T6">m</text:span><text:span text:style-name="T6">p</text:span><text:span text:style-name="T6">i</text:span><text:span text:style-name="T6">r</text:span><text:span text:style-name="T6">e</text:span><text:span text:style-name="T6">_</text:span><text:span text:style-name="T6">_</text:span><text:span text:style-name="T6">_</text:span><text:span text:style-name="T6"> <text:s/></text:span><text:span text:style-name="T6"><text:s/></text:span><text:span text:style-name="T6">g</text:span><text:span text:style-name="T6">h</text:span><text:span text:style-name="T6">o</text:span><text:span text:style-name="T6">s</text:span><text:span text:style-name="T6">t</text:span><text:span text:style-name="T6">_</text:span><text:span text:style-name="T6">_</text:span><text:span text:style-name="T6">_</text:span><text:span text:style-name="T6"> <text:s/></text:span><text:span text:style-name="T6"><text:s/></text:span><text:span text:style-name="T6">l</text:span><text:span text:style-name="T6">i</text:span><text:span text:style-name="T6">c</text:span><text:span text:style-name="T6">h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87" draw:text-style-name="P8" draw:layer="layout" svg:width="1.196cm" svg:height="0.31cm" svg:x="19.101cm" svg:y="22.653cm">
          <draw:text-box>
            <text:p text:style-name="P1"><text:span text:style-name="T6">s</text:span><text:span text:style-name="T6">p</text:span><text:span text:style-name="T6">e</text:span><text:span text:style-name="T6">c</text:span><text:span text:style-name="T6">i</text:span><text:span text:style-name="T6">a</text:span><text:span text:style-name="T6">l</text:span><text:span text:style-name="T6">_</text:span><text:span text:style-name="T6">_</text:span><text:span text:style-name="T6">_</text:span></text:p>
          </draw:text-box>
        </draw:frame>
        <draw:frame draw:style-name="gr11" draw:text-style-name="P2" draw:layer="layout" svg:width="0.321cm" svg:height="0.357cm" svg:x="20.312cm" svg:y="22.616cm">
          <draw:text-box>
            <text:p text:style-name="P1"><text:span text:style-name="T1"><text:s/></text:span></text:p>
          </draw:text-box>
        </draw:frame>
        <draw:frame draw:style-name="gr88" draw:text-style-name="P8" draw:layer="layout" svg:width="0.278cm" svg:height="0.31cm" svg:x="2.286cm" svg:y="22.975cm">
          <draw:text-box>
            <text:p text:style-name="P1"><text:span text:style-name="T6"><text:s/></text:span></text:p>
          </draw:text-box>
        </draw:frame>
        <draw:frame draw:style-name="gr89" draw:text-style-name="P5" draw:layer="layout" svg:width="2.656cm" svg:height="0.395cm" svg:x="2.286cm" svg:y="23.305cm">
          <draw:text-box>
            <text:p text:style-name="P1"><text:span text:style-name="T4">Percentage Ability</text:span></text:p>
          </draw:text-box>
        </draw:frame>
        <draw:frame draw:style-name="gr11" draw:text-style-name="P2" draw:layer="layout" svg:width="0.321cm" svg:height="0.357cm" svg:x="5.08cm" svg:y="23.335cm">
          <draw:text-box>
            <text:p text:style-name="P1"><text:span text:style-name="T3"><text:s/></text:span></text:p>
          </draw:text-box>
        </draw:frame>
        <draw:frame draw:style-name="gr90" draw:text-style-name="P8" draw:layer="layout" svg:width="4.43cm" svg:height="0.31cm" svg:x="5.783cm" svg:y="23.373cm">
          <draw:text-box>
            <text:p text:style-name="P1"><text:span text:style-name="T6">Base Ability Score % <text:s text:c="2"/>Armor Modifier</text:span></text:p>
          </draw:text-box>
        </draw:frame>
        <draw:frame draw:style-name="gr11" draw:text-style-name="P2" draw:layer="layout" svg:width="0.321cm" svg:height="0.357cm" svg:x="10.262cm" svg:y="23.335cm">
          <draw:text-box>
            <text:p text:style-name="P1"><text:span text:style-name="T1"><text:s/></text:span></text:p>
          </draw:text-box>
        </draw:frame>
        <draw:frame draw:style-name="gr91" draw:text-style-name="P8" draw:layer="layout" svg:width="1.209cm" svg:height="0.31cm" svg:x="2.345cm" svg:y="23.712cm">
          <draw:text-box>
            <text:p text:style-name="P1"><text:span text:style-name="T6">_</text:span><text:span text:style-name="T6">_</text:span><text:span text:style-name="T6">_</text:span><text:span text:style-name="T6">%</text:span><text:span text:style-name="T6"> 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92" draw:text-style-name="P8" draw:layer="layout" svg:width="0.552cm" svg:height="0.31cm" svg:x="2.675cm" svg:y="24.033cm">
          <draw:text-box>
            <text:p text:style-name="P1"><text:span text:style-name="T6">pick </text:span></text:p>
          </draw:text-box>
        </draw:frame>
        <draw:frame draw:style-name="gr93" draw:text-style-name="P8" draw:layer="layout" svg:width="0.925cm" svg:height="0.31cm" svg:x="2.489cm" svg:y="24.355cm">
          <draw:text-box>
            <text:p text:style-name="P1"><text:span text:style-name="T6">pockets </text:span></text:p>
          </draw:text-box>
        </draw:frame>
        <draw:frame draw:style-name="gr91" draw:text-style-name="P8" draw:layer="layout" svg:width="1.209cm" svg:height="0.31cm" svg:x="4.022cm" svg:y="23.712cm">
          <draw:text-box>
            <text:p text:style-name="P1"><text:span text:style-name="T6">___</text:span><text:span text:style-name="T6">% </text:span><text:span text:style-name="T6">___ </text:span></text:p>
          </draw:text-box>
        </draw:frame>
        <draw:frame draw:style-name="gr94" draw:text-style-name="P8" draw:layer="layout" svg:width="1.272cm" svg:height="0.31cm" svg:x="3.988cm" svg:y="24.033cm">
          <draw:text-box>
            <text:p text:style-name="P1"><text:span text:style-name="T6">o</text:span><text:span text:style-name="T6">p</text:span><text:span text:style-name="T6">e</text:span><text:span text:style-name="T6">n</text:span><text:span text:style-name="T6"> </text:span><text:span text:style-name="T6">l</text:span><text:span text:style-name="T6">o</text:span><text:span text:style-name="T6">c</text:span><text:span text:style-name="T6">k</text:span><text:span text:style-name="T6">s</text:span><text:span text:style-name="T6"> </text:span></text:p>
          </draw:text-box>
        </draw:frame>
        <draw:frame draw:style-name="gr91" draw:text-style-name="P8" draw:layer="layout" svg:width="1.209cm" svg:height="0.31cm" svg:x="5.698cm" svg:y="23.712cm">
          <draw:text-box>
            <text:p text:style-name="P1"><text:span text:style-name="T6">___</text:span><text:span text:style-name="T6">% </text:span><text:span text:style-name="T6">___ </text:span></text:p>
          </draw:text-box>
        </draw:frame>
        <draw:frame draw:style-name="gr95" draw:text-style-name="P9" draw:layer="layout" svg:width="1.043cm" svg:height="0.619cm" svg:x="5.715cm" svg:y="24.033cm">
          <draw:text-box>
            <text:p text:style-name="P1"><text:span text:style-name="T6">f</text:span><text:span text:style-name="T6">i</text:span><text:span text:style-name="T6">n</text:span><text:span text:style-name="T6">d</text:span><text:span text:style-name="T6"> </text:span><text:span text:style-name="T6">a</text:span><text:span text:style-name="T6">n</text:span><text:span text:style-name="T6">d</text:span></text:p>
          </draw:text-box>
        </draw:frame>
        <draw:frame draw:style-name="gr96" draw:text-style-name="P8" draw:layer="layout" svg:width="0.908cm" svg:height="0.31cm" svg:x="5.85cm" svg:y="24.355cm">
          <draw:text-box>
            <text:p text:style-name="P1"><text:span text:style-name="T6">r</text:span><text:span text:style-name="T6">e</text:span><text:span text:style-name="T6">m</text:span><text:span text:style-name="T6">o</text:span><text:span text:style-name="T6">v</text:span><text:span text:style-name="T6">e</text:span><text:span text:style-name="T6"> </text:span></text:p>
          </draw:text-box>
        </draw:frame>
        <draw:frame draw:style-name="gr97" draw:text-style-name="P8" draw:layer="layout" svg:width="0.612cm" svg:height="0.31cm" svg:x="5.994cm" svg:y="24.685cm">
          <draw:text-box>
            <text:p text:style-name="P1"><text:span text:style-name="T6">t</text:span><text:span text:style-name="T6">r</text:span><text:span text:style-name="T6">a</text:span><text:span text:style-name="T6">p</text:span><text:span text:style-name="T6">s</text:span><text:span text:style-name="T6"> </text:span></text:p>
          </draw:text-box>
        </draw:frame>
        <draw:frame draw:style-name="gr91" draw:text-style-name="P8" draw:layer="layout" svg:width="1.209cm" svg:height="0.31cm" svg:x="7.374cm" svg:y="23.712cm">
          <draw:text-box>
            <text:p text:style-name="P1"><text:span text:style-name="T6">___% ___ </text:span></text:p>
          </draw:text-box>
        </draw:frame>
        <draw:frame draw:style-name="gr98" draw:text-style-name="P8" draw:layer="layout" svg:width="0.692cm" svg:height="0.31cm" svg:x="7.628cm" svg:y="24.033cm">
          <draw:text-box>
            <text:p text:style-name="P1"><text:span text:style-name="T6">move </text:span></text:p>
          </draw:text-box>
        </draw:frame>
        <draw:frame draw:style-name="gr99" draw:text-style-name="P8" draw:layer="layout" svg:width="0.891cm" svg:height="0.31cm" svg:x="7.535cm" svg:y="24.355cm">
          <draw:text-box>
            <text:p text:style-name="P1"><text:span text:style-name="T6">silentl</text:span><text:span text:style-name="T6">y </text:span></text:p>
          </draw:text-box>
        </draw:frame>
        <draw:frame draw:style-name="gr91" draw:text-style-name="P8" draw:layer="layout" svg:width="1.209cm" svg:height="0.31cm" svg:x="9.051cm" svg:y="23.712cm">
          <draw:text-box>
            <text:p text:style-name="P1"><text:span text:style-name="T6">___% ___ </text:span></text:p>
          </draw:text-box>
        </draw:frame>
        <draw:frame draw:style-name="gr100" draw:text-style-name="P8" draw:layer="layout" svg:width="0.836cm" svg:height="0.31cm" svg:x="9.237cm" svg:y="24.033cm">
          <draw:text-box>
            <text:p text:style-name="P1"><text:span text:style-name="T6">hide in </text:span></text:p>
          </draw:text-box>
        </draw:frame>
        <draw:frame draw:style-name="gr101" draw:text-style-name="P8" draw:layer="layout" svg:width="1.031cm" svg:height="0.31cm" svg:x="9.136cm" svg:y="24.355cm">
          <draw:text-box>
            <text:p text:style-name="P1"><text:span text:style-name="T6">shadows </text:span></text:p>
          </draw:text-box>
        </draw:frame>
        <draw:frame draw:style-name="gr91" draw:text-style-name="P8" draw:layer="layout" svg:width="1.209cm" svg:height="0.31cm" svg:x="10.727cm" svg:y="23.712cm">
          <draw:text-box>
            <text:p text:style-name="P1"><text:span text:style-name="T6">___% </text:span><text:span text:style-name="T6">___ </text:span></text:p>
          </draw:text-box>
        </draw:frame>
        <draw:frame draw:style-name="gr91" draw:text-style-name="P8" draw:layer="layout" svg:width="1.209cm" svg:height="0.31cm" svg:x="10.727cm" svg:y="24.033cm">
          <draw:text-box>
            <text:p text:style-name="P1"><text:span text:style-name="T6">hear noise </text:span></text:p>
          </draw:text-box>
        </draw:frame>
        <draw:frame draw:style-name="gr91" draw:text-style-name="P8" draw:layer="layout" svg:width="1.209cm" svg:height="0.31cm" svg:x="12.404cm" svg:y="23.712cm">
          <draw:text-box>
            <text:p text:style-name="P1"><text:span text:style-name="T6">___% ___ </text:span></text:p>
          </draw:text-box>
        </draw:frame>
        <draw:frame draw:style-name="gr102" draw:text-style-name="P8" draw:layer="layout" svg:width="0.705cm" svg:height="0.31cm" svg:x="12.658cm" svg:y="24.033cm">
          <draw:text-box>
            <text:p text:style-name="P1"><text:span text:style-name="T6">c</text:span><text:span text:style-name="T6">l</text:span><text:span text:style-name="T6">i</text:span><text:span text:style-name="T6">m</text:span><text:span text:style-name="T6">b</text:span><text:span text:style-name="T6"> </text:span></text:p>
          </draw:text-box>
        </draw:frame>
        <draw:frame draw:style-name="gr103" draw:text-style-name="P8" draw:layer="layout" svg:width="0.658cm" svg:height="0.31cm" svg:x="12.683cm" svg:y="24.355cm">
          <draw:text-box>
            <text:p text:style-name="P1"><text:span text:style-name="T6">w</text:span><text:span text:style-name="T6">a</text:span><text:span text:style-name="T6">l</text:span><text:span text:style-name="T6">l</text:span><text:span text:style-name="T6">s</text:span><text:span text:style-name="T6"> </text:span></text:p>
          </draw:text-box>
        </draw:frame>
        <draw:frame draw:style-name="gr91" draw:text-style-name="P8" draw:layer="layout" svg:width="1.209cm" svg:height="0.31cm" svg:x="14.071cm" svg:y="23.712cm">
          <draw:text-box>
            <text:p text:style-name="P1"><text:span text:style-name="T6">___% ___ </text:span></text:p>
          </draw:text-box>
        </draw:frame>
        <draw:frame draw:style-name="gr92" draw:text-style-name="P8" draw:layer="layout" svg:width="0.552cm" svg:height="0.31cm" svg:x="14.402cm" svg:y="24.033cm">
          <draw:text-box>
            <text:p text:style-name="P1"><text:span text:style-name="T6">read </text:span></text:p>
          </draw:text-box>
        </draw:frame>
        <draw:frame draw:style-name="gr104" draw:text-style-name="P8" draw:layer="layout" svg:width="1.187cm" svg:height="0.31cm" svg:x="14.08cm" svg:y="24.355cm">
          <draw:text-box>
            <text:p text:style-name="P1"><text:span text:style-name="T6">languages </text:span></text:p>
          </draw:text-box>
        </draw:frame>
        <draw:frame draw:style-name="gr91" draw:text-style-name="P8" draw:layer="layout" svg:width="1.209cm" svg:height="0.31cm" svg:x="15.748cm" svg:y="23.712cm">
          <draw:text-box>
            <text:p text:style-name="P1"><text:span text:style-name="T6">___% ___ </text:span></text:p>
          </draw:text-box>
        </draw:frame>
        <draw:frame draw:style-name="gr105" draw:text-style-name="P8" draw:layer="layout" svg:width="0.565cm" svg:height="0.31cm" svg:x="16.07cm" svg:y="24.033cm">
          <draw:text-box>
            <text:p text:style-name="P1"><text:span text:style-name="T6">item </text:span></text:p>
          </draw:text-box>
        </draw:frame>
        <draw:frame draw:style-name="gr106" draw:text-style-name="P8" draw:layer="layout" svg:width="1.297cm" svg:height="0.31cm" svg:x="15.706cm" svg:y="24.355cm">
          <draw:text-box>
            <text:p text:style-name="P1"><text:span text:style-name="T6">knowledge </text:span></text:p>
          </draw:text-box>
        </draw:frame>
        <draw:frame draw:style-name="gr91" draw:text-style-name="P8" draw:layer="layout" svg:width="1.209cm" svg:height="0.31cm" svg:x="17.424cm" svg:y="23.712cm">
          <draw:text-box>
            <text:p text:style-name="P1"><text:span text:style-name="T6">_</text:span><text:span text:style-name="T6">_</text:span><text:span text:style-name="T6">_</text:span><text:span text:style-name="T6">%</text:span><text:span text:style-name="T6"> 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107" draw:text-style-name="P2" draw:layer="layout" svg:width="1.209cm" svg:height="0.357cm" svg:x="17.441cm" svg:y="24.0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07" draw:text-style-name="P2" draw:layer="layout" svg:width="1.209cm" svg:height="0.357cm" svg:x="17.441cm" svg:y="24.394cm">
          <draw:text-box>
            <text:p text:style-name="P1"><text:span text:style-name="T1">______</text:span><text:span text:style-name="T1">_ </text:span></text:p>
          </draw:text-box>
        </draw:frame>
        <draw:frame draw:style-name="gr91" draw:text-style-name="P8" draw:layer="layout" svg:width="1.209cm" svg:height="0.31cm" svg:x="19.101cm" svg:y="23.712cm">
          <draw:text-box>
            <text:p text:style-name="P1"><text:span text:style-name="T6">___</text:span><text:span text:style-name="T6">% </text:span><text:span text:style-name="T6">___ </text:span></text:p>
          </draw:text-box>
        </draw:frame>
        <draw:frame draw:style-name="gr107" draw:text-style-name="P2" draw:layer="layout" svg:width="1.209cm" svg:height="0.357cm" svg:x="19.118cm" svg:y="24.03cm">
          <draw:text-box>
            <text:p text:style-name="P1"><text:span text:style-name="T1">_______ </text:span></text:p>
          </draw:text-box>
        </draw:frame>
        <draw:frame draw:style-name="gr107" draw:text-style-name="P2" draw:layer="layout" svg:width="1.209cm" svg:height="0.357cm" svg:x="19.118cm" svg:y="24.39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25.367cm">
          <draw:text-box>
            <text:p text:style-name="P1"><text:span text:style-name="T1"><text:s/></text:span></text:p>
          </draw:text-box>
        </draw:frame>
        <draw:frame draw:style-name="gr108" draw:text-style-name="P5" draw:layer="layout" svg:width="0.878cm" svg:height="0.395cm" svg:x="2.286cm" svg:y="25.735cm">
          <draw:text-box>
            <text:p text:style-name="P1"><text:span text:style-name="T4">S</text:span><text:span text:style-name="T4">t</text:span><text:span text:style-name="T4">e</text:span><text:span text:style-name="T4">e</text:span><text:span text:style-name="T4">d</text:span><text:span text:style-name="T4"> </text:span></text:p>
          </draw:text-box>
        </draw:frame>
        <draw:frame draw:style-name="gr109" draw:text-style-name="P2" draw:layer="layout" svg:width="14.187cm" svg:height="0.357cm" svg:x="3.2cm" svg:y="25.765cm">
          <draw:text-box>
            <text:p text:style-name="P1"><text:span text:style-name="T1"><text:s/></text:span><text:span text:style-name="T1">t</text:span><text:span text:style-name="T1">y</text:span><text:span text:style-name="T1">p</text:span><text:span text:style-name="T1">e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"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"</text:span><text:span text:style-name="T1"> <text:s/></text:span><text:span text:style-name="T1"><text:s text:c="2"/></text:span><text:span text:style-name="T1">H</text:span><text:span text:style-name="T1">D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H</text:span><text:span text:style-name="T1">p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A</text:span><text:span text:style-name="T1">C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0" draw:text-style-name="P2" draw:layer="layout" svg:width="2.974cm" svg:height="0.357cm" svg:x="17.458cm" svg:y="25.765cm">
          <draw:text-box>
            <text:p text:style-name="P1"><text:span text:style-name="T1">M</text:span><text:span text:style-name="T1">o</text:span><text:span text:style-name="T1">v</text:span><text:span text:style-name="T1">e</text:span><text:span text:style-name="T1"> </text:span><text:span text:style-name="T1">r</text:span><text:span text:style-name="T1">a</text:span><text:span text:style-name="T1">t</text:span><text:span text:style-name="T1">e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"</text:span><text:span text:style-name="T1"> </text:span></text:p>
          </draw:text-box>
        </draw:frame>
        <draw:frame draw:style-name="gr111" draw:text-style-name="P8" draw:layer="layout" svg:width="0.916cm" svg:height="0.31cm" svg:x="2.286cm" svg:y="26.176cm">
          <draw:text-box>
            <text:p text:style-name="P1"><text:span text:style-name="T6">#</text:span><text:span text:style-name="T6">a</text:span><text:span text:style-name="T6">t</text:span><text:span text:style-name="T6">t</text:span><text:span text:style-name="T6">a</text:span><text:span text:style-name="T6">c</text:span><text:span text:style-name="T6">k</text:span><text:span text:style-name="T6">s</text:span></text:p>
          </draw:text-box>
        </draw:frame>
        <draw:frame draw:style-name="gr112" draw:text-style-name="P2" draw:layer="layout" svg:width="0.806cm" svg:height="0.357cm" svg:x="3.217cm" svg:y="26.13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text:s/></text:span></text:p>
          </draw:text-box>
        </draw:frame>
        <draw:frame draw:style-name="gr113" draw:text-style-name="P8" draw:layer="layout" svg:width="0.497cm" svg:height="0.31cm" svg:x="4.013cm" svg:y="26.176cm">
          <draw:text-box>
            <text:p text:style-name="P1"><text:span text:style-name="T6">d</text:span><text:span text:style-name="T6">m</text:span><text:span text:style-name="T6">g</text:span></text:p>
          </draw:text-box>
        </draw:frame>
        <draw:frame draw:style-name="gr114" draw:text-style-name="P2" draw:layer="layout" svg:width="2.656cm" svg:height="0.357cm" svg:x="4.513cm" svg:y="26.13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/></text:span></text:p>
          </draw:text-box>
        </draw:frame>
        <draw:frame draw:style-name="gr115" draw:text-style-name="P8" draw:layer="layout" svg:width="2.538cm" svg:height="0.31cm" svg:x="7.129cm" svg:y="26.176cm">
          <draw:text-box>
            <text:p text:style-name="P1"><text:span text:style-name="T6">e</text:span><text:span text:style-name="T6">n</text:span><text:span text:style-name="T6">c</text:span><text:span text:style-name="T6">u</text:span><text:span text:style-name="T6">m</text:span><text:span text:style-name="T6">b</text:span><text:span text:style-name="T6">r</text:span><text:span text:style-name="T6">a</text:span><text:span text:style-name="T6">n</text:span><text:span text:style-name="T6">c</text:span><text:span text:style-name="T6">e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116" draw:text-style-name="P8" draw:layer="layout" svg:width="0.59cm" svg:height="0.31cm" svg:x="10.033cm" svg:y="26.176cm">
          <draw:text-box>
            <text:p text:style-name="P1"><text:span text:style-name="T6">n</text:span><text:span text:style-name="T6">o</text:span><text:span text:style-name="T6">t</text:span><text:span text:style-name="T6">e</text:span><text:span text:style-name="T6">s</text:span></text:p>
          </draw:text-box>
        </draw:frame>
        <draw:frame draw:style-name="gr117" draw:text-style-name="P2" draw:layer="layout" svg:width="9.895cm" svg:height="0.357cm" svg:x="10.634cm" svg:y="26.13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control draw:style-name="gr6" draw:text-style-name="P3" draw:layer="controls" svg:width="2.038cm" svg:height="0.291cm" svg:x="10.807cm" svg:y="0.766cm" draw:control="control2"/>
        <draw:control draw:style-name="gr6" draw:text-style-name="P3" draw:layer="controls" svg:width="4.919cm" svg:height="0.291cm" svg:x="3.067cm" svg:y="1.493cm" draw:control="control3"/>
        <draw:control draw:style-name="gr6" draw:text-style-name="P10" draw:layer="controls" svg:width="0.461cm" svg:height="0.291cm" svg:x="8.971cm" svg:y="1.494cm" draw:control="control4"/>
        <draw:control draw:style-name="gr6" draw:text-style-name="P3" draw:layer="controls" svg:width="1.386cm" svg:height="0.291cm" svg:x="10.772cm" svg:y="1.491cm" draw:control="control5"/>
        <draw:control draw:style-name="gr6" draw:text-style-name="P3" draw:layer="controls" svg:width="1.137cm" svg:height="0.291cm" svg:x="13.421cm" svg:y="1.492cm" draw:control="control6"/>
        <draw:control draw:style-name="gr6" draw:text-style-name="P3" draw:layer="controls" svg:width="1.605cm" svg:height="0.291cm" svg:x="2.622cm" svg:y="1.864cm" draw:control="control7"/>
        <draw:control draw:style-name="gr6" draw:text-style-name="P11" draw:layer="controls" svg:width="0.535cm" svg:height="0.291cm" svg:x="5.004cm" svg:y="1.865cm" draw:control="control8"/>
        <draw:control draw:style-name="gr6" draw:text-style-name="P3" draw:layer="controls" svg:width="0.685cm" svg:height="0.291cm" svg:x="6.958cm" svg:y="1.866cm" draw:control="control9"/>
        <draw:control draw:style-name="gr6" draw:text-style-name="P10" draw:layer="controls" svg:width="1.153cm" svg:height="0.291cm" svg:x="11.011cm" svg:y="1.851cm" draw:control="control10"/>
        <draw:control draw:style-name="gr6" draw:text-style-name="P10" draw:layer="controls" svg:width="1.372cm" svg:height="0.291cm" svg:x="13.12cm" svg:y="1.852cm" draw:control="control11"/>
        <draw:control draw:style-name="gr6" draw:text-style-name="P10" draw:layer="controls" svg:width="2.35cm" svg:height="0.291cm" svg:x="2.948cm" svg:y="2.217cm" draw:control="control12"/>
        <draw:control draw:style-name="gr6" draw:text-style-name="P10" draw:layer="controls" svg:width="5.269cm" svg:height="0.291cm" svg:x="7.672cm" svg:y="2.218cm" draw:control="control13"/>
        <draw:control draw:style-name="gr6" draw:text-style-name="P10" draw:layer="controls" svg:width="1.386cm" svg:height="0.291cm" svg:x="13.1cm" svg:y="2.219cm" draw:control="control14"/>
        <draw:control draw:style-name="gr6" draw:text-style-name="P10" draw:layer="controls" svg:width="1.695cm" svg:height="0.291cm" svg:x="3.698cm" svg:y="2.584cm" draw:control="control15"/>
        <draw:control draw:style-name="gr6" draw:text-style-name="P10" draw:layer="controls" svg:width="0.572cm" svg:height="0.291cm" svg:x="6.523cm" svg:y="2.585cm" draw:control="control16"/>
        <draw:control draw:style-name="gr6" draw:text-style-name="P10" draw:layer="controls" svg:width="0.758cm" svg:height="0.291cm" svg:x="8.135cm" svg:y="2.586cm" draw:control="control17"/>
        <draw:control draw:style-name="gr6" draw:text-style-name="P10" draw:layer="controls" svg:width="0.411cm" svg:height="0.291cm" svg:x="11.405cm" svg:y="2.587cm" draw:control="control18"/>
        <draw:control draw:style-name="gr6" draw:text-style-name="P10" draw:layer="controls" svg:width="0.411cm" svg:height="0.291cm" svg:x="13.706cm" svg:y="2.588cm" draw:control="control19"/>
        <draw:control draw:style-name="gr6" draw:text-style-name="P10" draw:layer="controls" svg:width="0.575cm" svg:height="0.291cm" svg:x="2.901cm" svg:y="3.306cm" draw:control="control20"/>
        <draw:control draw:style-name="gr6" draw:text-style-name="P10" draw:layer="controls" svg:width="0.575cm" svg:height="0.291cm" svg:x="3.602cm" svg:y="3.307cm" draw:control="control21"/>
        <draw:control draw:style-name="gr6" draw:text-style-name="P10" draw:layer="controls" svg:width="0.435cm" svg:height="0.291cm" svg:x="5.103cm" svg:y="3.308cm" draw:control="control22"/>
        <draw:control draw:style-name="gr6" draw:text-style-name="P10" draw:layer="controls" svg:width="0.435cm" svg:height="0.291cm" svg:x="6.316cm" svg:y="3.302cm" draw:control="control23"/>
        <draw:control draw:style-name="gr6" draw:text-style-name="P10" draw:layer="controls" svg:width="0.435cm" svg:height="0.291cm" svg:x="8.777cm" svg:y="3.303cm" draw:control="control24"/>
        <draw:control draw:style-name="gr6" draw:text-style-name="P10" draw:layer="controls" svg:width="0.435cm" svg:height="0.291cm" svg:x="9.448cm" svg:y="3.304cm" draw:control="control25"/>
        <draw:control draw:style-name="gr6" draw:text-style-name="P10" draw:layer="controls" svg:width="0.435cm" svg:height="0.291cm" svg:x="14.002cm" svg:y="3.304cm" draw:control="control26"/>
        <draw:control draw:style-name="gr6" draw:text-style-name="P10" draw:layer="controls" svg:width="0.592cm" svg:height="0.291cm" svg:x="2.884cm" svg:y="3.694cm" draw:control="control27"/>
        <draw:control draw:style-name="gr6" draw:text-style-name="P10" draw:layer="controls" svg:width="0.421cm" svg:height="0.291cm" svg:x="6.224cm" svg:y="3.688cm" draw:control="control28"/>
        <draw:control draw:style-name="gr6" draw:text-style-name="P10" draw:layer="controls" svg:width="0.421cm" svg:height="0.291cm" svg:x="10.755cm" svg:y="3.689cm" draw:control="control29"/>
        <draw:control draw:style-name="gr6" draw:text-style-name="P10" draw:layer="controls" svg:width="0.554cm" svg:height="0.291cm" svg:x="13.956cm" svg:y="3.69cm" draw:control="control30"/>
        <draw:control draw:style-name="gr6" draw:text-style-name="P10" draw:layer="controls" svg:width="0.554cm" svg:height="0.291cm" svg:x="2.902cm" svg:y="4.085cm" draw:control="control31"/>
        <draw:control draw:style-name="gr6" draw:text-style-name="P10" draw:layer="controls" svg:width="0.554cm" svg:height="0.291cm" svg:x="5.618cm" svg:y="4.086cm" draw:control="control32"/>
        <draw:control draw:style-name="gr6" draw:text-style-name="P10" draw:layer="controls" svg:width="0.554cm" svg:height="0.291cm" svg:x="8.419cm" svg:y="4.087cm" draw:control="control33"/>
        <draw:control draw:style-name="gr6" draw:text-style-name="P10" draw:layer="controls" svg:width="0.554cm" svg:height="0.291cm" svg:x="12.318cm" svg:y="4.088cm" draw:control="control34"/>
        <draw:control draw:style-name="gr6" draw:text-style-name="P10" draw:layer="controls" svg:width="0.474cm" svg:height="0.291cm" svg:x="14.073cm" svg:y="4.082cm" draw:control="control35"/>
        <draw:control draw:style-name="gr6" draw:text-style-name="P10" draw:layer="controls" svg:width="0.569cm" svg:height="0.291cm" svg:x="2.898cm" svg:y="4.476cm" draw:control="control36"/>
        <draw:control draw:style-name="gr6" draw:text-style-name="P10" draw:layer="controls" svg:width="0.478cm" svg:height="0.291cm" svg:x="6.381cm" svg:y="4.477cm" draw:control="control37"/>
        <draw:control draw:style-name="gr6" draw:text-style-name="P10" draw:layer="controls" svg:width="0.478cm" svg:height="0.291cm" svg:x="8.579cm" svg:y="4.478cm" draw:control="control38"/>
        <draw:control draw:style-name="gr6" draw:text-style-name="P10" draw:layer="controls" svg:width="0.478cm" svg:height="0.291cm" svg:x="11.107cm" svg:y="4.479cm" draw:control="control39"/>
        <draw:control draw:style-name="gr6" draw:text-style-name="P10" draw:layer="controls" svg:width="0.478cm" svg:height="0.291cm" svg:x="14.093cm" svg:y="4.48cm" draw:control="control40"/>
        <draw:control draw:style-name="gr6" draw:text-style-name="P10" draw:layer="controls" svg:width="0.478cm" svg:height="0.291cm" svg:x="2.935cm" svg:y="4.867cm" draw:control="control41"/>
        <draw:control draw:style-name="gr6" draw:text-style-name="P10" draw:layer="controls" svg:width="0.478cm" svg:height="0.291cm" svg:x="7.263cm" svg:y="4.868cm" draw:control="control42"/>
        <draw:control draw:style-name="gr6" draw:text-style-name="P10" draw:layer="controls" svg:width="1.45cm" svg:height="0.291cm" svg:x="10.063cm" svg:y="4.869cm" draw:control="control43"/>
        <draw:control draw:style-name="gr6" draw:text-style-name="P10" draw:layer="controls" svg:width="0.592cm" svg:height="0.291cm" svg:x="13.921cm" svg:y="4.87cm" draw:control="control44"/>
        <draw:control draw:style-name="gr6" draw:text-style-name="P10" draw:layer="controls" svg:width="0.592cm" svg:height="0.291cm" svg:x="2.9cm" svg:y="5.257cm" draw:control="control45"/>
        <draw:control draw:style-name="gr6" draw:text-style-name="P10" draw:layer="controls" svg:width="0.592cm" svg:height="0.291cm" svg:x="7.809cm" svg:y="5.258cm" draw:control="control46"/>
        <draw:control draw:style-name="gr6" draw:text-style-name="P10" draw:layer="controls" svg:width="0.592cm" svg:height="0.291cm" svg:x="10.409cm" svg:y="5.259cm" draw:control="control47"/>
        <draw:control draw:style-name="gr6" draw:text-style-name="P10" draw:layer="controls" svg:width="0.592cm" svg:height="0.291cm" svg:x="13.939cm" svg:y="5.26cm" draw:control="control48"/>
        <draw:control draw:style-name="gr6" draw:text-style-name="P10" draw:layer="controls" svg:width="0.592cm" svg:height="0.291cm" svg:x="19.567cm" svg:y="4.747cm" draw:control="control49"/>
        <draw:control draw:style-name="gr6" draw:text-style-name="P10" draw:layer="controls" svg:width="0.592cm" svg:height="0.291cm" svg:x="19.567cm" svg:y="5.313cm" draw:control="control50"/>
        <draw:control draw:style-name="gr6" draw:text-style-name="P10" draw:layer="controls" svg:width="0.592cm" svg:height="0.291cm" svg:x="19.567cm" svg:y="5.856cm" draw:control="control51"/>
        <draw:control draw:style-name="gr6" draw:text-style-name="P10" draw:layer="controls" svg:width="0.592cm" svg:height="0.291cm" svg:x="19.567cm" svg:y="6.399cm" draw:control="control52"/>
        <draw:control draw:style-name="gr6" draw:text-style-name="P10" draw:layer="controls" svg:width="0.592cm" svg:height="0.291cm" svg:x="19.567cm" svg:y="6.949cm" draw:control="control53"/>
        <draw:control draw:style-name="gr6" draw:text-style-name="P10" draw:layer="controls" svg:width="0.508cm" svg:height="0.291cm" svg:x="2.551cm" svg:y="6.007cm" draw:control="control54"/>
        <draw:control draw:style-name="gr6" draw:text-style-name="P10" draw:layer="controls" svg:width="5.414cm" svg:height="0.291cm" svg:x="9.159cm" svg:y="7.088cm" draw:control="control55"/>
        <draw:control draw:style-name="gr6" draw:text-style-name="P10" draw:layer="controls" svg:width="0.695cm" svg:height="0.291cm" svg:x="2.447cm" svg:y="8.191cm" draw:control="control56"/>
        <draw:control draw:style-name="gr6" draw:text-style-name="P10" draw:layer="controls" svg:width="0.551cm" svg:height="0.291cm" svg:x="8.064cm" svg:y="8.185cm" draw:control="control57"/>
        <draw:control draw:style-name="gr6" draw:text-style-name="P10" draw:layer="controls" svg:width="0.551cm" svg:height="0.291cm" svg:x="8.954cm" svg:y="8.186cm" draw:control="control58"/>
        <draw:control draw:style-name="gr6" draw:text-style-name="P10" draw:layer="controls" svg:width="0.551cm" svg:height="0.291cm" svg:x="9.988cm" svg:y="10.394cm" draw:control="control59"/>
        <draw:control draw:style-name="gr6" draw:text-style-name="P10" draw:layer="controls" svg:width="0.551cm" svg:height="0.291cm" svg:x="13.389cm" svg:y="10.381cm" draw:control="control60"/>
        <draw:control draw:style-name="gr6" draw:text-style-name="P10" draw:layer="controls" svg:width="3.434cm" svg:height="0.28cm" svg:x="2.323cm" svg:y="10.756cm" draw:control="control61"/>
        <draw:control draw:style-name="gr6" draw:text-style-name="P10" draw:layer="controls" svg:width="0.561cm" svg:height="0.28cm" svg:x="6.128cm" svg:y="10.757cm" draw:control="control62"/>
        <draw:control draw:style-name="gr6" draw:text-style-name="P10" draw:layer="controls" svg:width="0.412cm" svg:height="0.28cm" svg:x="7.196cm" svg:y="10.751cm" draw:control="control63"/>
        <draw:control draw:style-name="gr6" draw:text-style-name="P10" draw:layer="controls" svg:width="3.434cm" svg:height="0.28cm" svg:x="2.324cm" svg:y="11.131cm" draw:control="control64"/>
        <draw:control draw:style-name="gr6" draw:text-style-name="P10" draw:layer="controls" svg:width="0.561cm" svg:height="0.28cm" svg:x="6.129cm" svg:y="11.125cm" draw:control="control65"/>
        <draw:control draw:style-name="gr6" draw:text-style-name="P10" draw:layer="controls" svg:width="0.412cm" svg:height="0.28cm" svg:x="7.183cm" svg:y="11.126cm" draw:control="control66"/>
        <draw:control draw:style-name="gr6" draw:text-style-name="P10" draw:layer="controls" svg:width="3.434cm" svg:height="0.28cm" svg:x="2.311cm" svg:y="11.499cm" draw:control="control67"/>
        <draw:control draw:style-name="gr6" draw:text-style-name="P10" draw:layer="controls" svg:width="0.561cm" svg:height="0.28cm" svg:x="6.13cm" svg:y="11.5cm" draw:control="control68"/>
        <draw:control draw:style-name="gr6" draw:text-style-name="P10" draw:layer="controls" svg:width="0.412cm" svg:height="0.28cm" svg:x="7.198cm" svg:y="11.494cm" draw:control="control69"/>
        <draw:control draw:style-name="gr6" draw:text-style-name="P10" draw:layer="controls" svg:width="3.434cm" svg:height="0.28cm" svg:x="2.326cm" svg:y="11.864cm" draw:control="control70"/>
        <draw:control draw:style-name="gr6" draw:text-style-name="P10" draw:layer="controls" svg:width="0.561cm" svg:height="0.28cm" svg:x="6.131cm" svg:y="11.858cm" draw:control="control71"/>
        <draw:control draw:style-name="gr6" draw:text-style-name="P10" draw:layer="controls" svg:width="0.412cm" svg:height="0.28cm" svg:x="7.199cm" svg:y="11.86cm" draw:control="control72"/>
        <draw:control draw:style-name="gr6" draw:text-style-name="P10" draw:layer="controls" svg:width="3.434cm" svg:height="0.28cm" svg:x="2.326cm" svg:y="12.228cm" draw:control="control73"/>
        <draw:control draw:style-name="gr6" draw:text-style-name="P10" draw:layer="controls" svg:width="0.561cm" svg:height="0.28cm" svg:x="6.131cm" svg:y="12.229cm" draw:control="control74"/>
        <draw:control draw:style-name="gr6" draw:text-style-name="P10" draw:layer="controls" svg:width="0.412cm" svg:height="0.28cm" svg:x="7.199cm" svg:y="12.23cm" draw:control="control75"/>
        <draw:control draw:style-name="gr6" draw:text-style-name="P3" draw:layer="controls" svg:width="8.602cm" svg:height="0.28cm" svg:x="2.299cm" svg:y="13.653cm" draw:control="control76"/>
        <draw:control draw:style-name="gr6" draw:text-style-name="P10" draw:layer="controls" svg:width="8.602cm" svg:height="0.28cm" svg:x="2.299cm" svg:y="14.054cm" draw:control="control77"/>
        <draw:control draw:style-name="gr6" draw:text-style-name="P10" draw:layer="controls" svg:width="8.602cm" svg:height="0.28cm" svg:x="2.299cm" svg:y="14.422cm" draw:control="control78"/>
        <draw:control draw:style-name="gr6" draw:text-style-name="P3" draw:layer="controls" svg:width="8.602cm" svg:height="0.28cm" svg:x="11.638cm" svg:y="13.277cm" draw:control="control79"/>
        <draw:control draw:style-name="gr6" draw:text-style-name="P3" draw:layer="controls" svg:width="8.602cm" svg:height="0.28cm" svg:x="11.638cm" svg:y="13.678cm" draw:control="control80"/>
        <draw:control draw:style-name="gr6" draw:text-style-name="P3" draw:layer="controls" svg:width="8.602cm" svg:height="0.28cm" svg:x="11.638cm" svg:y="14.056cm" draw:control="control81"/>
        <draw:control draw:style-name="gr6" draw:text-style-name="P3" draw:layer="controls" svg:width="8.602cm" svg:height="0.28cm" svg:x="11.638cm" svg:y="14.4cm" draw:control="control82"/>
      </draw:page>
      <draw:page draw:name="page2" draw:style-name="dp1" draw:master-page-name="master-page3">
        <draw:frame draw:style-name="gr118" draw:text-style-name="P2" draw:layer="layout" svg:width="1.547cm" svg:height="0.357cm" svg:x="10.558cm" svg:y="0.772cm">
          <draw:text-box>
            <text:p text:style-name="P1"><text:span text:style-name="T3">B</text:span><text:span text:style-name="T3">e</text:span><text:span text:style-name="T3">l</text:span><text:span text:style-name="T3">o</text:span><text:span text:style-name="T3">n</text:span><text:span text:style-name="T3">g</text:span><text:span text:style-name="T3">i</text:span><text:span text:style-name="T3">n</text:span><text:span text:style-name="T3">g</text:span><text:span text:style-name="T3">s</text:span><text:span text:style-name="T3"> </text:span></text:p>
          </draw:text-box>
        </draw:frame>
        <draw:frame draw:style-name="gr52" draw:text-style-name="P2" draw:layer="layout" svg:width="0.671cm" svg:height="0.357cm" svg:x="2.286cm" svg:y="1.559cm">
          <draw:text-box>
            <text:p text:style-name="P1"><text:span text:style-name="T1">I</text:span><text:span text:style-name="T1">t</text:span><text:span text:style-name="T1">e</text:span><text:span text:style-name="T1">m</text:span><text:span text:style-name="T1"> </text:span></text:p>
          </draw:text-box>
        </draw:frame>
        <draw:frame draw:style-name="gr55" draw:text-style-name="P2" draw:layer="layout" svg:width="0.938cm" svg:height="0.357cm" svg:x="5.935cm" svg:y="1.559cm">
          <draw:text-box>
            <text:p text:style-name="P1"><text:span text:style-name="T1">W</text:span><text:span text:style-name="T1">h</text:span><text:span text:style-name="T1">e</text:span><text:span text:style-name="T1">r</text:span><text:span text:style-name="T1">e</text:span><text:span text:style-name="T1"> </text:span></text:p>
          </draw:text-box>
        </draw:frame>
        <draw:frame draw:style-name="gr119" draw:text-style-name="P2" draw:layer="layout" svg:width="0.582cm" svg:height="0.357cm" svg:x="7.053cm" svg:y="1.559cm">
          <draw:text-box>
            <text:p text:style-name="P1"><text:span text:style-name="T1">E</text:span><text:span text:style-name="T1">n</text:span><text:span text:style-name="T1">c</text:span><text:span text:style-name="T1"> </text:span></text:p>
          </draw:text-box>
        </draw:frame>
        <draw:frame draw:style-name="gr120" draw:text-style-name="P2" draw:layer="layout" svg:width="3.461cm" svg:height="0.357cm" svg:x="2.286cm" svg:y="1.99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1.99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1.99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2.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2.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2.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2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2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2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3.31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3.31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3.31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3.75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3.75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3.75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4.1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4.1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4.1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4.62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4.62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4.62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5.06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5.06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5.06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5.50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5.50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5.50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5.94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5.94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5.94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6.37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6.37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6.37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2.286cm" svg:y="6.81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5.935cm" svg:y="6.81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7.053cm" svg:y="6.81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2" draw:text-style-name="P2" draw:layer="layout" svg:width="0.671cm" svg:height="0.357cm" svg:x="8.39cm" svg:y="1.559cm">
          <draw:text-box>
            <text:p text:style-name="P1"><text:span text:style-name="T1">I</text:span><text:span text:style-name="T1">t</text:span><text:span text:style-name="T1">e</text:span><text:span text:style-name="T1">m</text:span><text:span text:style-name="T1"> </text:span></text:p>
          </draw:text-box>
        </draw:frame>
        <draw:frame draw:style-name="gr55" draw:text-style-name="P2" draw:layer="layout" svg:width="0.938cm" svg:height="0.357cm" svg:x="12.04cm" svg:y="1.559cm">
          <draw:text-box>
            <text:p text:style-name="P1"><text:span text:style-name="T1">W</text:span><text:span text:style-name="T1">h</text:span><text:span text:style-name="T1">e</text:span><text:span text:style-name="T1">r</text:span><text:span text:style-name="T1">e</text:span><text:span text:style-name="T1"> </text:span></text:p>
          </draw:text-box>
        </draw:frame>
        <draw:frame draw:style-name="gr119" draw:text-style-name="P2" draw:layer="layout" svg:width="0.582cm" svg:height="0.357cm" svg:x="13.157cm" svg:y="1.559cm">
          <draw:text-box>
            <text:p text:style-name="P1"><text:span text:style-name="T1">E</text:span><text:span text:style-name="T1">n</text:span><text:span text:style-name="T1">c</text:span><text:span text:style-name="T1"> </text:span></text:p>
          </draw:text-box>
        </draw:frame>
        <draw:frame draw:style-name="gr120" draw:text-style-name="P2" draw:layer="layout" svg:width="3.461cm" svg:height="0.357cm" svg:x="8.39cm" svg:y="1.99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1.99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1.99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2.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2.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2.4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2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2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2.87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3.31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3.31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3.31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3.75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3.75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3.75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4.1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4.1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4.1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4.62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4.62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4.62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5.06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5.06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5.06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5.50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5.50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5.50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5.94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5.94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5.94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6.37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6.37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6.37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0" draw:text-style-name="P2" draw:layer="layout" svg:width="3.461cm" svg:height="0.357cm" svg:x="8.39cm" svg:y="6.81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887cm" svg:height="0.357cm" svg:x="12.039cm" svg:y="6.81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1" draw:text-style-name="P2" draw:layer="layout" svg:width="0.726cm" svg:height="0.357cm" svg:x="13.157cm" svg:y="6.81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1" draw:text-style-name="P2" draw:layer="layout" svg:width="1.475cm" svg:height="0.357cm" svg:x="16.722cm" svg:y="1.559cm">
          <draw:text-box>
            <text:p text:style-name="P1"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text:span text:style-name="T1"> </text:span></text:p>
          </draw:text-box>
        </draw:frame>
        <draw:frame draw:style-name="gr122" draw:text-style-name="P2" draw:layer="layout" svg:width="5.874cm" svg:height="0.357cm" svg:x="14.605cm" svg:y="2.21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2" draw:text-style-name="P2" draw:layer="layout" svg:width="5.874cm" svg:height="0.357cm" svg:x="14.605cm" svg:y="2.86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2" draw:text-style-name="P2" draw:layer="layout" svg:width="5.874cm" svg:height="0.357cm" svg:x="14.605cm" svg:y="3.50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2" draw:text-style-name="P2" draw:layer="layout" svg:width="5.874cm" svg:height="0.357cm" svg:x="14.605cm" svg:y="4.15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2" draw:text-style-name="P2" draw:layer="layout" svg:width="5.874cm" svg:height="0.357cm" svg:x="14.605cm" svg:y="4.8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2" draw:text-style-name="P2" draw:layer="layout" svg:width="5.874cm" svg:height="0.357cm" svg:x="14.605cm" svg:y="5.46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2" draw:text-style-name="P2" draw:layer="layout" svg:width="5.874cm" svg:height="0.357cm" svg:x="14.605cm" svg:y="6.10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2" draw:text-style-name="P2" draw:layer="layout" svg:width="5.874cm" svg:height="0.357cm" svg:x="14.605cm" svg:y="6.75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3" draw:text-style-name="P8" draw:layer="layout" svg:width="4.836cm" svg:height="0.31cm" svg:x="15.511cm" svg:y="7.413cm">
          <draw:text-box>
            <text:p text:style-name="P1"><text:span text:style-name="T6">T</text:span><text:span text:style-name="T6">o</text:span><text:span text:style-name="T6">t</text:span><text:span text:style-name="T6">a</text:span><text:span text:style-name="T6">l </text:span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text:s/></text:span><text:span text:style-name="T6"><text:s text:c="2"/></text:span><text:span text:style-name="T6"><text:s text:c="2"/>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88" draw:text-style-name="P8" draw:layer="layout" svg:width="0.278cm" svg:height="0.31cm" svg:x="20.32cm" svg:y="8.015cm">
          <draw:text-box>
            <text:p text:style-name="P1"><text:span text:style-name="T6"><text:s/></text:span></text:p>
          </draw:text-box>
        </draw:frame>
        <draw:frame draw:style-name="gr11" draw:text-style-name="P2" draw:layer="layout" svg:width="0.321cm" svg:height="0.357cm" svg:x="11.303cm" svg:y="8.4cm">
          <draw:text-box>
            <text:p text:style-name="P1"><text:span text:style-name="T3"><text:s/></text:span></text:p>
          </draw:text-box>
        </draw:frame>
        <draw:frame draw:style-name="gr124" draw:text-style-name="P2" draw:layer="layout" svg:width="1.7cm" svg:height="0.357cm" svg:x="10.456cm" svg:y="8.764cm">
          <draw:text-box>
            <text:p text:style-name="P1"><text:span text:style-name="T3">M</text:span><text:span text:style-name="T3">a</text:span><text:span text:style-name="T3">g</text:span><text:span text:style-name="T3">i</text:span><text:span text:style-name="T3">c</text:span><text:span text:style-name="T3"> </text:span><text:span text:style-name="T3">I</text:span><text:span text:style-name="T3">t</text:span><text:span text:style-name="T3">e</text:span><text:span text:style-name="T3">m</text:span><text:span text:style-name="T3">s</text:span><text:span text:style-name="T3"> </text:span></text:p>
          </draw:text-box>
        </draw:frame>
        <draw:frame draw:style-name="gr125" draw:text-style-name="P2" draw:layer="layout" svg:width="8.536cm" svg:height="0.357cm" svg:x="2.286cm" svg:y="9.12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C</text:span><text:span text:style-name="T1">h</text:span><text:span text:style-name="T1">a</text:span><text:span text:style-name="T1">r</text:span><text:span text:style-name="T1">g</text:span><text:span text:style-name="T1">e</text:span><text:span text:style-name="T1">s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6" draw:text-style-name="P2" draw:layer="layout" svg:width="8.528cm" svg:height="0.357cm" svg:x="2.286cm" svg:y="9.4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6" draw:text-style-name="P2" draw:layer="layout" svg:width="8.528cm" svg:height="0.357cm" svg:x="2.286cm" svg:y="9.85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6" draw:text-style-name="P2" draw:layer="layout" svg:width="8.528cm" svg:height="0.357cm" svg:x="2.286cm" svg:y="10.2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5" draw:text-style-name="P2" draw:layer="layout" svg:width="8.536cm" svg:height="0.357cm" svg:x="11.65cm" svg:y="9.12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C</text:span><text:span text:style-name="T1">h</text:span><text:span text:style-name="T1">a</text:span><text:span text:style-name="T1">r</text:span><text:span text:style-name="T1">g</text:span><text:span text:style-name="T1">e</text:span><text:span text:style-name="T1">s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6" draw:text-style-name="P2" draw:layer="layout" svg:width="8.528cm" svg:height="0.357cm" svg:x="11.65cm" svg:y="9.49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6" draw:text-style-name="P2" draw:layer="layout" svg:width="8.528cm" svg:height="0.357cm" svg:x="11.65cm" svg:y="9.85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6" draw:text-style-name="P2" draw:layer="layout" svg:width="8.528cm" svg:height="0.357cm" svg:x="11.65cm" svg:y="10.2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10.957cm">
          <draw:text-box>
            <text:p text:style-name="P1"><text:span text:style-name="T1"><text:s/></text:span></text:p>
          </draw:text-box>
        </draw:frame>
        <draw:frame draw:style-name="gr127" draw:text-style-name="P2" draw:layer="layout" svg:width="4.506cm" svg:height="0.357cm" svg:x="2.286cm" svg:y="11.32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7" draw:text-style-name="P2" draw:layer="layout" svg:width="4.506cm" svg:height="0.357cm" svg:x="2.286cm" svg:y="11.76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7" draw:text-style-name="P2" draw:layer="layout" svg:width="4.506cm" svg:height="0.357cm" svg:x="2.286cm" svg:y="12.19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7" draw:text-style-name="P2" draw:layer="layout" svg:width="4.506cm" svg:height="0.357cm" svg:x="2.286cm" svg:y="12.63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7" draw:text-style-name="P2" draw:layer="layout" svg:width="4.506cm" svg:height="0.357cm" svg:x="2.286cm" svg:y="13.07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7" draw:text-style-name="P2" draw:layer="layout" svg:width="4.506cm" svg:height="0.357cm" svg:x="2.286cm" svg:y="13.51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7" draw:text-style-name="P2" draw:layer="layout" svg:width="4.506cm" svg:height="0.357cm" svg:x="2.286cm" svg:y="13.94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7" draw:text-style-name="P2" draw:layer="layout" svg:width="4.506cm" svg:height="0.357cm" svg:x="2.286cm" svg:y="14.38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7.408cm" svg:y="11.32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7.408cm" svg:y="11.76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7.408cm" svg:y="12.19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7.408cm" svg:y="12.63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7.408cm" svg:y="13.07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7.408cm" svg:y="13.51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7.408cm" svg:y="13.94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7.408cm" svg:y="14.38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14.173cm" svg:y="11.32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14.173cm" svg:y="11.76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14.173cm" svg:y="12.19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14.173cm" svg:y="12.63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14.173cm" svg:y="13.07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14.173cm" svg:y="13.51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28" draw:text-style-name="P2" draw:layer="layout" svg:width="6.115cm" svg:height="0.357cm" svg:x="14.173cm" svg:y="13.94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85" draw:text-style-name="P2" draw:layer="layout" svg:width="6.195cm" svg:height="0.357cm" svg:x="14.173cm" svg:y="14.386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14.826cm">
          <draw:text-box>
            <text:p text:style-name="P1"><text:span text:style-name="T1"><text:s/></text:span></text:p>
          </draw:text-box>
        </draw:frame>
        <draw:frame draw:style-name="gr47" draw:text-style-name="P2" draw:layer="layout" svg:width="0.832cm" svg:height="0.357cm" svg:x="2.286cm" svg:y="15.19cm">
          <draw:text-box>
            <text:p text:style-name="P1"><text:span text:style-name="T1">R</text:span><text:span text:style-name="T1">i</text:span><text:span text:style-name="T1">n</text:span><text:span text:style-name="T1">g</text:span><text:span text:style-name="T1">s</text:span><text:span text:style-name="T1"> </text:span></text:p>
          </draw:text-box>
        </draw:frame>
        <draw:frame draw:style-name="gr129" draw:text-style-name="P2" draw:layer="layout" svg:width="16.973cm" svg:height="0.357cm" svg:x="3.556cm" svg:y="15.19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30" draw:text-style-name="P2" draw:layer="layout" svg:width="1.048cm" svg:height="0.357cm" svg:x="2.286cm" svg:y="15.554cm">
          <draw:text-box>
            <text:p text:style-name="P1"><text:span text:style-name="T1">P</text:span><text:span text:style-name="T1">o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/text:p>
          </draw:text-box>
        </draw:frame>
        <draw:frame draw:style-name="gr129" draw:text-style-name="P2" draw:layer="layout" svg:width="16.973cm" svg:height="0.357cm" svg:x="3.556cm" svg:y="15.55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 text:c="2"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15.91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0.321cm" svg:height="0.357cm" svg:x="2.286cm" svg:y="16.283cm">
          <draw:text-box>
            <text:p text:style-name="P1"><text:span text:style-name="T1"><text:s/></text:span></text:p>
          </draw:text-box>
        </draw:frame>
        <draw:frame draw:style-name="gr58" draw:text-style-name="P2" draw:layer="layout" svg:width="0.993cm" svg:height="0.357cm" svg:x="6.604cm" svg:y="16.647cm">
          <draw:text-box>
            <text:p text:style-name="P1"><text:span text:style-name="T3">M</text:span><text:span text:style-name="T3">o</text:span><text:span text:style-name="T3">n</text:span><text:span text:style-name="T3">e</text:span><text:span text:style-name="T3">y</text:span><text:span text:style-name="T3"> </text:span></text:p>
          </draw:text-box>
        </draw:frame>
        <draw:frame draw:style-name="gr131" draw:text-style-name="P2" draw:layer="layout" svg:width="2cm" svg:height="0.357cm" svg:x="2.286cm" svg:y="17.01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c</text:span><text:span text:style-name="T1">o</text:span><text:span text:style-name="T1">p</text:span><text:span text:style-name="T1">p</text:span><text:span text:style-name="T1">e</text:span><text:span text:style-name="T1">r </text:span></text:p>
          </draw:text-box>
        </draw:frame>
        <draw:frame draw:style-name="gr132" draw:text-style-name="P12" draw:layer="layout" svg:width="0.269cm" svg:height="0.196cm" svg:x="4.267cm" svg:y="17.054cm">
          <draw:text-box>
            <text:p text:style-name="P1"><text:span text:style-name="T7">5</text:span><text:span text:style-name="T7">0</text:span><text:span text:style-name="T7">0</text:span></text:p>
          </draw:text-box>
        </draw:frame>
        <draw:frame draw:style-name="gr133" draw:text-style-name="P12" draw:layer="layout" svg:width="0.177cm" svg:height="0.196cm" svg:x="4.521cm" svg:y="17.029cm">
          <draw:text-box>
            <text:p text:style-name="P1"><text:span text:style-name="T8"><text:s/></text:span></text:p>
          </draw:text-box>
        </draw:frame>
        <draw:frame draw:style-name="gr134" draw:text-style-name="P2" draw:layer="layout" svg:width="6.513cm" svg:height="0.357cm" svg:x="5.148cm" svg:y="17.011cm">
          <draw:text-box>
            <text:p text:style-name="P1"><text:span text:style-name="T1">T</text:span><text:span text:style-name="T1">r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35" draw:text-style-name="P2" draw:layer="layout" svg:width="1.839cm" svg:height="0.357cm" svg:x="2.286cm" svg:y="17.38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s</text:span><text:span text:style-name="T1">i</text:span><text:span text:style-name="T1">l</text:span><text:span text:style-name="T1">v</text:span><text:span text:style-name="T1">e</text:span><text:span text:style-name="T1">r </text:span></text:p>
          </draw:text-box>
        </draw:frame>
        <draw:frame draw:style-name="gr136" draw:text-style-name="P12" draw:layer="layout" svg:width="0.18cm" svg:height="0.196cm" svg:x="4.106cm" svg:y="17.427cm">
          <draw:text-box>
            <text:p text:style-name="P1"><text:span text:style-name="T7">5</text:span><text:span text:style-name="T7">0</text:span></text:p>
          </draw:text-box>
        </draw:frame>
        <draw:frame draw:style-name="gr11" draw:text-style-name="P2" draw:layer="layout" svg:width="0.321cm" svg:height="0.357cm" svg:x="4.276cm" svg:y="17.383cm">
          <draw:text-box>
            <text:p text:style-name="P1"><text:span text:style-name="T1"><text:s/></text:span></text:p>
          </draw:text-box>
        </draw:frame>
        <draw:frame draw:style-name="gr76" draw:text-style-name="P2" draw:layer="layout" svg:width="5.23cm" svg:height="0.357cm" svg:x="5.148cm" svg:y="17.38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30" draw:text-style-name="P2" draw:layer="layout" svg:width="1.048cm" svg:height="0.357cm" svg:x="10.549cm" svg:y="17.383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37" draw:text-style-name="P2" draw:layer="layout" svg:width="2.25cm" svg:height="0.357cm" svg:x="2.286cm" svg:y="17.74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u</text:span><text:span text:style-name="T1">m</text:span><text:span text:style-name="T1"> </text:span></text:p>
          </draw:text-box>
        </draw:frame>
        <draw:frame draw:style-name="gr136" draw:text-style-name="P12" draw:layer="layout" svg:width="0.18cm" svg:height="0.196cm" svg:x="4.513cm" svg:y="17.791cm">
          <draw:text-box>
            <text:p text:style-name="P1"><text:span text:style-name="T7">1</text:span><text:span text:style-name="T7">0</text:span></text:p>
          </draw:text-box>
        </draw:frame>
        <draw:frame draw:style-name="gr11" draw:text-style-name="P2" draw:layer="layout" svg:width="0.321cm" svg:height="0.357cm" svg:x="4.682cm" svg:y="17.747cm">
          <draw:text-box>
            <text:p text:style-name="P1"><text:span text:style-name="T1"><text:s/></text:span></text:p>
          </draw:text-box>
        </draw:frame>
        <draw:frame draw:style-name="gr138" draw:text-style-name="P2" draw:layer="layout" svg:width="4.185cm" svg:height="0.357cm" svg:x="5.148cm" svg:y="17.74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39" draw:text-style-name="P2" draw:layer="layout" svg:width="2.093cm" svg:height="0.357cm" svg:x="9.516cm" svg:y="17.747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24" draw:text-style-name="P2" draw:layer="layout" svg:width="1.7cm" svg:height="0.357cm" svg:x="2.286cm" svg:y="18.11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g</text:span><text:span text:style-name="T1">o</text:span><text:span text:style-name="T1">l</text:span><text:span text:style-name="T1">d</text:span><text:span text:style-name="T1"> </text:span></text:p>
          </draw:text-box>
        </draw:frame>
        <draw:frame draw:style-name="gr133" draw:text-style-name="P12" draw:layer="layout" svg:width="0.177cm" svg:height="0.196cm" svg:x="3.962cm" svg:y="18.155cm">
          <draw:text-box>
            <text:p text:style-name="P1"><text:span text:style-name="T7">5</text:span></text:p>
          </draw:text-box>
        </draw:frame>
        <draw:frame draw:style-name="gr11" draw:text-style-name="P2" draw:layer="layout" svg:width="0.321cm" svg:height="0.357cm" svg:x="4.047cm" svg:y="18.111cm">
          <draw:text-box>
            <text:p text:style-name="P1"><text:span text:style-name="T1"><text:s/></text:span></text:p>
          </draw:text-box>
        </draw:frame>
        <draw:frame draw:style-name="gr140" draw:text-style-name="P2" draw:layer="layout" svg:width="6.517cm" svg:height="0.357cm" svg:x="5.148cm" svg:y="18.111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41" draw:text-style-name="P2" draw:layer="layout" svg:width="2.271cm" svg:height="0.357cm" svg:x="2.286cm" svg:y="18.47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text:span text:style-name="T1">p</text:span><text:span text:style-name="T1">l</text:span><text:span text:style-name="T1">a</text:span><text:span text:style-name="T1">t</text:span><text:span text:style-name="T1">i</text:span><text:span text:style-name="T1">n</text:span><text:span text:style-name="T1">u</text:span><text:span text:style-name="T1">m</text:span><text:span text:style-name="T1"> </text:span></text:p>
          </draw:text-box>
        </draw:frame>
        <draw:frame draw:style-name="gr133" draw:text-style-name="P12" draw:layer="layout" svg:width="0.177cm" svg:height="0.196cm" svg:x="4.53cm" svg:y="18.519cm">
          <draw:text-box>
            <text:p text:style-name="P1"><text:span text:style-name="T7">1</text:span></text:p>
          </draw:text-box>
        </draw:frame>
        <draw:frame draw:style-name="gr11" draw:text-style-name="P2" draw:layer="layout" svg:width="0.321cm" svg:height="0.357cm" svg:x="4.614cm" svg:y="18.475cm">
          <draw:text-box>
            <text:p text:style-name="P1"><text:span text:style-name="T1"><text:s/></text:span></text:p>
          </draw:text-box>
        </draw:frame>
        <draw:frame draw:style-name="gr140" draw:text-style-name="P2" draw:layer="layout" svg:width="6.517cm" svg:height="0.357cm" svg:x="5.148cm" svg:y="18.475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42" draw:text-style-name="P2" draw:layer="layout" svg:width="1.526cm" svg:height="0.357cm" svg:x="16.205cm" svg:y="16.647cm">
          <draw:text-box>
            <text:p text:style-name="P1"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e</text:span><text:span text:style-name="T3">n</text:span><text:span text:style-name="T3">c</text:span><text:span text:style-name="T3">e</text:span><text:span text:style-name="T3"> </text:span></text:p>
          </draw:text-box>
        </draw:frame>
        <draw:frame draw:style-name="gr143" draw:text-style-name="P8" draw:layer="layout" svg:width="1.86cm" svg:height="0.31cm" svg:x="13.606cm" svg:y="17.015cm">
          <draw:text-box>
            <text:p text:style-name="P1"><text:span text:style-name="T6">N</text:span><text:span text:style-name="T6">e</text:span><text:span text:style-name="T6">x</text:span><text:span text:style-name="T6">t </text:span><text:span text:style-name="T6">L</text:span><text:span text:style-name="T6">e</text:span><text:span text:style-name="T6">v</text:span><text:span text:style-name="T6">e</text:span><text:span text:style-name="T6">l </text:span><text:span text:style-name="T6">G</text:span><text:span text:style-name="T6">o</text:span><text:span text:style-name="T6">a</text:span><text:span text:style-name="T6">l</text:span></text:p>
          </draw:text-box>
        </draw:frame>
        <draw:frame draw:style-name="gr11" draw:text-style-name="P2" draw:layer="layout" svg:width="0.321cm" svg:height="0.357cm" svg:x="15.486cm" svg:y="16.977cm">
          <draw:text-box>
            <text:p text:style-name="P1"><text:span text:style-name="T1"><text:s/></text:span></text:p>
          </draw:text-box>
        </draw:frame>
        <draw:frame draw:style-name="gr144" draw:text-style-name="P8" draw:layer="layout" svg:width="1.306cm" svg:height="0.31cm" svg:x="16.146cm" svg:y="17.015cm">
          <draw:text-box>
            <text:p text:style-name="P1"><text:span text:style-name="T6">B</text:span><text:span text:style-name="T6">o</text:span><text:span text:style-name="T6">n</text:span><text:span text:style-name="T6">u</text:span><text:span text:style-name="T6">s</text:span><text:span text:style-name="T6"> </text:span><text:span text:style-name="T6">E</text:span><text:span text:style-name="T6">x</text:span><text:span text:style-name="T6">p</text:span><text:span text:style-name="T6"> </text:span></text:p>
          </draw:text-box>
        </draw:frame>
        <draw:frame draw:style-name="gr145" draw:text-style-name="P8" draw:layer="layout" svg:width="1.374cm" svg:height="0.31cm" svg:x="17.89cm" svg:y="17.015cm">
          <draw:text-box>
            <text:p text:style-name="P1"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 </text:span><text:span text:style-name="T6">E</text:span><text:span text:style-name="T6">x</text:span><text:span text:style-name="T6">p</text:span></text:p>
          </draw:text-box>
        </draw:frame>
        <draw:frame draw:style-name="gr11" draw:text-style-name="P2" draw:layer="layout" svg:width="0.321cm" svg:height="0.357cm" svg:x="19.279cm" svg:y="16.977cm">
          <draw:text-box>
            <text:p text:style-name="P1"><text:span text:style-name="T1"><text:s/></text:span></text:p>
          </draw:text-box>
        </draw:frame>
        <draw:frame draw:style-name="gr146" draw:text-style-name="P8" draw:layer="layout" svg:width="1.886cm" svg:height="0.31cm" svg:x="13.606cm" svg:y="17.506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147" draw:text-style-name="P8" draw:layer="layout" svg:width="1.001cm" svg:height="0.31cm" svg:x="16.146cm" svg:y="17.506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%</text:span><text:span text:style-name="T6"> </text:span></text:p>
          </draw:text-box>
        </draw:frame>
        <draw:frame draw:style-name="gr148" draw:text-style-name="P8" draw:layer="layout" svg:width="2.445cm" svg:height="0.31cm" svg:x="17.89cm" svg:y="17.506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146" draw:text-style-name="P8" draw:layer="layout" svg:width="1.886cm" svg:height="0.31cm" svg:x="13.606cm" svg:y="17.988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147" draw:text-style-name="P8" draw:layer="layout" svg:width="1.001cm" svg:height="0.31cm" svg:x="16.146cm" svg:y="17.988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%</text:span><text:span text:style-name="T6"> </text:span></text:p>
          </draw:text-box>
        </draw:frame>
        <draw:frame draw:style-name="gr148" draw:text-style-name="P8" draw:layer="layout" svg:width="2.445cm" svg:height="0.31cm" svg:x="17.89cm" svg:y="17.988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146" draw:text-style-name="P8" draw:layer="layout" svg:width="1.886cm" svg:height="0.31cm" svg:x="13.606cm" svg:y="18.47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147" draw:text-style-name="P8" draw:layer="layout" svg:width="1.001cm" svg:height="0.31cm" svg:x="16.146cm" svg:y="18.47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%</text:span><text:span text:style-name="T6"> </text:span></text:p>
          </draw:text-box>
        </draw:frame>
        <draw:frame draw:style-name="gr148" draw:text-style-name="P8" draw:layer="layout" svg:width="2.445cm" svg:height="0.31cm" svg:x="17.89cm" svg:y="18.47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88" draw:text-style-name="P8" draw:layer="layout" svg:width="0.278cm" svg:height="0.31cm" svg:x="13.606cm" svg:y="18.962cm">
          <draw:text-box>
            <text:p text:style-name="P1"><text:span text:style-name="T6"><text:s/></text:span></text:p>
          </draw:text-box>
        </draw:frame>
        <draw:frame draw:style-name="gr88" draw:text-style-name="P8" draw:layer="layout" svg:width="0.278cm" svg:height="0.31cm" svg:x="2.286cm" svg:y="19.453cm">
          <draw:text-box>
            <text:p text:style-name="P1"><text:span text:style-name="T6"><text:s/></text:span></text:p>
          </draw:text-box>
        </draw:frame>
        <draw:frame draw:style-name="gr149" draw:text-style-name="P2" draw:layer="layout" svg:width="2.91cm" svg:height="0.357cm" svg:x="9.779cm" svg:y="19.932cm">
          <draw:text-box>
            <text:p text:style-name="P1"><text:span text:style-name="T3">C</text:span><text:span text:style-name="T3">h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40" draw:text-style-name="P2" draw:layer="layout" svg:width="2.394cm" svg:height="0.357cm" svg:x="2.286cm" svg:y="20.304cm">
          <draw:text-box>
            <text:p text:style-name="P1"><text:span text:style-name="T1">F</text:span><text:span text:style-name="T1">r</text:span><text:span text:style-name="T1">o</text:span><text:span text:style-name="T1">n</text:span><text:span text:style-name="T1">t </text:span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a</text:span><text:span text:style-name="T1">n</text:span><text:span text:style-name="T1">c</text:span><text:span text:style-name="T1">e</text:span><text:span text:style-name="T1"> </text:span></text:p>
          </draw:text-box>
        </draw:frame>
        <draw:frame draw:style-name="gr150" draw:text-style-name="P2" draw:layer="layout" svg:width="15.687cm" svg:height="0.357cm" svg:x="4.919cm" svg:y="20.30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51" draw:text-style-name="P2" draw:layer="layout" svg:width="2.216cm" svg:height="0.357cm" svg:x="2.286cm" svg:y="20.668cm">
          <draw:text-box>
            <text:p text:style-name="P1"><text:span text:style-name="T1">R</text:span><text:span text:style-name="T1">e</text:span><text:span text:style-name="T1">a</text:span><text:span text:style-name="T1">r </text:span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a</text:span><text:span text:style-name="T1">n</text:span><text:span text:style-name="T1">c</text:span><text:span text:style-name="T1">e</text:span><text:span text:style-name="T1"> </text:span></text:p>
          </draw:text-box>
        </draw:frame>
        <draw:frame draw:style-name="gr152" draw:text-style-name="P2" draw:layer="layout" svg:width="15.526cm" svg:height="0.357cm" svg:x="5.08cm" svg:y="20.668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70" draw:text-style-name="P2" draw:layer="layout" svg:width="1.67cm" svg:height="0.357cm" svg:x="2.286cm" svg:y="21.032cm">
          <draw:text-box>
            <text:p text:style-name="P1"><text:span text:style-name="T1">M</text:span><text:span text:style-name="T1">a</text:span><text:span text:style-name="T1">n</text:span><text:span text:style-name="T1">n</text:span><text:span text:style-name="T1">e</text:span><text:span text:style-name="T1">r</text:span><text:span text:style-name="T1">i</text:span><text:span text:style-name="T1">s</text:span><text:span text:style-name="T1">m</text:span><text:span text:style-name="T1">s</text:span><text:span text:style-name="T1"> </text:span></text:p>
          </draw:text-box>
        </draw:frame>
        <draw:frame draw:style-name="gr153" draw:text-style-name="P2" draw:layer="layout" svg:width="16.008cm" svg:height="0.357cm" svg:x="4.597cm" svg:y="21.03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54" draw:text-style-name="P2" draw:layer="layout" svg:width="9.167cm" svg:height="0.357cm" svg:x="2.286cm" svg:y="21.396cm">
          <draw:text-box>
            <text:p text:style-name="P1"><text:span text:style-name="T1">F</text:span><text:span text:style-name="T1">a</text:span><text:span text:style-name="T1">t</text:span><text:span text:style-name="T1">h</text:span><text:span text:style-name="T1">e</text:span><text:span text:style-name="T1">r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/></text:span><text:span text:style-name="T1">M</text:span><text:span text:style-name="T1">o</text:span><text:span text:style-name="T1">t</text:span><text:span text:style-name="T1">h</text:span><text:span text:style-name="T1">e</text:span><text:span text:style-name="T1">r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55" draw:text-style-name="P2" draw:layer="layout" svg:width="9.019cm" svg:height="0.357cm" svg:x="11.489cm" svg:y="21.396cm">
          <draw:text-box>
            <text:p text:style-name="P1"><text:span text:style-name="T1">S</text:span><text:span text:style-name="T1">i</text:span><text:span text:style-name="T1">b</text:span><text:span text:style-name="T1">l</text:span><text:span text:style-name="T1">i</text:span><text:span text:style-name="T1">n</text:span><text:span text:style-name="T1">g</text:span><text:span text:style-name="T1">s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56" draw:text-style-name="P2" draw:layer="layout" svg:width="11.512cm" svg:height="0.357cm" svg:x="2.286cm" svg:y="21.761cm">
          <draw:text-box>
            <text:p text:style-name="P1"><text:span text:style-name="T1">D</text:span><text:span text:style-name="T1">e</text:span><text:span text:style-name="T1">i</text:span><text:span text:style-name="T1">t</text:span><text:span text:style-name="T1">y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<text:s/></text:span><text:span text:style-name="T1">S</text:span><text:span text:style-name="T1">t</text:span><text:span text:style-name="T1">a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57" draw:text-style-name="P2" draw:layer="layout" svg:width="5.908cm" svg:height="0.357cm" svg:x="14.563cm" svg:y="21.761cm">
          <draw:text-box>
            <text:p text:style-name="P1"><text:span text:style-name="T1">T</text:span><text:span text:style-name="T1">i</text:span><text:span text:style-name="T1">t</text:span><text:span text:style-name="T1">h</text:span><text:span text:style-name="T1">e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1" draw:text-style-name="P2" draw:layer="layout" svg:width="0.321cm" svg:height="0.357cm" svg:x="2.286cm" svg:y="22.125cm">
          <draw:text-box>
            <text:p text:style-name="P1"><text:span text:style-name="T1"><text:s/></text:span></text:p>
          </draw:text-box>
        </draw:frame>
        <draw:frame draw:style-name="gr158" draw:text-style-name="P2" draw:layer="layout" svg:width="1.573cm" svg:height="0.357cm" svg:x="10.533cm" svg:y="22.489cm">
          <draw:text-box>
            <text:p text:style-name="P1"><text:span text:style-name="T3">F</text:span><text:span text:style-name="T3">i</text:span><text:span text:style-name="T3">n</text:span><text:span text:style-name="T3">a</text:span><text:span text:style-name="T3">l </text:span><text:span text:style-name="T3">N</text:span><text:span text:style-name="T3">o</text:span><text:span text:style-name="T3">t</text:span><text:span text:style-name="T3">e</text:span><text:span text:style-name="T3">s</text:span><text:span text:style-name="T3"> </text:span></text:p>
          </draw:text-box>
        </draw:frame>
        <draw:polygon draw:style-name="gr71" draw:text-style-name="P6" draw:layer="layout" svg:width="0.017cm" svg:height="0.118cm" svg:x="2.277cm" svg:y="22.843cm" svg:viewBox="0 0 18 119" draw:points="0,119 18,119 18,0 0,0">
          <text:p/>
        </draw:polygon>
        <draw:polygon draw:style-name="gr71" draw:text-style-name="P6" draw:layer="layout" svg:width="0.017cm" svg:height="0.016cm" svg:x="2.277cm" svg:y="22.843cm" svg:viewBox="0 0 18 17" draw:points="0,17 18,17 18,0 0,0">
          <text:p/>
        </draw:polygon>
        <draw:polygon draw:style-name="gr71" draw:text-style-name="P6" draw:layer="layout" svg:width="18cm" svg:height="0.016cm" svg:x="2.294cm" svg:y="22.843cm" svg:viewBox="0 0 18001 17" draw:points="0,17 18001,17 18001,0 0,0">
          <text:p/>
        </draw:polygon>
        <draw:polygon draw:style-name="gr71" draw:text-style-name="P6" draw:layer="layout" svg:width="0.017cm" svg:height="0.118cm" svg:x="20.294cm" svg:y="22.843cm" svg:viewBox="0 0 18 119" draw:points="0,119 18,119 18,0 0,0">
          <text:p/>
        </draw:polygon>
        <draw:polygon draw:style-name="gr71" draw:text-style-name="P6" draw:layer="layout" svg:width="0.017cm" svg:height="0.016cm" svg:x="20.294cm" svg:y="22.843cm" svg:viewBox="0 0 18 17" draw:points="0,17 18,17 18,0 0,0">
          <text:p/>
        </draw:polygon>
        <draw:polygon draw:style-name="gr71" draw:text-style-name="P6" draw:layer="layout" svg:width="0.017cm" svg:height="0.584cm" svg:x="2.277cm" svg:y="22.961cm" svg:viewBox="0 0 18 585" draw:points="0,585 18,585 18,0 0,0">
          <text:p/>
        </draw:polygon>
        <draw:polygon draw:style-name="gr71" draw:text-style-name="P6" draw:layer="layout" svg:width="0.017cm" svg:height="0.584cm" svg:x="20.294cm" svg:y="22.961cm" svg:viewBox="0 0 18 585" draw:points="0,585 18,585 18,0 0,0">
          <text:p/>
        </draw:polygon>
        <draw:frame draw:style-name="gr159" draw:text-style-name="P13" draw:layer="layout" svg:width="0.422cm" svg:height="0.471cm" svg:x="2.379cm" svg:y="22.974cm">
          <draw:text-box>
            <text:p text:style-name="P1"><text:span text:style-name="T9"><text:s/></text:span></text:p>
          </draw:text-box>
        </draw:frame>
        <draw:polygon draw:style-name="gr71" draw:text-style-name="P6" draw:layer="layout" svg:width="0.017cm" svg:height="0.093cm" svg:x="2.277cm" svg:y="23.545cm" svg:viewBox="0 0 18 94" draw:points="0,94 18,94 18,0 0,0">
          <text:p/>
        </draw:polygon>
        <draw:polygon draw:style-name="gr71" draw:text-style-name="P6" draw:layer="layout" svg:width="18cm" svg:height="0.017cm" svg:x="2.294cm" svg:y="23.545cm" svg:viewBox="0 0 18001 18" draw:points="0,18 18001,18 18001,0 0,0">
          <text:p/>
        </draw:polygon>
        <draw:polygon draw:style-name="gr71" draw:text-style-name="P6" draw:layer="layout" svg:width="0.017cm" svg:height="0.093cm" svg:x="20.294cm" svg:y="23.545cm" svg:viewBox="0 0 18 94" draw:points="0,94 18,94 18,0 0,0">
          <text:p/>
        </draw:polygon>
        <draw:polygon draw:style-name="gr71" draw:text-style-name="P6" draw:layer="layout" svg:width="0.017cm" svg:height="0.585cm" svg:x="2.277cm" svg:y="23.638cm" svg:viewBox="0 0 18 586" draw:points="0,586 18,586 18,0 0,0">
          <text:p/>
        </draw:polygon>
        <draw:polygon draw:style-name="gr71" draw:text-style-name="P6" draw:layer="layout" svg:width="0.017cm" svg:height="0.585cm" svg:x="20.294cm" svg:y="23.638cm" svg:viewBox="0 0 18 586" draw:points="0,586 18,586 18,0 0,0">
          <text:p/>
        </draw:polygon>
        <draw:frame draw:style-name="gr159" draw:text-style-name="P13" draw:layer="layout" svg:width="0.422cm" svg:height="0.471cm" svg:x="2.379cm" svg:y="23.651cm">
          <draw:text-box>
            <text:p text:style-name="P1"><text:span text:style-name="T9"><text:s/></text:span></text:p>
          </draw:text-box>
        </draw:frame>
        <draw:polygon draw:style-name="gr71" draw:text-style-name="P6" draw:layer="layout" svg:width="0.017cm" svg:height="0.093cm" svg:x="2.277cm" svg:y="24.223cm" svg:viewBox="0 0 18 94" draw:points="0,94 18,94 18,0 0,0">
          <text:p/>
        </draw:polygon>
        <draw:polygon draw:style-name="gr71" draw:text-style-name="P6" draw:layer="layout" svg:width="18cm" svg:height="0.017cm" svg:x="2.294cm" svg:y="24.223cm" svg:viewBox="0 0 18001 18" draw:points="0,18 18001,18 18001,0 0,0">
          <text:p/>
        </draw:polygon>
        <draw:polygon draw:style-name="gr71" draw:text-style-name="P6" draw:layer="layout" svg:width="0.017cm" svg:height="0.093cm" svg:x="20.294cm" svg:y="24.223cm" svg:viewBox="0 0 18 94" draw:points="0,94 18,94 18,0 0,0">
          <text:p/>
        </draw:polygon>
        <draw:polygon draw:style-name="gr71" draw:text-style-name="P6" draw:layer="layout" svg:width="0.017cm" svg:height="0.592cm" svg:x="2.277cm" svg:y="24.316cm" svg:viewBox="0 0 18 593" draw:points="0,593 18,593 18,0 0,0">
          <text:p/>
        </draw:polygon>
        <draw:polygon draw:style-name="gr71" draw:text-style-name="P6" draw:layer="layout" svg:width="0.017cm" svg:height="0.592cm" svg:x="20.294cm" svg:y="24.316cm" svg:viewBox="0 0 18 593" draw:points="0,593 18,593 18,0 0,0">
          <text:p/>
        </draw:polygon>
        <draw:frame draw:style-name="gr159" draw:text-style-name="P13" draw:layer="layout" svg:width="0.422cm" svg:height="0.471cm" svg:x="2.379cm" svg:y="24.337cm">
          <draw:text-box>
            <text:p text:style-name="P1"><text:span text:style-name="T9"><text:s/></text:span></text:p>
          </draw:text-box>
        </draw:frame>
        <draw:polygon draw:style-name="gr71" draw:text-style-name="P6" draw:layer="layout" svg:width="0.017cm" svg:height="0.094cm" svg:x="2.277cm" svg:y="24.908cm" svg:viewBox="0 0 18 95" draw:points="0,95 18,95 18,0 0,0">
          <text:p/>
        </draw:polygon>
        <draw:polygon draw:style-name="gr71" draw:text-style-name="P6" draw:layer="layout" svg:width="18cm" svg:height="0.017cm" svg:x="2.294cm" svg:y="24.908cm" svg:viewBox="0 0 18001 18" draw:points="0,18 18001,18 18001,0 0,0">
          <text:p/>
        </draw:polygon>
        <draw:polygon draw:style-name="gr71" draw:text-style-name="P6" draw:layer="layout" svg:width="0.017cm" svg:height="0.094cm" svg:x="20.294cm" svg:y="24.908cm" svg:viewBox="0 0 18 95" draw:points="0,95 18,95 18,0 0,0">
          <text:p/>
        </draw:polygon>
        <draw:polygon draw:style-name="gr71" draw:text-style-name="P6" draw:layer="layout" svg:width="0.017cm" svg:height="0.584cm" svg:x="2.277cm" svg:y="25.002cm" svg:viewBox="0 0 18 585" draw:points="0,585 18,585 18,0 0,0">
          <text:p/>
        </draw:polygon>
        <draw:polygon draw:style-name="gr71" draw:text-style-name="P6" draw:layer="layout" svg:width="0.017cm" svg:height="0.017cm" svg:x="2.277cm" svg:y="25.586cm" svg:viewBox="0 0 18 18" draw:points="0,18 18,18 18,0 0,0">
          <text:p/>
        </draw:polygon>
        <draw:polygon draw:style-name="gr71" draw:text-style-name="P6" draw:layer="layout" svg:width="0.017cm" svg:height="0.017cm" svg:x="2.277cm" svg:y="25.586cm" svg:viewBox="0 0 18 18" draw:points="0,18 18,18 18,0 0,0">
          <text:p/>
        </draw:polygon>
        <draw:polygon draw:style-name="gr71" draw:text-style-name="P6" draw:layer="layout" svg:width="18cm" svg:height="0.017cm" svg:x="2.294cm" svg:y="25.586cm" svg:viewBox="0 0 18001 18" draw:points="0,18 18001,18 18001,0 0,0">
          <text:p/>
        </draw:polygon>
        <draw:polygon draw:style-name="gr71" draw:text-style-name="P6" draw:layer="layout" svg:width="0.017cm" svg:height="0.584cm" svg:x="20.294cm" svg:y="25.002cm" svg:viewBox="0 0 18 585" draw:points="0,585 18,585 18,0 0,0">
          <text:p/>
        </draw:polygon>
        <draw:polygon draw:style-name="gr71" draw:text-style-name="P6" draw:layer="layout" svg:width="0.017cm" svg:height="0.017cm" svg:x="20.294cm" svg:y="25.586cm" svg:viewBox="0 0 18 18" draw:points="0,18 18,18 18,0 0,0">
          <text:p/>
        </draw:polygon>
        <draw:polygon draw:style-name="gr71" draw:text-style-name="P6" draw:layer="layout" svg:width="0.017cm" svg:height="0.017cm" svg:x="20.294cm" svg:y="25.586cm" svg:viewBox="0 0 18 18" draw:points="0,18 18,18 18,0 0,0">
          <text:p/>
        </draw:polygon>
        <draw:frame draw:style-name="gr159" draw:text-style-name="P13" draw:layer="layout" svg:width="0.422cm" svg:height="0.471cm" svg:x="2.379cm" svg:y="25.014cm">
          <draw:text-box>
            <text:p text:style-name="P1"><text:span text:style-name="T9"><text:s/></text:span></text:p>
          </draw:text-box>
        </draw:frame>
        <draw:polygon draw:style-name="gr71" draw:text-style-name="P6" draw:layer="layout" svg:width="0.025cm" svg:height="3.505cm" svg:x="7.078cm" svg:y="11.311cm" svg:viewBox="0 0 26 3506" draw:points="0,3506 26,3506 26,0 0,0">
          <text:p/>
        </draw:polygon>
        <draw:polygon draw:style-name="gr71" draw:text-style-name="P6" draw:layer="layout" svg:width="0.026cm" svg:height="3.505cm" svg:x="13.843cm" svg:y="11.311cm" svg:viewBox="0 0 27 3506" draw:points="0,3506 27,3506 27,0 0,0">
          <text:p/>
        </draw:polygon>
        <draw:frame draw:style-name="gr11" draw:text-style-name="P2" draw:layer="layout" svg:width="0.321cm" svg:height="0.357cm" svg:x="2.286cm" svg:y="25.613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Bol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1" svg:font-family="'Times New Roman', Bol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2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protected="true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9T15:06:39.811935727</dc:date>
    <meta:editing-duration>PT2H30S</meta:editing-duration>
    <meta:editing-cycles>23</meta:editing-cycles>
    <meta:generator>LibreOffice/24.2.7.2$Linux_X86_64 LibreOffice_project/420$Build-2</meta:generator>
    <meta:print-date>2026-04-09T14:00:46.429587006</meta:print-date>
    <meta:printed-by>PDF files</meta:printed-by>
    <meta:document-statistic meta:object-count="848"/>
  </office:meta>
</office:document-meta>
</file>